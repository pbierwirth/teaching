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6000000960FC190EA6.png" manifest:media-type="image/png"/>
  <manifest:file-entry manifest:full-path="Pictures/10000001000009600000096030A54F6A.png" manifest:media-type="image/png"/>
  <manifest:file-entry manifest:full-path="Pictures/1000000100000960000009602C0BB6AB.png" manifest:media-type="image/png"/>
  <manifest:file-entry manifest:full-path="Pictures/1000000100000960000009609D85F5CF.png" manifest:media-type="image/png"/>
  <manifest:file-entry manifest:full-path="Pictures/100000010000096000000960DE1E363A.png" manifest:media-type="image/png"/>
  <manifest:file-entry manifest:full-path="Pictures/100000010000096000000960B95B5639.png" manifest:media-type="image/png"/>
  <manifest:file-entry manifest:full-path="Pictures/100000010000096000000960C1E74EFB.png" manifest:media-type="image/png"/>
  <manifest:file-entry manifest:full-path="Pictures/1000000100000800000000F4829ECB2B.png" manifest:media-type="image/png"/>
  <manifest:file-entry manifest:full-path="Pictures/100030300000E33800001B155418B09F.svg" manifest:media-type="image/svg+xml"/>
  <manifest:file-entry manifest:full-path="Pictures/1000000100000960000009601CEB6768.png" manifest:media-type="image/png"/>
  <manifest:file-entry manifest:full-path="Pictures/1000000100000122000000A01C174621.png" manifest:media-type="image/png"/>
  <manifest:file-entry manifest:full-path="Pictures/1000000100000960000009601691CC6D.png" manifest:media-type="image/png"/>
  <manifest:file-entry manifest:full-path="Pictures/1000552500001DFC00001082C4678447.svg" manifest:media-type="image/svg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/>
    <style:font-face style:name="Aptos Display" svg:font-family="'Aptos Display'"/>
    <style:font-face style:name="Arial" svg:font-family="Arial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 New Roman" svg:font-family="'Time New Roman'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2.437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width="0.051cm" svg:stroke-color="#ffffff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99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fo:min-height="2.221cm" loext:decorative="false"/>
      <style:paragraph-properties style:writing-mode="lr-tb"/>
    </style:style>
    <style:style style:name="gr7" style:family="graphic" style:parent-style-name="objectwithoutfill">
      <style:graphic-properties svg:stroke-color="#ffffff" draw:marker-end="Arrowheads_20_4" draw:marker-end-width="0.2cm" draw:fill="none" draw:textarea-vertical-align="middl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23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34cm" loext:decorative="false"/>
      <style:paragraph-properties style:writing-mode="lr-tb"/>
    </style:style>
    <style:style style:name="gr12" style:family="graphic" style:parent-style-name="standard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1.605cm" fo:min-width="5.392cm" fo:padding-top="0.15cm" fo:padding-bottom="0.15cm" fo:padding-left="0.275cm" fo:padding-right="0.275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3.51cm" fo:min-width="6.435cm" fo:padding-top="0.15cm" fo:padding-bottom="0.15cm" fo:padding-left="0.275cm" fo:padding-right="0.275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2.24cm" fo:min-width="6.435cm" fo:padding-top="0.15cm" fo:padding-bottom="0.15cm" fo:padding-left="0.275cm" fo:padding-right="0.275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51cm" svg:stroke-color="#000000" draw:marker-start-width="0.279cm" draw:marker-end="Arrowheads_20_16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16" style:family="graphic" style:parent-style-name="objectwithoutfill">
      <style:graphic-properties svg:stroke-width="0.051cm" svg:stroke-color="#000000" draw:marker-start-width="0.279cm" draw:marker-end="Arrowheads_20_17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17" style:family="graphic" style:parent-style-name="objectwithoutfill">
      <style:graphic-properties svg:stroke-width="0.051cm" svg:stroke-color="#000000" draw:marker-start-width="0.279cm" draw:marker-end="Arrowheads_20_18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18" style:family="graphic" style:parent-style-name="objectwithoutfill">
      <style:graphic-properties svg:stroke-width="0.051cm" svg:stroke-color="#000000" draw:marker-start-width="0.279cm" draw:marker-end="Arrowheads_20_19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25cm" loext:decorative="false"/>
      <style:paragraph-properties style:writing-mode="lr-tb"/>
    </style:style>
    <style:style style:name="gr20" style:family="graphic" style:parent-style-name="standard">
      <style:graphic-properties svg:stroke-width="0.051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598cm" fo:min-width="0.348cm" fo:padding-top="0.15cm" fo:padding-bottom="0.15cm" fo:padding-left="0.275cm" fo:padding-right="0.275cm" loext:decorative="false"/>
    </style:style>
    <style:style style:name="gr21" style:family="graphic" style:parent-style-name="standard">
      <style:graphic-properties svg:stroke-color="#00aa00" draw:fill="solid" draw:fill-color="#00aa00" draw:textarea-horizontal-align="justify" draw:textarea-vertical-align="middle" draw:auto-grow-height="false" fo:min-height="0.039cm" fo:min-width="0cm" loext:decorative="false"/>
    </style:style>
    <style:style style:name="gr22" style:family="graphic" style:parent-style-name="standard">
      <style:graphic-properties svg:stroke-color="#ffaa00" draw:fill="solid" draw:fill-color="#ff9424" draw:textarea-horizontal-align="justify" draw:textarea-vertical-align="middle" draw:auto-grow-height="false" fo:min-height="0.039cm" fo:min-width="0cm" loext:decorative="false"/>
    </style:style>
    <style:style style:name="gr23" style:family="graphic" style:parent-style-name="standard">
      <style:graphic-properties svg:stroke-color="#aa0000" draw:fill="solid" draw:fill-color="#aa0000" draw:textarea-horizontal-align="justify" draw:textarea-vertical-align="middle" draw:auto-grow-height="false" fo:min-height="0.039cm" fo:min-width="0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11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8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11cm" loext:decorative="false"/>
      <style:paragraph-properties style:writing-mode="lr-tb"/>
    </style:style>
    <style:style style:name="gr28" style:family="graphic" style:parent-style-name="standard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1.605cm" fo:min-width="2.625cm" fo:padding-top="0.15cm" fo:padding-bottom="0.15cm" fo:padding-left="0.275cm" fo:padding-right="0.275cm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2.405cm" fo:min-width="3.76cm" fo:padding-top="0.15cm" fo:padding-bottom="0.15cm" fo:padding-left="0.275cm" fo:padding-right="0.275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2.11cm" fo:min-width="3.125cm" fo:padding-top="0.15cm" fo:padding-bottom="0.15cm" fo:padding-left="0.275cm" fo:padding-right="0.275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2.175cm" fo:min-width="4.865cm" fo:padding-top="0.15cm" fo:padding-bottom="0.15cm" fo:padding-left="0.275cm" fo:padding-right="0.275cm" style:writing-mode="lr-tb" loext:decorative="false"/>
      <style:paragraph-properties style:writing-mode="lr-tb"/>
    </style:style>
    <style:style style:name="gr32" style:family="graphic" style:parent-style-name="objectwithoutfill">
      <style:graphic-properties svg:stroke-width="0.051cm" svg:stroke-color="#000000" draw:marker-start-width="0.279cm" draw:marker-end="Arrowheads_20_6" draw:marker-end-width="0.279cm" draw:fill="none" draw:textarea-vertical-align="middle" fo:padding-top="0.15cm" fo:padding-bottom="0.15cm" fo:padding-left="0.275cm" fo:padding-right="0.27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845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loext:decorative="false"/>
      <style:paragraph-properties style:writing-mode="lr-tb"/>
    </style:style>
    <style:style style:name="gr35" style:family="graphic" style:parent-style-name="standard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0.74cm" fo:min-width="9.59cm" fo:padding-top="0.15cm" fo:padding-bottom="0.15cm" fo:padding-left="0.275cm" fo:padding-right="0.275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51cm" svg:stroke-color="#000000" draw:marker-start-width="0.279cm" draw:marker-end-width="0.279cm" draw:fill="solid" draw:fill-color="#55aa00" draw:textarea-horizontal-align="justify" draw:textarea-vertical-align="middle" draw:auto-grow-height="false" fo:min-height="0.74cm" fo:min-width="2.031cm" fo:padding-top="0.15cm" fo:padding-bottom="0.15cm" fo:padding-left="0.275cm" fo:padding-right="0.275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51cm" svg:stroke-color="#000000" draw:marker-start-width="0.279cm" draw:marker-end-width="0.279cm" draw:fill="solid" draw:fill-color="#55aa00" draw:textarea-horizontal-align="justify" draw:textarea-vertical-align="middle" draw:auto-grow-height="false" fo:min-height="0.74cm" fo:min-width="1.991cm" fo:padding-top="0.15cm" fo:padding-bottom="0.15cm" fo:padding-left="0.275cm" fo:padding-right="0.275cm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svg:stroke-width="0.051cm" svg:stroke-color="#000000" draw:marker-start-width="0.279cm" draw:marker-end-width="0.279cm" draw:fill="solid" draw:fill-color="#ff9424" draw:textarea-horizontal-align="justify" draw:textarea-vertical-align="middle" draw:auto-grow-height="false" fo:min-height="2.405cm" fo:min-width="3.76cm" fo:padding-top="0.15cm" fo:padding-bottom="0.15cm" fo:padding-left="0.275cm" fo:padding-right="0.275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51cm" svg:stroke-color="#000000" draw:marker-start-width="0.279cm" draw:marker-end-width="0.279cm" draw:fill="solid" draw:fill-color="#55aa00" draw:textarea-horizontal-align="justify" draw:textarea-vertical-align="middle" draw:auto-grow-height="false" fo:min-height="2.11cm" fo:min-width="3.125cm" fo:padding-top="0.15cm" fo:padding-bottom="0.15cm" fo:padding-left="0.275cm" fo:padding-right="0.275cm" style:writing-mode="lr-tb" loext:decorative="false"/>
      <style:paragraph-properties style:writing-mode="lr-tb"/>
    </style:style>
    <style:style style:name="gr40" style:family="graphic" style:parent-style-name="objectwithoutfill">
      <style:graphic-properties svg:stroke-width="0.051cm" svg:stroke-color="#000000" draw:marker-start-width="0.279cm" draw:marker-end="Arrowheads_20_9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41" style:family="graphic" style:parent-style-name="objectwithoutfill">
      <style:graphic-properties svg:stroke-width="0.051cm" svg:stroke-color="#000000" draw:marker-start-width="0.279cm" draw:marker-end="Arrowheads_20_10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42" style:family="graphic" style:parent-style-name="objectwithoutfill">
      <style:graphic-properties svg:stroke-width="0.051cm" svg:stroke-color="#000000" draw:marker-start-width="0.279cm" draw:marker-end="Arrowheads_20_11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43" style:family="graphic" style:parent-style-name="objectwithoutfill">
      <style:graphic-properties svg:stroke-width="0.051cm" svg:stroke-color="#000000" draw:marker-start-width="0.279cm" draw:marker-end="Arrowheads_20_12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44" style:family="graphic" style:parent-style-name="objectwithoutfill">
      <style:graphic-properties svg:stroke-width="0.051cm" svg:stroke-color="#000000" draw:marker-start-width="0.279cm" draw:marker-end="Arrowheads_20_13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45" style:family="graphic" style:parent-style-name="objectwithoutfill">
      <style:graphic-properties svg:stroke-width="0.051cm" svg:stroke-color="#000000" draw:marker-start-width="0.279cm" draw:marker-end="Arrowheads_20_14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46" style:family="graphic" style:parent-style-name="objectwithoutfill">
      <style:graphic-properties svg:stroke-width="0.051cm" svg:stroke-color="#000000" draw:marker-start-width="0.279cm" draw:marker-end="Arrowheads_20_15" draw:marker-end-width="0.279cm" draw:fill="none" draw:fill-color="#55aa00" draw:textarea-vertical-align="middle" fo:padding-top="0.15cm" fo:padding-bottom="0.15cm" fo:padding-left="0.275cm" fo:padding-right="0.275cm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loext:decorative="false"/>
      <style:paragraph-properties style:writing-mode="lr-tb"/>
    </style:style>
    <style:style style:name="gr48" style:family="graphic" style:parent-style-name="objectwithoutfill">
      <style:graphic-properties svg:stroke-width="0.051cm" svg:stroke-color="#ffffff" draw:marker-start-width="0.279cm" draw:marker-end="Arrowheads_20_8" draw:marker-end-width="0.279cm" draw:fill="none" draw:textarea-vertical-align="middle" fo:padding-top="0.15cm" fo:padding-bottom="0.15cm" fo:padding-left="0.275cm" fo:padding-right="0.275cm" loext:decorative="false"/>
    </style:style>
    <style:style style:name="gr49" style:family="graphic" style:parent-style-name="standard">
      <style:graphic-properties draw:stroke="none" draw:fill="none" fo:min-height="1.111cm" loext:decorative="false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title">
      <style:graphic-properties fo:min-height="6.39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Titel_20_und_20_Inhalt-title">
      <style:graphic-properties draw:textarea-horizontal-align="center" fo:min-height="3.672cm" loext:decorative="false"/>
      <style:paragraph-properties style:writing-mode="lr-tb"/>
    </style:style>
    <style:style style:name="pr8" style:family="presentation" style:parent-style-name="Titel_20_und_20_Inhalt-notes">
      <style:graphic-properties draw:fill-color="#ffffff" draw:auto-grow-height="false" fo:min-height="12.573cm" loext:decorative="false"/>
      <style:paragraph-properties style:writing-mode="lr-tb"/>
    </style:style>
    <style:style style:name="pr9" style:family="presentation" style:parent-style-name="Titelfoli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elfolie-notes">
      <style:graphic-properties draw:fill-color="#ffffff" draw:auto-grow-height="false" fo:min-height="12.573cm" loext:decorative="false"/>
      <style:paragraph-properties style:writing-mode="lr-tb"/>
    </style:style>
    <style:style style:name="pr11" style:family="presentation" style:parent-style-name="Titel_20_und_20_Inhalt-title">
      <style:graphic-properties fo:min-height="3.6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right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8" style:family="paragraph">
      <style:text-properties fo:color="#ff9424" loext:opacity="100%">
        <loext:char-complex-color loext:theme-type="light1" loext:color-type="theme"/>
      </style:text-properties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9424" loext:opacity="100%">
        <loext:char-complex-color loext:theme-type="light1" loext:color-type="theme"/>
      </style:text-properties>
    </style:style>
    <style:style style:name="P12" style:family="paragraph">
      <style:paragraph-properties fo:margin-left="0cm" fo:margin-right="0cm" fo:margin-top="0cm" fo:margin-bottom="0cm" fo:line-height="100%" fo:text-align="left" fo:text-indent="0cm"/>
    </style:style>
    <style:style style:name="P13" style:family="paragraph">
      <style:paragraph-properties fo:margin-left="0cm" fo:margin-right="0cm" fo:margin-top="0.42cm" fo:margin-bottom="0.35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/>
      <style:text-properties fo:color="#ffffff" loext:opacity="100%" style:font-name="Time New Roman" fo:font-size="18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left"/>
    </style:style>
    <style:style style:name="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/>
      <style:text-properties fo:font-size="18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loext:graphic-properties draw:fill="solid" draw:fill-color="#ff9424"/>
      <style:paragraph-properties fo:text-align="center" style:writing-mode="lr-tb"/>
    </style:style>
    <style:style style:name="P23" style:family="paragraph">
      <style:paragraph-properties fo:text-align="center"/>
      <style:text-properties style:font-name="Liberation Sans2"/>
    </style:style>
    <style:style style:name="P24" style:family="paragraph">
      <style:paragraph-properties fo:margin-top="0.42cm" fo:margin-bottom="0.35cm" fo:text-align="center"/>
      <style:text-properties style:font-name="Liberation Sans2"/>
    </style:style>
    <style:style style:name="P25" style:family="paragraph">
      <loext:graphic-properties draw:fill="solid" draw:fill-color="#ff9424"/>
      <style:paragraph-properties fo:text-align="center" style:writing-mode="lr-tb"/>
      <style:text-properties style:font-name="Liberation Sans2"/>
    </style:style>
    <style:style style:name="P26" style:family="paragraph">
      <style:paragraph-properties fo:text-align="center"/>
      <style:text-properties style:font-name="Liberation Sans2" fo:font-size="18pt" style:font-size-asian="18pt" style:font-size-complex="18pt"/>
    </style:style>
    <style:style style:name="P27" style:family="paragraph">
      <loext:graphic-properties draw:fill="solid" draw:fill-color="#ff9424"/>
      <style:paragraph-properties fo:text-align="center" style:writing-mode="lr-tb"/>
      <style:text-properties style:font-name="Liberation Sans2" fo:font-size="18pt" style:font-size-asian="18pt" style:font-size-complex="18pt"/>
    </style:style>
    <style:style style:name="P28" style:family="paragraph">
      <loext:graphic-properties draw:fill="none" draw:fill-color="#55aa00"/>
      <style:paragraph-properties fo:text-align="center"/>
    </style:style>
    <style:style style:name="P29" style:family="paragraph">
      <loext:graphic-properties draw:fill="none" draw:fill-color="#ffffff"/>
      <style:paragraph-properties fo:text-align="left"/>
      <style:text-properties fo:font-size="18pt" style:font-size-asian="18pt" style:font-size-complex="18pt"/>
    </style:style>
    <style:style style:name="P30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P31" style:family="paragraph">
      <loext:graphic-properties draw:fill="solid" draw:fill-color="#00aa00"/>
      <style:paragraph-properties fo:text-align="center"/>
    </style:style>
    <style:style style:name="P32" style:family="paragraph">
      <loext:graphic-properties draw:fill="solid" draw:fill-color="#ff9424"/>
      <style:paragraph-properties fo:text-align="center"/>
    </style:style>
    <style:style style:name="P33" style:family="paragraph">
      <loext:graphic-properties draw:fill="solid" draw:fill-color="#aa0000"/>
      <style:paragraph-properties fo:text-align="center"/>
    </style:style>
    <style:style style:name="P34" style:family="paragraph">
      <style:paragraph-properties fo:margin-left="0cm" fo:margin-right="0cm" fo:margin-top="0.42cm" fo:margin-bottom="0.35cm" fo:line-height="100%" fo:text-align="left" fo:text-indent="0cm"/>
    </style:style>
    <style:style style:name="P35" style:family="paragraph">
      <style:text-properties fo:color="#ff9424" loext:opacity="100%" fo:font-size="30pt" style:font-size-asian="30pt" style:font-size-complex="30pt">
        <loext:char-complex-color loext:theme-type="light1" loext:color-type="theme"/>
      </style:text-properties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solid" draw:fill-color="#ff9424"/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39" style:family="paragraph">
      <loext:graphic-properties draw:fill="solid" draw:fill-color="#55aa00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1" style:family="paragraph">
      <style:paragraph-properties fo:margin-top="0.42cm" fo:margin-bottom="0.35cm" fo:text-align="left"/>
      <style:text-properties fo:font-size="10pt" style:font-size-asian="10pt" style:font-size-complex="10pt"/>
    </style:style>
    <style:style style:name="P42" style:family="paragraph">
      <style:paragraph-properties fo:margin-top="0.42cm" fo:margin-bottom="0.35cm" fo:line-height="100%" fo:text-align="left"/>
      <style:text-properties fo:font-size="10pt" style:font-size-asian="10pt" style:font-size-complex="10pt"/>
    </style:style>
    <style:style style:name="T1" style:family="text">
      <style:text-properties fo:font-variant="normal" fo:text-transform="none" fo:color="#ff9424" loext:opacity="100%" style:text-outline="false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ff9424" loext:opacity="100%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Time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9424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>
        <loext:char-complex-color loext:theme-type="light1" loext:color-type="theme"/>
      </style:text-properties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text-position="sub 58%"/>
    </style:style>
    <style:style style:name="T12" style:family="text">
      <style:text-properties style:text-position="0% 100%"/>
    </style:style>
    <style:style style:name="T13" style:family="text">
      <style:text-properties style:font-name="DejaVu Sans" fo:font-size="12pt" style:font-name-asian="DejaVu Sans" style:font-size-asian="12pt" style:font-name-complex="DejaVu Sans" style:font-size-complex="12pt"/>
    </style:style>
    <style:style style:name="T14" style:family="text">
      <style:text-properties fo:font-size="18pt" fo:font-style="normal" style:font-size-asian="18pt" style:font-style-asian="normal" style:font-size-complex="18pt" style:font-style-complex="normal"/>
    </style:style>
    <style:style style:name="T15" style:family="text">
      <style:text-properties fo:font-variant="normal" fo:text-transform="none" fo:color="#ff9424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16" style:family="text">
      <style:text-properties style:font-name="Liberation Sans" style:font-name-asian="Liberation Sans" style:font-name-complex="Liberation Sans"/>
    </style:style>
    <style:style style:name="T17" style:family="text">
      <style:text-properties style:font-name="Liberation Sans2"/>
    </style:style>
    <style:style style:name="T18" style:family="text">
      <style:text-properties style:font-name="Liberation Sans2" fo:font-size="18pt" style:font-name-asian="Liberation Sans" style:font-size-asian="18pt" style:font-name-complex="Liberation Sans" style:font-size-complex="1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9424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style:text-underline-style="solid" style:text-underline-width="auto" style:text-underline-color="font-color" fo:font-weight="normal" fo:background-color="transparent" style:font-size-asian="30pt" style:font-style-asian="normal" style:font-weight-asian="normal" style:font-size-complex="30pt" style:font-style-complex="normal" style:font-weight-complex="normal">
        <loext:char-complex-color loext:theme-type="light1" loext:color-type="theme"/>
      </style:text-properties>
    </style:style>
    <style:style style:name="T22" style:family="text">
      <style:text-properties style:text-position="sub 58%" fo:font-size="14pt" style:font-size-asian="14pt" style:font-size-complex="14pt"/>
    </style:style>
    <style:style style:name="T23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1.8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1.8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Sitzung 8: &#10;Die Kluft zwischen Persönlichkeitsmaßen/Psychopatho" draw:style-name="dp1" draw:master-page-name="Default" presentation:presentation-page-layout-name="AL1T0" presentation:use-date-time-name="dtd1">
        <office:forms form:automatic-focus="false" form:apply-design-mode="false"/>
        <draw:frame draw:name="PlaceHolder 1" presentation:style-name="pr1" draw:text-style-name="P2" draw:layer="layout" svg:width="21.58cm" svg:height="6.622cm" svg:x="1.921cm" svg:y="4.775cm" presentation:class="title" presentation:user-transformed="true">
          <draw:text-box>
            <text:p text:style-name="P1"><text:span text:style-name="T1">Sitzung 10:</text:span><text:span text:style-name="T1"><text:line-break/></text:span><text:span text:style-name="T1">Machine Learning - Overfitting &amp; Generalisierbarkeit </text:span><text:span text:style-name="T2"><text:line-break/></text:span><text:span text:style-name="T1"> </text:span></text:p>
          </draw:text-box>
        </draw:frame>
        <draw:frame draw:name="PlaceHolder 2" presentation:style-name="pr2" draw:text-style-name="P4" draw:layer="layout" svg:width="19.04cm" svg:height="4.589cm" svg:x="3.191cm" svg:y="11.764cm" presentation:class="subtitle" presentation:user-transformed="true">
          <draw:text-box>
            <text:p text:style-name="P3"><text:span text:style-name="T3">Dr. Philipp Bierwirth</text:span></text:p>
            <text:p text:style-name="P3"><text:span text:style-name="T3">Differentielle Psychologie und <text:s/>Persönlichkeitsforschung</text:span></text:p>
            <text:p text:style-name="P3"><text:span text:style-name="T3">SoSe 2026</text:span></text:p>
            <text:p text:style-name="P3"><text:span text:style-name="T4"/></text:p>
          </draw:text-box>
        </draw:frame>
        <presentation:notes draw:style-name="dp2">
          <draw:page-thumbnail draw:name="PlaceHolder 1" draw:style-name="gr1" draw:layer="layout" svg:width="11.42cm" svg:height="8.563cm" svg:x="3.81cm" svg:y="3.175cm" draw:page-number="1" presentation:class="page"/>
          <draw:frame draw:name="PlaceHolder 2" presentation:style-name="pr3" draw:text-style-name="P5" draw:layer="layout" svg:width="15.23cm" svg:height="9.991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7" draw:layer="layout" svg:width="8.245cm" svg:height="1.264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1.58cm" svg:height="6.39cm" svg:x="1.921cm" svg:y="8.05cm" presentation:class="title" presentation:user-transformed="true">
          <draw:text-box>
            <text:p><text:span text:style-name="T6">Lerntagebuchabgabe</text:span><text:span text:style-name="T6"><text:line-break/></text:span><text:span text:style-name="T6"><text:line-break/></text:span><text:span text:style-name="T6">15.09.2026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3T11">
        <office:forms form:automatic-focus="false" form:apply-design-mode="false"/>
        <draw:frame presentation:style-name="pr7" draw:text-style-name="P11" draw:layer="layout" svg:width="21.899cm" svg:height="3.672cm" svg:x="1.744cm" svg:y="2.596cm" presentation:class="title">
          <draw:text-box>
            <text:p text:style-name="P10"><text:span text:style-name="T6">Inhalt</text:span></text:p>
          </draw:text-box>
        </draw:frame>
        <draw:frame draw:style-name="gr2" draw:text-style-name="P14" draw:layer="layout" svg:width="21.591cm" svg:height="12.687cm" svg:x="2.54cm" svg:y="6.203cm">
          <draw:text-box>
            <text:list text:style-name="L4">
              <text:list-item>
                <text:p text:style-name="P12"><text:span text:style-name="T7"><text:s/>Rückblick</text:span></text:p>
                <text:p text:style-name="P12"><text:span text:style-name="T7"/></text:p>
              </text:list-item>
              <text:list-item>
                <text:p text:style-name="P12"><text:span text:style-name="T7"><text:s/>Wie lernen Algorithmen</text:span></text:p>
                <text:p text:style-name="P12"><text:span text:style-name="T7"/></text:p>
              </text:list-item>
              <text:list-item>
                <text:p text:style-name="P12"><text:span text:style-name="T8">Overfitting und Generalisierbarkeit</text:span></text:p>
                <text:p text:style-name="P12"><text:span text:style-name="T8"/></text:p>
              </text:list-item>
              <text:list-item>
                <text:p text:style-name="P13"><text:span text:style-name="T8">Train-Test-Split und Kreuzvalidierung</text:span></text:p>
              </text:list-item>
            </text:list>
            <text:p text:style-name="P12"><text:span text:style-name="T8"/></text:p>
            <text:list text:continue-numbering="true" text:style-name="L4">
              <text:list-item>
                <text:p text:style-name="P12"><text:span text:style-name="T8">Praktische Übung</text:span></text:p>
                <text:p text:style-name="P12"><text:span text:style-name="T8"/></text:p>
              </text:list-item>
            </text:list>
            <text:p text:style-name="P13"><text:span text:style-name="T8"/></text:p>
            <text:p text:style-name="P13"><text:span text:style-name="T8"/></text:p>
            <text:list text:style-name="L5">
              <text:list-header>
                <text:p text:style-name="P13"><text:span text:style-name="T7"/></text:p>
              </text:list-header>
            </text:list>
          </draw:text-box>
        </draw:frame>
        <presentation:notes draw:style-name="dp4">
          <draw:page-thumbnail draw:style-name="gr1" draw:layer="layout" svg:width="0.001cm" svg:height="0.001cm" svg:x="0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elfolie" presentation:presentation-page-layout-name="AL4T19">
        <office:forms form:automatic-focus="false" form:apply-design-mode="false"/>
        <draw:frame draw:name="PlaceHolder 11" presentation:style-name="pr9" draw:text-style-name="P2" draw:layer="layout" svg:width="21.905cm" svg:height="3.679cm" svg:x="1.978cm" svg:y="6.603cm" presentation:class="title" presentation:user-transformed="true">
          <draw:text-box>
            <text:p text:style-name="P1"><text:span text:style-name="T9">1. Rückblick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4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3T11">
        <office:forms form:automatic-focus="false" form:apply-design-mode="false"/>
        <draw:frame presentation:style-name="pr11" draw:layer="layout" svg:width="21.899cm" svg:height="3.672cm" svg:x="1.745cm" svg:y="2.596cm" presentation:class="title" presentation:user-transformed="true">
          <draw:text-box>
            <text:p text:style-name="P1"><text:span text:style-name="T9">Kombination von Merkmalen</text:span></text:p>
          </draw:text-box>
        </draw:frame>
        <draw:frame draw:style-name="gr3" draw:text-style-name="P15" draw:layer="layout" svg:width="10.159cm" svg:height="10.159cm" svg:x="0.036cm" svg:y="8.615cm">
          <draw:image xlink:href="Pictures/1000000100000960000009601691CC6D.png" xlink:type="simple" xlink:show="embed" xlink:actuate="onLoad" draw:mime-type="image/png">
            <text:p/>
          </draw:image>
        </draw:frame>
        <draw:line draw:style-name="gr4" draw:text-style-name="P15" draw:layer="layout" svg:x1="3.145cm" svg:y1="15.97cm" svg:x2="6.921cm" svg:y2="12.357cm">
          <text:p/>
        </draw:line>
        <draw:frame draw:style-name="gr5" draw:text-style-name="P17" draw:layer="layout" svg:width="21.59cm" svg:height="5.246cm" svg:x="1.905cm" svg:y="5.315cm">
          <draw:text-box>
            <text:p text:style-name="P10"><text:span text:style-name="T10">Linearer Klassifikator findet Ebene (im 2d-Fall eine Linie), welche die Gruppen optimal trennt. z.B.:</text:span></text:p>
            <text:p text:style-name="P10"><text:span text:style-name="T10"/></text:p>
            <text:list text:style-name="L2">
              <text:list-item>
                <text:p text:style-name="P16"><text:span text:style-name="T10">Logistische Regression</text:span></text:p>
              </text:list-item>
              <text:list-item>
                <text:p text:style-name="P16"><text:span text:style-name="T10">Support Vektor Maschine</text:span></text:p>
                <text:p text:style-name="P16"><text:span text:style-name="T10"/></text:p>
              </text:list-item>
            </text:list>
          </draw:text-box>
        </draw:frame>
        <draw:frame draw:style-name="gr6" draw:text-style-name="P18" draw:layer="layout" svg:width="8.89cm" svg:height="2.471cm" svg:x="10.04cm" svg:y="6.885cm">
          <draw:text-box>
            <text:list text:style-name="L2">
              <text:list-item>
                <text:p><text:span text:style-name="T10">Neuronales Netzwerk</text:span></text:p>
              </text:list-item>
              <text:list-item>
                <text:p><text:span text:style-name="T10">Lineare Diskriminanzanalyse</text:span></text:p>
              </text:list-item>
              <text:list-item>
                <text:p><text:span text:style-name="T10">etc.</text:span></text:p>
              </text:list-item>
            </text:list>
          </draw:text-box>
        </draw:frame>
        <draw:frame draw:style-name="gr3" draw:text-style-name="P15" draw:layer="layout" svg:width="10.159cm" svg:height="10.159cm" svg:x="15.106cm" svg:y="8.256cm">
          <draw:image xlink:href="Pictures/100000010000096000000960C1E74EFB.png" xlink:type="simple" xlink:show="embed" xlink:actuate="onLoad" draw:mime-type="image/png">
            <text:p/>
          </draw:image>
        </draw:frame>
        <draw:line draw:style-name="gr7" draw:text-style-name="P15" draw:layer="layout" svg:x1="9.525cm" svg:y1="15.34cm" svg:x2="15.875cm" svg:y2="15.34cm">
          <text:p/>
        </draw:line>
        <draw:frame draw:style-name="gr8" draw:text-style-name="P10" draw:layer="layout" svg:width="3.213cm" svg:height="0.53cm" svg:x="11.257cm" svg:y="14.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9" draw:layer="layout" svg:width="1.905cm" svg:height="1.27cm" svg:x="6.985cm" svg:y="17.445cm">
          <draw:text-box>
            <text:p>(x<text:span text:style-name="T11">1</text:span><text:span text:style-name="T12">)</text:span></text:p>
          </draw:text-box>
        </draw:frame>
        <draw:frame draw:style-name="gr9" draw:text-style-name="P19" draw:layer="layout" svg:width="1.905cm" svg:height="1.27cm" draw:transform="rotate (1.55526289645215) translate (0.264cm 12.264cm)">
          <draw:text-box>
            <text:p>(x<text:span text:style-name="T11">2</text:span><text:span text:style-name="T12">)</text:span></text:p>
          </draw:text-box>
        </draw:frame>
        <draw:frame draw:style-name="gr6" draw:text-style-name="P18" draw:layer="layout" svg:width="8.89cm" svg:height="2.471cm" svg:x="9.925cm" svg:y="15.675cm">
          <draw:text-box>
            <text:list text:style-name="L2">
              <text:list-item>
                <text:p><text:span text:style-name="T13">x = Merkmale</text:span></text:p>
              </text:list-item>
              <text:list-item>
                <text:p><text:span text:style-name="T13">β = Classifier-Gewichte</text:span></text:p>
              </text:list-item>
            </text:list>
          </draw:text-box>
        </draw:frame>
        <draw:frame draw:style-name="gr10" draw:text-style-name="P20" draw:layer="layout" svg:width="2.54cm" svg:height="1.673cm" svg:x="19.45cm" svg:y="11.43cm">
          <draw:text-box>
            <text:p text:style-name="P12"><text:span text:style-name="T14">d~7</text:span></text:p>
            <text:p text:style-name="P12"><text:span text:style-name="T14"/></text:p>
          </draw:text-box>
        </draw:frame>
        <draw:frame draw:style-name="gr11" draw:text-style-name="P20" draw:layer="layout" svg:width="4.445cm" svg:height="2.384cm" svg:x="19.05cm" svg:y="12.268cm">
          <draw:text-box>
            <text:p text:style-name="P12"><text:span text:style-name="T14">AUC = 1</text:span></text:p>
            <text:p text:style-name="P12"><text:span text:style-name="T14"/></text:p>
          </draw:text-box>
        </draw:frame>
        <presentation:notes draw:style-name="dp4">
          <draw:page-thumbnail draw:style-name="gr1" draw:layer="layout" svg:width="0.001cm" svg:height="0.001cm" svg:x="0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elfolie" presentation:presentation-page-layout-name="AL4T19">
        <office:forms form:automatic-focus="false" form:apply-design-mode="false"/>
        <draw:frame draw:name="PlaceHolder 4" presentation:style-name="pr9" draw:text-style-name="P2" draw:layer="layout" svg:width="21.905cm" svg:height="3.679cm" svg:x="1.978cm" svg:y="6.603cm" presentation:class="title" presentation:user-transformed="true">
          <draw:text-box>
            <text:p text:style-name="P1"><text:span text:style-name="T9">2. Wie lernen Algorithmen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6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3T11">
        <office:forms form:automatic-focus="false" form:apply-design-mode="false"/>
        <draw:frame presentation:style-name="pr11" draw:text-style-name="P21" draw:layer="layout" svg:width="21.899cm" svg:height="3.672cm" svg:x="1.745cm" svg:y="1.796cm" presentation:class="title" presentation:user-transformed="true">
          <draw:text-box>
            <text:p text:style-name="P1"><text:span text:style-name="T15">Wie lernen Algorithmen?</text:span></text:p>
          </draw:text-box>
        </draw:frame>
        <draw:custom-shape draw:style-name="gr12" draw:text-style-name="P22" draw:layer="layout" svg:width="5.942cm" svg:height="1.905cm" svg:x="1.905cm" svg:y="11.21cm">
          <text:p text:style-name="P10">Startparameter <text:span text:style-name="T16">θ</text:span></text:p>
          <draw:enhanced-geometry svg:viewBox="0 0 21600 21600" draw:type="rectangle" draw:enhanced-path="M 0 0 L 21600 0 21600 21600 0 21600 0 0 Z N"/>
        </draw:custom-shape>
        <draw:custom-shape draw:style-name="gr12" draw:text-style-name="P25" xml:id="id1" draw:id="id1" draw:layer="layout" svg:width="5.942cm" svg:height="1.905cm" svg:x="10.568cm" svg:y="7.4cm">
          <text:p text:style-name="P23"><text:span text:style-name="T17">Vorhersage Wert </text:span></text:p>
          <text:p text:style-name="P24"><text:span text:style-name="T18">ŷ = f(θ)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3.527cm" svg:height="1.763cm" svg:x="10.592cm" svg:y="12.84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3" draw:text-style-name="P25" xml:id="id2" draw:id="id2" draw:layer="layout" svg:width="6.985cm" svg:height="3.81cm" svg:x="16.51cm" svg:y="10.795cm">
          <text:p text:style-name="P23"><text:span text:style-name="T17">Berechnung Fehler: </text:span></text:p>
          <text:p text:style-name="P23"><text:span text:style-name="T17">Vorhergesagter vs beobachteter Wert y</text:span></text:p>
          <text:p text:style-name="P24"><text:span text:style-name="T18">error ~ |ŷ – y|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7" xml:id="id3" draw:id="id3" draw:layer="layout" svg:width="6.985cm" svg:height="2.54cm" svg:x="10.16cm" svg:y="15.875cm">
          <text:p text:style-name="P26"><text:span text:style-name="T18">Parameter updaten, um Fehler zu minimie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8" draw:layer="layout" svg:x1="5.08cm" svg:y1="11.21cm" svg:x2="10.568cm" svg:y2="8.255cm">
          <text:p/>
        </draw:line>
        <draw:connector draw:style-name="gr16" draw:text-style-name="P28" draw:layer="layout" draw:type="curve" svg:x1="16.51cm" svg:y1="8.352cm" svg:x2="20.002cm" svg:y2="10.795cm" draw:start-shape="id1" draw:start-glue-point="1" draw:end-shape="id2" svg:d="M16510 8352c2328 0 3492 814 3492 2443" svg:viewBox="0 0 3493 2444">
          <text:p/>
        </draw:connector>
        <draw:connector draw:style-name="gr17" draw:text-style-name="P28" draw:layer="layout" draw:type="curve" svg:x1="20.002cm" svg:y1="14.605cm" svg:x2="17.145cm" svg:y2="17.145cm" draw:start-shape="id2" draw:start-glue-point="2" draw:end-shape="id3" draw:end-glue-point="1" svg:d="M20002 14605c0 1694-952 2540-2857 2540" svg:viewBox="0 0 2858 2541">
          <text:p/>
        </draw:connector>
        <draw:connector draw:style-name="gr18" draw:text-style-name="P28" draw:layer="layout" draw:type="line" svg:x1="13.652cm" svg:y1="15.875cm" svg:x2="13.539cm" svg:y2="9.305cm" draw:start-shape="id3" draw:start-glue-point="0" draw:end-shape="id1" svg:d="M13652 15875l-113-6570" svg:viewBox="0 0 114 6571">
          <text:p/>
        </draw:connector>
        <draw:frame draw:style-name="gr19" draw:text-style-name="P29" draw:layer="layout" svg:width="21.59cm" svg:height="3.375cm" svg:x="1.745cm" svg:y="4.816cm">
          <draw:text-box>
            <text:list text:style-name="L2">
              <text:list-item>
                <text:p text:style-name="P16"><text:span text:style-name="T19">Konzeptionelle Darstellung wie “Maschinen” lernen</text:span></text:p>
                <text:p text:style-name="P16"><text:span text:style-name="T19"/>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3T11">
        <office:forms form:automatic-focus="false" form:apply-design-mode="false"/>
        <draw:frame draw:style-name="gr3" draw:text-style-name="P15" draw:layer="layout" svg:width="10.159cm" svg:height="10.159cm" svg:x="1.071cm" svg:y="8.856cm">
          <draw:image xlink:href="Pictures/100000010000096000000960B95B5639.png" xlink:type="simple" xlink:show="embed" xlink:actuate="onLoad" draw:mime-type="image/png">
            <text:p/>
          </draw:image>
        </draw:frame>
        <draw:frame presentation:style-name="pr11" draw:text-style-name="P21" draw:layer="layout" svg:width="21.899cm" svg:height="3.672cm" svg:x="1.745cm" svg:y="1.796cm" presentation:class="title" presentation:user-transformed="true">
          <draw:text-box>
            <text:p text:style-name="P1"><text:span text:style-name="T15">Wie lernen Algorithmen?</text:span></text:p>
          </draw:text-box>
        </draw:frame>
        <draw:frame draw:style-name="gr8" draw:text-style-name="P10" draw:layer="layout" svg:width="3.213cm" svg:height="0.53cm" svg:x="11.195cm" svg:y="8.0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" draw:text-style-name="P30" draw:layer="layout" svg:width="21.59cm" svg:height="3.375cm" svg:x="1.745cm" svg:y="4.215cm">
          <draw:text-box>
            <text:list text:style-name="L2">
              <text:list-item>
                <text:p text:style-name="P16"><text:span text:style-name="T10">Algorithmen lernen die Parameter, welche die geringsten Fehler/Kosten verursachen</text:span></text:p>
              </text:list-item>
            </text:list>
            <text:p text:style-name="P16"><text:span text:style-name="T10"/></text:p>
            <text:list text:continue-numbering="true" text:style-name="L2">
              <text:list-item>
                <text:p text:style-name="P12"><text:span text:style-name="T20">Wanderung entlang der Fehlerfunktion/Kostenfunktion, um Tal <text:s/>zu finden </text:span><text:span text:style-name="T10">(geringster Fehler für Parameter)</text:span></text:p>
              </text:list-item>
            </text:list>
          </draw:text-box>
        </draw:frame>
        <draw:custom-shape draw:style-name="gr20" draw:text-style-name="P15" draw:layer="layout" svg:width="1.27cm" svg:height="1.27cm" svg:x="19.188cm" svg:y="16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5" draw:layer="layout" svg:width="10.159cm" svg:height="10.159cm" svg:x="14.464cm" svg:y="8.949cm">
          <draw:image xlink:href="Pictures/1000000100000960000009601CEB6768.png" xlink:type="simple" xlink:show="embed" xlink:actuate="onLoad" draw:mime-type="image/png">
            <text:p/>
          </draw:image>
        </draw:frame>
        <draw:custom-shape draw:style-name="gr21" draw:text-style-name="P31" draw:layer="layout" svg:width="0.411cm" svg:height="0.409cm" svg:x="20.33cm" svg:y="16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2" draw:layer="layout" svg:width="0.411cm" svg:height="0.409cm" svg:x="16.546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3" draw:layer="layout" svg:width="0.411cm" svg:height="0.409cm" svg:x="23.359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layout" svg:width="8.255cm" svg:height="1.361cm" svg:x="8.825cm" svg:y="6.655cm">
          <draw:text-box>
            <text:p text:style-name="P10"><text:span text:style-name="T10">Beispiel Lineares Modell (z.B. Logistische Regression):</text:span></text:p>
          </draw:text-box>
        </draw:frame>
        <draw:frame draw:style-name="gr24" draw:text-style-name="P17" draw:layer="layout" svg:width="9.383cm" svg:height="1.361cm" svg:x="15.24cm" svg:y="8.564cm">
          <draw:text-box>
            <text:p text:style-name="P10"><text:span text:style-name="T10">Fehlerfunktion (für einen Parameter)</text:span></text:p>
          </draw:text-box>
        </draw:frame>
        <draw:frame draw:style-name="gr25" draw:text-style-name="P17" draw:layer="layout" svg:width="8.255cm" svg:height="1.035cm" svg:x="2.275cm" svg:y="8.49cm">
          <draw:text-box>
            <text:p text:style-name="P10"><text:span text:style-name="T10">Daten mit Entscheidungsfunktion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3T11">
        <office:forms form:automatic-focus="false" form:apply-design-mode="false"/>
        <draw:frame presentation:style-name="pr11" draw:text-style-name="P21" draw:layer="layout" svg:width="21.899cm" svg:height="3.672cm" svg:x="1.746cm" svg:y="1.796cm" presentation:class="title" presentation:user-transformed="true">
          <draw:text-box>
            <text:p text:style-name="P1"><text:span text:style-name="T15">Wie lernen Algorithmen?</text:span></text:p>
          </draw:text-box>
        </draw:frame>
        <draw:frame draw:style-name="gr3" draw:text-style-name="P15" draw:layer="layout" svg:width="10.159cm" svg:height="10.159cm" svg:x="1.736cm" svg:y="8.82cm">
          <draw:image xlink:href="Pictures/100000010000096000000960DE1E363A.png" xlink:type="simple" xlink:show="embed" xlink:actuate="onLoad" draw:mime-type="image/png">
            <text:p/>
          </draw:image>
        </draw:frame>
        <draw:frame draw:style-name="gr3" draw:text-style-name="P15" draw:layer="layout" svg:width="10.159cm" svg:height="10.159cm" svg:x="13.736cm" svg:y="8.886cm">
          <draw:image xlink:href="Pictures/1000000100000960000009602C0BB6AB.png" xlink:type="simple" xlink:show="embed" xlink:actuate="onLoad" draw:mime-type="image/png">
            <text:p/>
          </draw:image>
        </draw:frame>
        <draw:frame draw:style-name="gr26" draw:text-style-name="P30" draw:layer="layout" svg:width="21.59cm" svg:height="3.446cm" svg:x="1.745cm" svg:y="4.816cm">
          <draw:text-box>
            <text:list text:style-name="L2">
              <text:list-item>
                <text:p text:style-name="P16"><text:span text:style-name="T10">Bestimmte Algorithmen können auch nicht-lineare Entscheidungsfunktionen verwenden, um Daten zu klassifizieren</text:span></text:p>
              </text:list-item>
            </text:list>
            <text:p text:style-name="P16"><text:span text:style-name="T10"/></text:p>
            <text:list text:continue-numbering="true" text:style-name="L2">
              <text:list-item>
                <text:p text:style-name="P34"><text:span text:style-name="T10">z.B. Support-Vektor-Maschinen (mit RBF-Kernel), neuronale Netzwerke, k-Nearest-Neighbor etc.</text:span>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elfolie" presentation:presentation-page-layout-name="AL4T19">
        <office:forms form:automatic-focus="false" form:apply-design-mode="false"/>
        <draw:frame draw:name="PlaceHolder 5" presentation:style-name="pr9" draw:text-style-name="P2" draw:layer="layout" svg:width="21.905cm" svg:height="3.679cm" svg:x="1.978cm" svg:y="6.603cm" presentation:class="title" presentation:user-transformed="true">
          <draw:text-box>
            <text:p text:style-name="P1"><text:span text:style-name="T9">3. Overfitting &amp; Generalisierbarkeit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10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3T11">
        <office:forms form:automatic-focus="false" form:apply-design-mode="false"/>
        <draw:frame presentation:style-name="pr11" draw:text-style-name="P21" draw:layer="layout" svg:width="21.899cm" svg:height="3.672cm" svg:x="1.746cm" svg:y="1.796cm" presentation:class="title" presentation:user-transformed="true">
          <draw:text-box>
            <text:p text:style-name="P1"><text:span text:style-name="T15">Overfitting und Generalisierbarkeit</text:span></text:p>
          </draw:text-box>
        </draw:frame>
        <draw:frame draw:style-name="gr27" draw:text-style-name="P30" draw:layer="layout" svg:width="21.59cm" svg:height="5.461cm" svg:x="1.745cm" svg:y="4.416cm">
          <draw:text-box>
            <text:list text:style-name="L2">
              <text:list-item>
                <text:p text:style-name="P16"><text:span text:style-name="T10">Mehr Flexibilität in den Modellen, führt aber auch dazu, dass evtl. zufälliges Rauschen in den Daten gelernt wird. Das Modell “overfitted” und generalisiert dadurch nicht mehr auf Daten/Beobachtungen, die das Modell noch nicht kennt.</text:span></text:p>
              </text:list-item>
              <text:list-item>
                <text:p text:style-name="P16"><text:span text:style-name="T10">Beispiel: Ein hochflexibler k-Nearest-Neighbor Algorithmus lernt Modell (links), das alle Beobachtungen korrekt klassifiziert. Wird das Modell mit neuen Daten konfrontiert, fällt die Leistung auf Ratewahrscheinlichkeit zurück (rechts)</text:span></text:p>
              </text:list-item>
            </text:list>
            <text:p text:style-name="P16"><text:span text:style-name="T10"/></text:p>
          </draw:text-box>
        </draw:frame>
        <draw:frame draw:style-name="gr3" draw:text-style-name="P15" draw:layer="layout" svg:width="10.159cm" svg:height="10.159cm" svg:x="1.545cm" svg:y="9.056cm">
          <draw:image xlink:href="Pictures/100000010000096000000960FC190EA6.png" xlink:type="simple" xlink:show="embed" xlink:actuate="onLoad" draw:mime-type="image/png">
            <text:p/>
          </draw:image>
        </draw:frame>
        <draw:frame draw:style-name="gr3" draw:text-style-name="P15" draw:layer="layout" svg:width="10.159cm" svg:height="10.159cm" svg:x="13.576cm" svg:y="8.955cm">
          <draw:image xlink:href="Pictures/10000001000009600000096030A54F6A.png" xlink:type="simple" xlink:show="embed" xlink:actuate="onLoad" draw:mime-type="image/png">
            <text:p/>
          </draw:image>
        </draw:frame>
        <draw:frame draw:style-name="gr25" draw:text-style-name="P17" draw:layer="layout" svg:width="8.255cm" svg:height="1.035cm" svg:x="3.175cm" svg:y="8.49cm">
          <draw:text-box>
            <text:p text:style-name="P10"><text:span text:style-name="T10">Daten, mit denen gelernt wurde</text:span></text:p>
          </draw:text-box>
        </draw:frame>
        <draw:frame draw:style-name="gr25" draw:text-style-name="P17" draw:layer="layout" svg:width="8.255cm" svg:height="1.035cm" svg:x="15.276cm" svg:y="8.491cm">
          <draw:text-box>
            <text:p text:style-name="P10"><text:span text:style-name="T10">Neue, unbekannte Daten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elfolie" presentation:presentation-page-layout-name="AL4T19">
        <office:forms form:automatic-focus="false" form:apply-design-mode="false"/>
        <draw:frame draw:name="PlaceHolder 6" presentation:style-name="pr9" draw:text-style-name="P2" draw:layer="layout" svg:width="21.905cm" svg:height="3.679cm" svg:x="1.978cm" svg:y="6.603cm" presentation:class="title" presentation:user-transformed="true">
          <draw:text-box>
            <text:p text:style-name="P1"><text:span text:style-name="T9">4. Train-Test-Split und Kreuzvalidierung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12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3T11">
        <office:forms form:automatic-focus="false" form:apply-design-mode="false"/>
        <draw:frame presentation:style-name="pr11" draw:text-style-name="P35" draw:layer="layout" svg:width="21.899cm" svg:height="3.672cm" svg:x="1.746cm" svg:y="1.796cm" presentation:class="title" presentation:user-transformed="true">
          <draw:text-box>
            <text:p text:style-name="P13"><text:span text:style-name="T21">Train-Test-Split</text:span><text:span text:style-name="T9"> und Kreuzvalidierung</text:span></text:p>
          </draw:text-box>
        </draw:frame>
        <draw:custom-shape draw:style-name="gr28" draw:text-style-name="P22" xml:id="id7" draw:id="id7" draw:layer="layout" svg:width="3.175cm" svg:height="1.905cm" svg:x="1.675cm" svg:y="11.025cm">
          <text:p text:style-name="P10">N=200</text:p>
          <draw:enhanced-geometry svg:viewBox="0 0 21600 21600" draw:type="rectangle" draw:enhanced-path="M 0 0 L 21600 0 21600 21600 0 21600 0 0 Z N"/>
        </draw:custom-shape>
        <draw:custom-shape draw:style-name="gr29" draw:text-style-name="P37" xml:id="id4" draw:id="id4" draw:layer="layout" svg:width="4.31cm" svg:height="2.705cm" svg:x="5.985cm" svg:y="6.615cm">
          <text:p text:style-name="P36">Trainings-Daten</text:p>
          <text:p text:style-name="P36">N=150</text:p>
          <draw:enhanced-geometry svg:viewBox="0 0 21600 21600" draw:type="rectangle" draw:enhanced-path="M 0 0 L 21600 0 21600 21600 0 21600 0 0 Z N"/>
        </draw:custom-shape>
        <draw:custom-shape draw:style-name="gr30" draw:text-style-name="P22" xml:id="id6" draw:id="id6" draw:layer="layout" svg:width="3.675cm" svg:height="2.41cm" svg:x="6.62cm" svg:y="13.73cm">
          <text:p text:style-name="P10">Test-Daten</text:p>
          <text:p text:style-name="P10">N=50</text:p>
          <draw:enhanced-geometry svg:viewBox="0 0 21600 21600" draw:type="rectangle" draw:enhanced-path="M 0 0 L 21600 0 21600 21600 0 21600 0 0 Z N"/>
        </draw:custom-shape>
        <draw:custom-shape draw:style-name="gr31" draw:text-style-name="P22" xml:id="id5" draw:id="id5" draw:layer="layout" svg:width="5.415cm" svg:height="2.475cm" svg:x="10.86cm" svg:y="10.225cm">
          <text:p text:style-name="P10">Modellgewichte lernen</text:p>
          <draw:enhanced-geometry svg:viewBox="0 0 21600 21600" draw:type="rectangle" draw:enhanced-path="M 0 0 L 21600 0 21600 21600 0 21600 0 0 Z N"/>
        </draw:custom-shape>
        <draw:connector draw:style-name="gr32" draw:text-style-name="P15" draw:layer="layout" draw:type="curve" svg:x1="10.295cm" svg:y1="7.967cm" svg:x2="13.567cm" svg:y2="10.225cm" draw:start-shape="id4" draw:start-glue-point="1" draw:end-shape="id5" draw:end-glue-point="0" svg:d="M10295 7967c2182 0 3272 752 3272 2258" svg:viewBox="0 0 3273 2259">
          <text:p/>
        </draw:connector>
        <draw:connector draw:style-name="gr32" draw:text-style-name="P15" draw:layer="layout" draw:type="curve" svg:x1="13.567cm" svg:y1="12.7cm" svg:x2="10.295cm" svg:y2="14.935cm" draw:start-shape="id5" draw:start-glue-point="2" draw:end-shape="id6" draw:end-glue-point="1" svg:d="M13567 12700c0 1490-1090 2235-3272 2235" svg:viewBox="0 0 3273 2236">
          <text:p/>
        </draw:connector>
        <draw:connector draw:style-name="gr32" draw:text-style-name="P15" draw:layer="layout" draw:type="curve" svg:x1="3.262cm" svg:y1="11.025cm" svg:x2="5.985cm" svg:y2="7.967cm" draw:start-shape="id7" draw:start-glue-point="0" draw:end-shape="id4" draw:end-glue-point="3" svg:d="M3262 11025c0-2039 907-3058 2723-3058" svg:viewBox="0 0 2724 3059">
          <text:p/>
        </draw:connector>
        <draw:frame draw:style-name="gr33" draw:text-style-name="P38" draw:layer="layout" svg:width="9.025cm" svg:height="3.095cm" svg:x="16.175cm" svg:y="10.195cm">
          <draw:text-box>
            <text:p text:style-name="P10"><text:span text:style-name="T19">Modellgewichte werden an Trainingsdaten optimiert, indem Fehler minimiert werden</text:span></text:p>
          </draw:text-box>
        </draw:frame>
        <draw:frame draw:style-name="gr34" draw:text-style-name="P38" draw:layer="layout" svg:width="8.255cm" svg:height="1.673cm" svg:x="4.415cm" svg:y="4.789cm">
          <draw:text-box>
            <text:p text:style-name="P10"><text:span text:style-name="T19">Daten werden in Trainings- und Testdaten gesplitted</text:span></text:p>
          </draw:text-box>
        </draw:frame>
        <draw:frame draw:style-name="gr33" draw:text-style-name="P38" draw:layer="layout" svg:width="16.51cm" svg:height="3.095cm" svg:x="0.57cm" svg:y="16.61cm">
          <draw:text-box>
            <text:p text:style-name="P10"><text:span text:style-name="T19">Modellgewichte werden an Testdaten, die das Modell bislang noch nicht gesehen hat, validiert (Berechnung der Akkuratheit, AUC etc.)</text:span></text:p>
          </draw:text-box>
        </draw:frame>
        <draw:frame draw:style-name="gr33" draw:text-style-name="P38" draw:layer="layout" svg:width="9.025cm" svg:height="3.095cm" draw:transform="rotate (-0.235270383168835) translate (16.425cm 4.641cm)">
          <draw:text-box>
            <text:p text:style-name="P10"><text:span text:style-name="T19">Train-Test-Split wichtig, um Overfitting zu vermeiden und Generalisierbarkeit des Modells zu überprüfen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3T11">
        <office:forms form:automatic-focus="false" form:apply-design-mode="false"/>
        <draw:custom-shape draw:style-name="gr35" draw:text-style-name="P22" xml:id="id10" draw:id="id10" draw:layer="layout" svg:width="10.14cm" svg:height="1.04cm" svg:x="0.621cm" svg:y="9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2" xml:id="id11" draw:id="id11" draw:layer="layout" svg:width="10.14cm" svg:height="1.04cm" svg:x="0.621cm" svg:y="10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2" xml:id="id12" draw:id="id12" draw:layer="layout" svg:width="10.14cm" svg:height="1.04cm" svg:x="0.621cm" svg:y="12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2" draw:layer="layout" svg:width="10.14cm" svg:height="1.04cm" svg:x="0.621cm" svg:y="7.725cm">
          <text:p text:style-name="P10">N=150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1" draw:text-style-name="P35" draw:layer="layout" svg:width="21.899cm" svg:height="3.672cm" svg:x="1.746cm" svg:y="1.796cm" presentation:class="title" presentation:user-transformed="true">
          <draw:text-box>
            <text:p text:style-name="P13"><text:span text:style-name="T9">Train-Test-Split und </text:span><text:span text:style-name="T21">Kreuzvalidierung</text:span></text:p>
          </draw:text-box>
        </draw:frame>
        <draw:custom-shape draw:style-name="gr36" draw:text-style-name="P39" draw:layer="layout" svg:width="2.581cm" svg:height="1.04cm" svg:x="5.68cm" svg:y="9.325cm">
          <text:p text:style-name="P10">N=5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9" xml:id="id8" draw:id="id8" draw:layer="layout" svg:width="2.541cm" svg:height="1.04cm" svg:x="8.22cm" svg:y="7.725cm">
          <text:p text:style-name="P10">N=5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9" draw:layer="layout" svg:width="2.541cm" svg:height="1.04cm" svg:x="3.22cm" svg:y="10.825cm">
          <text:p text:style-name="P10">N=5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9" draw:layer="layout" svg:width="2.541cm" svg:height="1.04cm" svg:x="0.62cm" svg:y="12.525cm">
          <text:p text:style-name="P10">N=5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7" xml:id="id9" draw:id="id9" draw:layer="layout" svg:width="4.31cm" svg:height="2.705cm" svg:x="13.84cm" svg:y="5.785cm">
          <text:p text:style-name="P36">Trainings-Daten</text:p>
          <text:p text:style-name="P36">N=150</text:p>
          <draw:enhanced-geometry svg:viewBox="0 0 21600 21600" draw:type="rectangle" draw:enhanced-path="M 0 0 L 21600 0 21600 21600 0 21600 0 0 Z N"/>
        </draw:custom-shape>
        <draw:custom-shape draw:style-name="gr39" draw:text-style-name="P39" xml:id="id14" draw:id="id14" draw:layer="layout" svg:width="3.675cm" svg:height="2.41cm" svg:x="14.105cm" svg:y="12.195cm">
          <text:p text:style-name="P10">Test-Daten</text:p>
          <text:p text:style-name="P10">N=50</text:p>
          <draw:enhanced-geometry svg:viewBox="0 0 21600 21600" draw:type="rectangle" draw:enhanced-path="M 0 0 L 21600 0 21600 21600 0 21600 0 0 Z N"/>
        </draw:custom-shape>
        <draw:custom-shape draw:style-name="gr31" draw:text-style-name="P22" xml:id="id13" draw:id="id13" draw:layer="layout" svg:width="5.415cm" svg:height="2.475cm" svg:x="18.715cm" svg:y="9.395cm">
          <text:p text:style-name="P10">Modellgewichte lerne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8" draw:layer="layout" draw:type="curve" draw:line-skew="-0.236cm" svg:x1="10.761cm" svg:y1="8.245cm" svg:x2="13.84cm" svg:y2="7.137cm" draw:start-shape="id8" draw:end-shape="id9" draw:end-glue-point="3" svg:d="M10761 8245c1956 0 417-1108 3079-1108" svg:viewBox="0 0 3080 1109">
          <text:p/>
        </draw:connector>
        <draw:connector draw:style-name="gr41" draw:text-style-name="P28" draw:layer="layout" draw:type="curve" svg:x1="10.761cm" svg:y1="9.845cm" svg:x2="13.84cm" svg:y2="7.137cm" draw:start-shape="id10" draw:start-glue-point="1" draw:end-shape="id9" draw:end-glue-point="3" svg:d="M10761 9845c2310 0 771-2708 3079-2708" svg:viewBox="0 0 3080 2709">
          <text:p/>
        </draw:connector>
        <draw:connector draw:style-name="gr42" draw:text-style-name="P28" draw:layer="layout" draw:type="curve" svg:x1="10.761cm" svg:y1="11.345cm" svg:x2="13.84cm" svg:y2="7.137cm" draw:start-shape="id11" draw:start-glue-point="1" draw:end-shape="id9" draw:end-glue-point="3" svg:d="M10761 11345c2310 0 771-4208 3079-4208" svg:viewBox="0 0 3080 4209">
          <text:p/>
        </draw:connector>
        <draw:connector draw:style-name="gr43" draw:text-style-name="P28" draw:layer="layout" draw:type="curve" svg:x1="10.761cm" svg:y1="13.045cm" svg:x2="13.84cm" svg:y2="7.137cm" draw:start-shape="id12" draw:start-glue-point="1" draw:end-shape="id9" draw:end-glue-point="3" svg:d="M10761 13045c2310 0 771-5908 3079-5908" svg:viewBox="0 0 3080 5909">
          <text:p/>
        </draw:connector>
        <draw:connector draw:style-name="gr44" draw:text-style-name="P28" draw:layer="layout" draw:type="curve" svg:x1="18.15cm" svg:y1="7.137cm" svg:x2="21.422cm" svg:y2="9.395cm" draw:start-shape="id9" draw:start-glue-point="1" draw:end-shape="id13" draw:end-glue-point="0" svg:d="M18150 7137c2182 0 3272 752 3272 2258" svg:viewBox="0 0 3273 2259">
          <text:p/>
        </draw:connector>
        <draw:connector draw:style-name="gr45" draw:text-style-name="P28" draw:layer="layout" draw:type="curve" svg:x1="21.422cm" svg:y1="11.87cm" svg:x2="17.78cm" svg:y2="13.4cm" draw:start-shape="id13" draw:start-glue-point="2" draw:end-shape="id14" draw:end-glue-point="1" svg:d="M21422 11870c0 1020-1214 1530-3642 1530" svg:viewBox="0 0 3643 1531">
          <text:p/>
        </draw:connector>
        <draw:frame draw:style-name="gr33" draw:text-style-name="P38" draw:layer="layout" svg:width="9.025cm" svg:height="3.095cm" svg:x="1.07cm" svg:y="5.668cm">
          <draw:text-box>
            <text:p text:style-name="P10"><text:span text:style-name="T19">k-Fold-Kreuzvalidierung</text:span></text:p>
            <text:p text:style-name="P10"><text:span text:style-name="T19">(Hier k=4 Folds)</text:span></text:p>
          </draw:text-box>
        </draw:frame>
        <draw:line draw:style-name="gr46" draw:text-style-name="P28" draw:layer="layout" svg:x1="16.11cm" svg:y1="14.605cm" svg:x2="16.11cm" svg:y2="15.805cm">
          <text:p/>
        </draw:line>
        <draw:frame draw:style-name="gr33" draw:text-style-name="P17" draw:layer="layout" svg:width="9.025cm" svg:height="3.095cm" svg:x="11.565cm" svg:y="15.875cm">
          <draw:text-box>
            <text:p text:style-name="P10"><text:span text:style-name="T10">Accuracy, AUC etc.</text:span></text:p>
            <text:p text:style-name="P10"><text:span text:style-name="T10">Split</text:span><text:span text:style-name="T22">1</text:span></text:p>
            <text:p text:style-name="P10"><text:span text:style-name="T10">Split</text:span><text:span text:style-name="T22">2</text:span></text:p>
            <text:p text:style-name="P10"><text:span text:style-name="T10">Split</text:span><text:span text:style-name="T22">3</text:span></text:p>
            <text:p text:style-name="P10"><text:span text:style-name="T10">Split</text:span><text:span text:style-name="T22">4</text:span></text:p>
          </draw:text-box>
        </draw:frame>
        <draw:line draw:style-name="gr46" draw:text-style-name="P28" draw:layer="layout" svg:x1="16.011cm" svg:y1="12.137cm" svg:x2="16.01cm" svg:y2="8.79cm">
          <text:p/>
        </draw:line>
        <presentation:notes draw:style-name="dp4">
          <draw:page-thumbnail draw:style-name="gr1" draw:layer="layout" svg:width="0.001cm" svg:height="0.001cm" svg:x="0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3T11">
        <office:forms form:automatic-focus="false" form:apply-design-mode="false"/>
        <draw:frame presentation:style-name="pr11" draw:text-style-name="P35" draw:layer="layout" svg:width="21.899cm" svg:height="3.672cm" svg:x="1.747cm" svg:y="1.796cm" presentation:class="title" presentation:user-transformed="true">
          <draw:text-box>
            <text:p text:style-name="P13"><text:span text:style-name="T9">Train-Test-Split und Kreuzvalidierung</text:span></text:p>
          </draw:text-box>
        </draw:frame>
        <draw:frame draw:style-name="gr3" draw:text-style-name="P15" draw:layer="layout" svg:width="10.159cm" svg:height="10.159cm" svg:x="12.6cm" svg:y="6.886cm">
          <draw:image xlink:href="Pictures/1000000100000960000009609D85F5CF.png" xlink:type="simple" xlink:show="embed" xlink:actuate="onLoad" draw:mime-type="image/png">
            <text:p/>
          </draw:image>
        </draw:frame>
        <draw:frame draw:style-name="gr47" draw:text-style-name="P29" draw:layer="layout" svg:width="9.025cm" svg:height="13.049cm" svg:x="1.77cm" svg:y="5.85cm">
          <draw:text-box>
            <text:list text:style-name="L2">
              <text:list-item>
                <text:p text:style-name="P16"><text:span text:style-name="T19">ML-Modelle können - v.a. wenn sie sehr flexibel sind - zufälliges Rauschen verwenden, um Beobachtungen zu klassifizieren</text:span></text:p>
              </text:list-item>
            </text:list>
            <text:p text:style-name="P16"><text:span text:style-name="T19"/></text:p>
            <text:list text:continue-numbering="true" text:style-name="L2">
              <text:list-item>
                <text:p text:style-name="P16"><text:span text:style-name="T19">Substanzielle Diskrepanz zwischen Trainings- und Test-Leistung deutet auf Overfitting hin</text:span></text:p>
              </text:list-item>
            </text:list>
            <text:p text:style-name="P16"><text:span text:style-name="T19"/></text:p>
            <text:list text:continue-numbering="true" text:style-name="L2">
              <text:list-item>
                <text:p text:style-name="P16"><text:span text:style-name="T19">Genauigkeit (Accuracy) sollte für Test-Daten über Ratewahrscheinlichkeit liegen </text:span></text:p>
              </text:list-item>
            </text:list>
            <text:p text:style-name="P16"><text:span text:style-name="T19"/></text:p>
            <text:p text:style-name="P16"><text:span text:style-name="T19"/></text:p>
          </draw:text-box>
        </draw:frame>
        <draw:line draw:style-name="gr48" draw:text-style-name="P15" draw:layer="layout" svg:x1="18.415cm" svg:y1="17.145cm" svg:x2="20.955cm" svg:y2="17.145cm">
          <text:p/>
        </draw:line>
        <draw:line draw:style-name="gr48" draw:text-style-name="P15" draw:layer="layout" svg:x1="17.855cm" svg:y1="17.145cm" svg:x2="15.315cm" svg:y2="17.145cm">
          <text:p/>
        </draw:line>
        <draw:frame draw:style-name="gr33" draw:text-style-name="P40" draw:layer="layout" svg:width="9.025cm" svg:height="3.095cm" svg:x="16.51cm" svg:y="17.225cm">
          <draw:text-box>
            <text:p text:style-name="P10"><text:span text:style-name="T23">Höhere Flexibilität</text:span></text:p>
          </draw:text-box>
        </draw:frame>
        <draw:frame draw:style-name="gr33" draw:text-style-name="P40" draw:layer="layout" svg:width="9.025cm" svg:height="3.095cm" svg:x="11.211cm" svg:y="17.226cm">
          <draw:text-box>
            <text:p text:style-name="P10"><text:span text:style-name="T23">Geringere Flexibilität</text:span></text:p>
          </draw:text-box>
        </draw:frame>
        <draw:frame draw:style-name="gr49" draw:text-style-name="P18" draw:layer="layout" svg:width="5.459cm" svg:height="1.361cm" svg:x="15.696cm" svg:y="6.079cm">
          <draw:text-box>
            <text:p><text:span text:style-name="T10">k-Nearest-Neighbor</text:span></text:p>
          </draw:text-box>
        </draw:frame>
        <presentation:notes draw:style-name="dp4">
          <draw:page-thumbnail draw:style-name="gr1" draw:layer="layout" svg:width="0.001cm" svg:height="0.001cm" svg:x="0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elfolie" presentation:presentation-page-layout-name="AL4T19">
        <office:forms form:automatic-focus="false" form:apply-design-mode="false"/>
        <draw:frame draw:name="PlaceHolder 7" presentation:style-name="pr9" draw:text-style-name="P2" draw:layer="layout" svg:width="21.905cm" svg:height="3.679cm" svg:x="1.978cm" svg:y="6.603cm" presentation:class="title" presentation:user-transformed="true">
          <draw:text-box>
            <text:p text:style-name="P1"><text:span text:style-name="T9">5. Praxis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0.001cm" svg:height="0.001cm" svg:x="0cm" svg:y="2.123cm" draw:page-number="16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3T11">
        <office:forms form:automatic-focus="false" form:apply-design-mode="false"/>
        <draw:frame presentation:style-name="pr11" draw:text-style-name="P35" draw:layer="layout" svg:width="21.899cm" svg:height="3.672cm" svg:x="1.747cm" svg:y="1.796cm" presentation:class="title" presentation:user-transformed="true">
          <draw:text-box>
            <text:p text:style-name="P13"><text:span text:style-name="T9">Machine Learning in JASP</text:span></text:p>
          </draw:text-box>
        </draw:frame>
        <draw:frame draw:style-name="gr47" draw:text-style-name="P29" draw:layer="layout" svg:width="20.454cm" svg:height="15.818cm" svg:x="1.747cm" svg:y="5.08cm">
          <draw:text-box>
            <text:p text:style-name="P16"><text:span text:style-name="T10">Machine Learning wird typischerweise in Python durchgeführt (siehe sklearn package) Für den Einstieg bietet JASP aber ein gutes Machine Learning Modul an.</text:span></text:p>
            <text:p text:style-name="P16"><text:span text:style-name="T10"/></text:p>
            <text:list text:style-name="L6">
              <text:list-item>
                <text:p text:style-name="P41"><text:span text:style-name="T10">Laden Sie die Datei “beispieldaten_herzerkrankung.tsv“ in JASP.</text:span></text:p>
              </text:list-item>
              <text:list-item>
                <text:p text:style-name="P41"><text:span text:style-name="T10">Berechnen Sie zunächst t-Tests für unabhängige Stichproben zwichen den beiden Target-Gruppen (0=krank, 1=gesund).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0">Gibt es Unterschiede zwischen den Gruppen? Wie groß sind die Effekte?</text:span><text:span text:style-name="T10"><text:tab/></text:span></text:p>
                  </text:list-item>
                </text:list>
              </text:list-item>
            </text:list>
            <text:list text:style-name="L8">
              <text:list-item>
                <text:p text:style-name="P41"><text:span text:style-name="T10">Verwenden Sie einen Algorithmus (z.B. logistische Regression), um die Targetvariable anhand der Merkmalsvariablen vorherzusagen.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10">Stellen Sie einen 'Data Split' von z.B. 20% Testdaten ein.</text:span></text:p>
                  </text:list-item>
                  <text:list-item>
                    <text:p text:style-name="P42"><text:span text:style-name="T10">Berechnen Sie die Accuracy und die AUC</text:span></text:p>
                  </text:list-item>
                  <text:list-item>
                    <text:p text:style-name="P42"><text:span text:style-name="T10">Visualisieren Sie die ROC</text:span></text:p>
                  </text:list-item>
                  <text:list-item>
                    <text:p text:style-name="P42"><text:span text:style-name="T10">Überprüfen Sie, ob die Gruppen gleich groß sind</text:span></text:p>
                  </text:list-item>
                </text:list>
              </text:list-item>
            </text:list>
            <text:p text:style-name="P41"><text:span text:style-name="T19"/></text:p>
            <text:p text:style-name="P16"><text:span text:style-name="T19"/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0.001cm" svg:height="0.001cm" svg:x="0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/>
    <style:font-face style:name="Aptos Display" svg:font-family="'Aptos Display'"/>
    <style:font-face style:name="Arial" svg:font-family="Arial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 New Roman" svg:font-family="'Time New Roman'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>
        <text:list-style style:name="Vergleich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gleich-outline2" style:family="presentation" style:parent-style-name="Vergleich-outline1">
      <style:paragraph-properties fo:margin-left="0cm" fo:margin-right="0cm" fo:margin-top="0.176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Vergleich-outline3" style:family="presentation" style:parent-style-name="Vergleich-outline2">
      <style:paragraph-properties fo:margin-left="0cm" fo:margin-right="0cm" fo:margin-top="0.176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Vergleich-outline4" style:family="presentation" style:parent-style-name="Vergleich-outline3">
      <style:paragraph-properties fo:margin-left="0cm" fo:margin-right="0cm" fo:margin-top="0.176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Vergleich-outline5" style:family="presentation" style:parent-style-name="Vergleich-outline4">
      <style:paragraph-properties fo:margin-left="0cm" fo:margin-right="0cm" fo:margin-top="0.176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>
        <text:list-style style:name="Vergleich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1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4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1pt" style:font-style-asian="normal" style:font-weight-asian="normal" style:font-name-complex="Noto Sans Devanagari" style:font-family-complex="'Noto Sans Devanagari'" style:font-family-generic-complex="system" style:font-pitch-complex="variable" style:font-size-complex="41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Nur_20_Titel-outline2" style:display-name="Nur Titel-outline2" style:family="presentation" style:parent-style-name="Nur_20_Titel-outline1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35.2000007629395pt" fo:letter-spacing="normal" fo:language="en" fo:country="US" fo:font-style="normal" style:text-underline-style="none" fo:font-weight="normal" fo:background-color="transparent" style:font-size-asian="35.2000007629395pt" style:font-style-asian="normal" style:font-weight-asian="normal" style:font-size-complex="35.2000007629395pt" style:font-style-complex="normal" style:font-weight-complex="normal">
        <loext:char-complex-color loext:theme-type="dark1" loext:color-type="theme"/>
      </style:text-properties>
    </style:style>
    <style:style style:name="Nur_20_Titel-outline3" style:display-name="Nur Titel-outline3" style:family="presentation" style:parent-style-name="Nur_20_Titel-outline2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Nur_20_Titel-outline4" style:display-name="Nur Titel-outline4" style:family="presentation" style:parent-style-name="Nur_20_Titel-outline3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Nur_20_Titel-outline6" style:display-name="Nur Titel-outline6" style:family="presentation" style:parent-style-name="Nur_20_Titel-outline5">
      <style:paragraph-properties fo:margin-left="0cm" fo:margin-right="0cm" fo:margin-top="0.14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Nur_20_Titel-outline7" style:display-name="Nur Titel-outline7" style:family="presentation" style:parent-style-name="Nur_20_Titel-outline6">
      <style:paragraph-properties fo:margin-left="0cm" fo:margin-right="0cm" fo:margin-top="0.14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1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4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1pt" style:font-style-asian="normal" style:font-weight-asian="normal" style:font-name-complex="Noto Sans Devanagari" style:font-family-complex="'Noto Sans Devanagari'" style:font-family-generic-complex="system" style:font-pitch-complex="variable" style:font-size-complex="41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Leer-outline2" style:family="presentation" style:parent-style-name="Leer-outline1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35.2000007629395pt" fo:letter-spacing="normal" fo:language="en" fo:country="US" fo:font-style="normal" style:text-underline-style="none" fo:font-weight="normal" fo:background-color="transparent" style:font-size-asian="35.2000007629395pt" style:font-style-asian="normal" style:font-weight-asian="normal" style:font-size-complex="35.2000007629395pt" style:font-style-complex="normal" style:font-weight-complex="normal">
        <loext:char-complex-color loext:theme-type="dark1" loext:color-type="theme"/>
      </style:text-properties>
    </style:style>
    <style:style style:name="Leer-outline3" style:family="presentation" style:parent-style-name="Leer-outline2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Leer-outline4" style:family="presentation" style:parent-style-name="Leer-outline3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Leer-outline5" style:family="presentation" style:parent-style-name="Leer-outline4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Leer-outline6" style:family="presentation" style:parent-style-name="Leer-outline5">
      <style:paragraph-properties fo:margin-left="0cm" fo:margin-right="0cm" fo:margin-top="0.14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Leer-outline7" style:family="presentation" style:parent-style-name="Leer-outline6">
      <style:paragraph-properties fo:margin-left="0cm" fo:margin-right="0cm" fo:margin-top="0.14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64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4.5pt" style:font-style-asian="normal" style:font-weight-asian="normal" style:font-name-complex="Noto Sans Devanagari" style:font-family-complex="'Noto Sans Devanagari'" style:font-family-generic-complex="system" style:font-pitch-complex="variable" style:font-size-complex="64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nhalt_20_mit_20_Überschrift-background" style:display-name="Inhalt mit Überschrift-background" style:family="presentation">
      <style:graphic-properties draw:stroke="none" draw:fill="solid" draw:fill-color="#ffffff"/>
      <style:text-properties style:letter-kerning="true"/>
    </style:style>
    <style:style style:name="Inhalt_20_mit_20_Überschrift-backgroundobjects" style:display-name="Inhalt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mit_20_Überschrift-notes" style:display-name="Inhalt mit 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mit_20_Überschrift-outline1" style:display-name="Inhalt mit Überschrift-outline1" style:family="presentation">
      <style:graphic-properties draw:stroke="none" draw:fill="none" draw:auto-grow-height="false" draw:fit-to-size="false" style:shrink-to-fit="true">
        <text:list-style style:name="Inhalt_20_mit_20_Überschrift-outline1" style:display-name="Inhalt mit Überschrift-outline1">
          <text:list-level-style-number text:level="1" style:num-format="">
            <style:list-level-properties text:space-before="-0.9cm" text:min-label-width="0.9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nhalt_20_mit_20_Überschrift-outline2" style:display-name="Inhalt mit Überschrift-outline2" style:family="presentation" style:parent-style-name="Inhalt_20_mit_20_Überschrift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Inhalt_20_mit_20_Überschrift-outline3" style:display-name="Inhalt mit Überschrift-outline3" style:family="presentation" style:parent-style-name="Inhalt_20_mit_20_Überschrift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Inhalt_20_mit_20_Überschrift-outline4" style:display-name="Inhalt mit Überschrift-outline4" style:family="presentation" style:parent-style-name="Inhalt_20_mit_20_Überschrift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Inhalt_20_mit_20_Überschrift-outline5" style:display-name="Inhalt mit Überschrift-outline5" style:family="presentation" style:parent-style-name="Inhalt_20_mit_20_Überschrift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Inhalt_20_mit_20_Überschrift-outline6" style:display-name="Inhalt mit Überschrift-outline6" style:family="presentation" style:parent-style-name="Inhalt_20_mit_20_Überschrift-outline5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7" style:display-name="Inhalt mit Überschrift-outline7" style:family="presentation" style:parent-style-name="Inhalt_20_mit_20_Überschrift-outline6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8" style:display-name="Inhalt mit Überschrift-outline8" style:family="presentation" style:parent-style-name="Inhalt_20_mit_20_Überschrift-outline7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9" style:display-name="Inhalt mit Überschrift-outline9" style:family="presentation" style:parent-style-name="Inhalt_20_mit_20_Überschrift-outline8">
      <style:paragraph-properties fo:margin-top="0.1cm" fo:margin-bottom="0cm"/>
      <style:text-properties fo:font-size="20pt" style:font-size-asian="20pt" style:font-size-complex="20pt"/>
    </style:style>
    <style:style style:name="Inhalt_20_mit_20_Überschrift-subtitle" style:display-name="Inhalt mit Überschrift-subtitle" style:family="presentation">
      <style:graphic-properties draw:stroke="none" draw:fill="none" draw:textarea-vertical-align="middle">
        <text:list-style style:name="Inhalt_20_mit_20_Überschrift-subtitle" style:display-name="Inhalt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mit_20_Überschrift-title" style:display-name="Inhalt mit Überschrift-title" style:family="presentation">
      <style:graphic-properties draw:stroke="none" draw:fill="none" draw:textarea-vertical-align="middle">
        <text:list-style style:name="Inhalt_20_mit_20_Überschrift-title" style:display-name="Inhalt mit Überschrif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/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>
        <text:list-style style:name="Bild_20_mit_20_Überschrift-outline1" style:display-name="Bild mit Überschrift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ild_20_mit_20_Überschrift-outline2" style:display-name="Bild mit Überschrift-outline2" style:family="presentation" style:parent-style-name="Bild_20_mit_20_Überschrif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ild_20_mit_20_Überschrift-outline3" style:display-name="Bild mit Überschrift-outline3" style:family="presentation" style:parent-style-name="Bild_20_mit_20_Überschrif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_20_mit_20_Überschrift-outline4" style:display-name="Bild mit Überschrift-outline4" style:family="presentation" style:parent-style-name="Bild_20_mit_20_Überschrif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>
        <text:list-style style:name="Bild_20_mit_20_Überschrift-title" style:display-name="Bild mit Überschrif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folie-background" style:family="presentation">
      <style:graphic-properties draw:stroke="none" draw:fill="solid" draw:fill-color="#2e3440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">
            <style:list-level-properties text:space-before="-0.9cm" text:min-label-width="0.9cm"/>
            <style:text-properties fo:font-family="Wingdings" style:font-charset="x-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6" style:family="presentation" style:parent-style-name="Titelfolie-outline5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7" style:family="presentation" style:parent-style-name="Titelfolie-outline6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6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normal" style:font-name-complex="Noto Sans Devanagari" style:font-family-complex="'Noto Sans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Default-background" style:family="presentation">
      <style:graphic-properties draw:stroke="none" draw:fill="solid" draw:fill-color="#2e344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">
            <style:list-level-properties text:space-before="-0.9cm" text:min-label-width="0.9cm"/>
            <style:text-properties fo:font-family="Wingdings" style:font-charset="x-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6" style:family="presentation" style:parent-style-name="Default-outline5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7" style:family="presentation" style:parent-style-name="Default-outline6">
      <style:paragraph-properties fo:margin-left="0cm" fo:margin-right="0cm" fo:margin-top="0.1cm" fo:margin-bottom="0cm" fo:line-height="100%" fo:text-align="lef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6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normal" style:font-name-complex="Noto Sans Devanagari" style:font-family-complex="'Noto Sans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itel_20_und_20_vertikaler_20_Text-background" style:display-name="Titel und vertikaler Text-background" style:family="presentation">
      <style:graphic-properties draw:stroke="none" draw:fill="solid" draw:fill-color="#ffffff"/>
      <style:text-properties style:letter-kerning="true"/>
    </style:style>
    <style:style style:name="Titel_20_und_20_vertikaler_20_Text-backgroundobjects" style:display-name="Titel und vertikal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vertikaler_20_Text-notes" style:display-name="Titel und vertikaler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outline1" style:display-name="Titel und vertikaler Text-outline1" style:family="presentation">
      <style:graphic-properties draw:stroke="none" draw:fill="none" draw:auto-grow-height="false" draw:fit-to-size="false" style:shrink-to-fit="true">
        <text:list-style style:name="Titel_20_und_20_vertikaler_20_Text-outline1" style:display-name="Titel und vertikaler Text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_20_und_20_vertikaler_20_Text-outline2" style:display-name="Titel und vertikaler Text-outline2" style:family="presentation" style:parent-style-name="Titel_20_und_20_vertikaler_20_Text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itel_20_und_20_vertikaler_20_Text-outline3" style:display-name="Titel und vertikaler Text-outline3" style:family="presentation" style:parent-style-name="Titel_20_und_20_vertikaler_20_Text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el_20_und_20_vertikaler_20_Text-outline4" style:display-name="Titel und vertikaler Text-outline4" style:family="presentation" style:parent-style-name="Titel_20_und_20_vertikaler_20_Text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itel_20_und_20_vertikaler_20_Text-outline5" style:display-name="Titel und vertikaler Text-outline5" style:family="presentation" style:parent-style-name="Titel_20_und_20_vertikaler_20_Text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itel_20_und_20_vertikaler_20_Text-outline6" style:display-name="Titel und vertikaler Text-outline6" style:family="presentation" style:parent-style-name="Titel_20_und_20_vertikaler_20_Text-outline5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7" style:display-name="Titel und vertikaler Text-outline7" style:family="presentation" style:parent-style-name="Titel_20_und_20_vertikaler_20_Text-outline6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8" style:display-name="Titel und vertikaler Text-outline8" style:family="presentation" style:parent-style-name="Titel_20_und_20_vertikaler_20_Text-outline7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9" style:display-name="Titel und vertikaler Text-outline9" style:family="presentation" style:parent-style-name="Titel_20_und_20_vertikaler_20_Text-outline8">
      <style:paragraph-properties fo:margin-top="0.1cm" fo:margin-bottom="0cm"/>
      <style:text-properties fo:font-size="20pt" style:font-size-asian="20pt" style:font-size-complex="20pt"/>
    </style:style>
    <style:style style:name="Titel_20_und_20_vertikaler_20_Text-subtitle" style:display-name="Titel und vertikaler Text-subtitle" style:family="presentation">
      <style:graphic-properties draw:stroke="none" draw:fill="none" draw:textarea-vertical-align="middle">
        <text:list-style style:name="Titel_20_und_20_vertikaler_20_Text-subtitle" style:display-name="Titel und vertikaler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title" style:display-name="Titel und vertikaler Text-title" style:family="presentation">
      <style:graphic-properties draw:stroke="none" draw:fill="none" draw:textarea-vertical-align="middle">
        <text:list-style style:name="Titel_20_und_20_vertikaler_20_Text-title" style:display-name="Titel und vertikaler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kaler_20_Titel_20_und_20_Text-background" style:display-name="Vertikaler Titel und Text-background" style:family="presentation">
      <style:graphic-properties draw:stroke="none" draw:fill="solid" draw:fill-color="#ffffff"/>
      <style:text-properties style:letter-kerning="true"/>
    </style:style>
    <style:style style:name="Vertikaler_20_Titel_20_und_20_Text-backgroundobjects" style:display-name="Vertikaler Titel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kaler_20_Titel_20_und_20_Text-notes" style:display-name="Vertikaler Titel u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outline1" style:display-name="Vertikaler Titel und Text-outline1" style:family="presentation">
      <style:graphic-properties draw:stroke="none" draw:fill="none" draw:auto-grow-height="false" draw:fit-to-size="false" style:shrink-to-fit="true">
        <text:list-style style:name="Vertikaler_20_Titel_20_und_20_Text-outline1" style:display-name="Vertikaler Titel und Text-outline1">
          <text:list-level-style-bullet text:level="1" text:bullet-char="•">
            <style:list-level-properties text:space-before="-0.9cm" text:min-label-width="0.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kaler_20_Titel_20_und_20_Text-outline2" style:display-name="Vertikaler Titel und Text-outline2" style:family="presentation" style:parent-style-name="Vertikaler_20_Titel_20_und_20_Text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Vertikaler_20_Titel_20_und_20_Text-outline3" style:display-name="Vertikaler Titel und Text-outline3" style:family="presentation" style:parent-style-name="Vertikaler_20_Titel_20_und_20_Text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Vertikaler_20_Titel_20_und_20_Text-outline4" style:display-name="Vertikaler Titel und Text-outline4" style:family="presentation" style:parent-style-name="Vertikaler_20_Titel_20_und_20_Text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Vertikaler_20_Titel_20_und_20_Text-outline5" style:display-name="Vertikaler Titel und Text-outline5" style:family="presentation" style:parent-style-name="Vertikaler_20_Titel_20_und_20_Text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Vertikaler_20_Titel_20_und_20_Text-outline6" style:display-name="Vertikaler Titel und Text-outline6" style:family="presentation" style:parent-style-name="Vertikaler_20_Titel_20_und_20_Text-outline5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7" style:display-name="Vertikaler Titel und Text-outline7" style:family="presentation" style:parent-style-name="Vertikaler_20_Titel_20_und_20_Text-outline6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8" style:display-name="Vertikaler Titel und Text-outline8" style:family="presentation" style:parent-style-name="Vertikaler_20_Titel_20_und_20_Text-outline7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9" style:display-name="Vertikaler Titel und Text-outline9" style:family="presentation" style:parent-style-name="Vertikaler_20_Titel_20_und_20_Text-outline8">
      <style:paragraph-properties fo:margin-top="0.1cm" fo:margin-bottom="0cm"/>
      <style:text-properties fo:font-size="20pt" style:font-size-asian="20pt" style:font-size-complex="20pt"/>
    </style:style>
    <style:style style:name="Vertikaler_20_Titel_20_und_20_Text-subtitle" style:display-name="Vertikaler Titel und Text-subtitle" style:family="presentation">
      <style:graphic-properties draw:stroke="none" draw:fill="none" draw:textarea-vertical-align="middle">
        <text:list-style style:name="Vertikaler_20_Titel_20_und_20_Text-subtitle" style:display-name="Vertikaler Titel u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title" style:display-name="Vertikaler Titel und Text-title" style:family="presentation">
      <style:graphic-properties draw:stroke="none" draw:fill="none" draw:textarea-vertical-align="middle">
        <text:list-style style:name="Vertikaler_20_Titel_20_und_20_Text-title" style:display-name="Vertikaler Titel u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2e3440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•">
            <style:list-level-properties text:space-before="-0.9cm" text:min-label-width="0.9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>
        <text:list-style style:name="Abschnitts-_a_überschrift-outline1" style:display-name="Abschnitts-&#10;überschrift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family="Aptos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tint" loext:value="8200"/>
        </loext:char-complex-color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family="'Aptos Display'" fo:font-size="6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normal" style:font-name-complex="Noto Sans Devanagari" style:font-family-complex="'Noto Sans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1__5f_Titel_20_und_20_Inhalt-background" style:display-name="1_Titel und Inhalt-background" style:family="presentation">
      <style:graphic-properties draw:stroke="none" draw:fill="solid" draw:fill-color="#2e3440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false" style:shrink-to-fit="true">
        <text:list-style style:name="_31__5f_Titel_20_und_20_Inhalt-outline1" style:display-name="1_Titel und Inhalt-outline1">
          <text:list-level-style-bullet text:level="1" text:bullet-char="•">
            <style:list-level-properties text:space-before="-0.9cm" text:min-label-width="0.9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_31__5f_Titel_20_und_20_Inhalt-outline2" style:display-name="1_Titel und Inhalt-outline2" style:family="presentation" style:parent-style-name="_31__5f_Titel_20_und_20_Inhalt-outline1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_31__5f_Titel_20_und_20_Inhalt-outline3" style:display-name="1_Titel und Inhalt-outline3" style:family="presentation" style:parent-style-name="_31__5f_Titel_20_und_20_Inhalt-outline2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_31__5f_Titel_20_und_20_Inhalt-outline4" style:display-name="1_Titel und Inhalt-outline4" style:family="presentation" style:parent-style-name="_31__5f_Titel_20_und_20_Inhalt-outline3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_31__5f_Titel_20_und_20_Inhalt-outline5" style:display-name="1_Titel und Inhalt-outline5" style:family="presentation" style:parent-style-name="_31__5f_Titel_20_und_20_Inhalt-outline4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e344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Zwei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Zwei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Vergleich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Vergleich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Vergleich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Nur_20_Tite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Nur_20_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Nur_20_Tite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Nur_20_Tite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Le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Le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Le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Le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Le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Inhalt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Inhalt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Inhalt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Inhalt_20_mit_20_Überschrif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Inhalt_20_mit_20_Überschrif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Bild_20_mit_20_Überschrif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2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3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Titel_20_und_20_vertikaler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Titel_20_und_20_vertikaler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45" style:family="presentation" style:parent-style-name="Titel_20_und_20_vertikaler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Titel_20_und_20_vertikaler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Titel_20_und_20_vertikaler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Vertikaler_20_Titel_20_u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49" style:family="presentation" style:parent-style-name="Vertikaler_20_Titel_20_u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50" style:family="presentation" style:parent-style-name="Vertikaler_20_Titel_20_u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Vertikaler_20_Titel_20_u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Vertikaler_20_Titel_20_u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3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Titel_20_und_20_Inhalt-backgroundobjects">
      <style:graphic-properties draw:stroke="none" svg:stroke-width="0cm" draw:fill="solid" draw:fill-color="#2e3440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Abschnitts-_a_überschrif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3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4" style:family="presentation" style:parent-style-name="_31__5f_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_31__5f_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_31__5f_Titel_20_und_20_Inhalt-backgroundobjects">
      <style:graphic-properties draw:stroke="none" svg:stroke-width="0cm" draw:fill="solid" draw:fill-color="#2e3440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_31__5f_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_31__5f_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9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left" fo:text-indent="0cm" loext:tab-stop-distance="2.54cm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lef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left" fo:text-indent="0cm" loext:tab-stop-distance="2.54cm">
        <style:tab-stops/>
      </style:paragraph-properties>
    </style:style>
    <style:style style:name="MP8" style:family="paragraph">
      <style:paragraph-properties fo:margin-left="0cm" fo:margin-right="0cm" fo:margin-top="0.176cm" fo:margin-bottom="0cm" fo:line-height="90%" fo:text-align="left" fo:text-indent="0cm" loext:tab-stop-distance="2.54cm">
        <style:tab-stops/>
      </style:paragraph-properties>
    </style:style>
    <style:style style:name="MP9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left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right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.353cm" fo:margin-bottom="0cm" fo:line-height="90%" fo:text-align="left" fo:text-indent="0cm" loext:tab-stop-distance="2.5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17" style:family="paragraph">
      <style:paragraph-properties fo:margin-left="0cm" fo:margin-right="0cm" fo:margin-top="0.176cm" fo:margin-bottom="0cm" fo:line-height="90%" fo:text-align="left" fo:text-indent="0cm" loext:tab-stop-distance="2.54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516cm" fo:margin-bottom="0cm" fo:line-height="90%" fo:text-align="left" fo:text-indent="0cm" loext:tab-stop-distance="2.54cm">
        <style:tab-stops/>
      </style:paragraph-properties>
    </style:style>
    <style:style style:name="MP19" style:family="paragraph">
      <style:paragraph-properties fo:margin-left="0cm" fo:margin-right="0cm" fo:margin-top="0.257cm" fo:margin-bottom="0cm" fo:line-height="90%" fo:text-align="left" fo:text-indent="0cm" loext:tab-stop-distance="2.54cm">
        <style:tab-stops/>
      </style:paragraph-properties>
    </style:style>
    <style:style style:name="MP20" style:family="paragraph">
      <style:paragraph-properties fo:margin-left="0cm" fo:margin-right="0cm" fo:margin-top="0.146cm" fo:margin-bottom="0cm" fo:line-height="90%" fo:text-align="left" fo:text-indent="0cm" loext:tab-stop-distance="2.54cm">
        <style:tab-stops/>
      </style:paragraph-properties>
    </style:style>
    <style:style style:name="MP21" style:family="paragraph">
      <loext:graphic-properties draw:fill="none"/>
      <style:paragraph-properties fo:text-align="left" style:font-independent-line-spacing="true"/>
      <style:text-properties fo:font-size="41pt"/>
    </style:style>
    <style:style style:name="MP22" style:family="paragraph">
      <loext:graphic-properties draw:fill="none"/>
      <style:paragraph-properties fo:text-align="left" style:font-independent-line-spacing="true"/>
      <style:text-properties fo:font-size="64.5pt"/>
    </style:style>
    <style:style style:name="MP23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24" style:family="paragraph">
      <loext:graphic-properties draw:fill="none"/>
      <style:paragraph-properties fo:text-align="left" style:font-independent-line-spacing="true"/>
      <style:text-properties fo:font-size="16pt"/>
    </style:style>
    <style:style style:name="MP25" style:family="paragraph">
      <style:paragraph-properties fo:margin-left="0cm" fo:margin-right="0cm" fo:margin-top="0cm" fo:margin-bottom="0cm" fo:line-height="100%" fo:text-align="left" fo:text-indent="0cm" loext:tab-stop-distance="1.27cm">
        <style:tab-stops>
          <style:tab-stop style:position="0cm"/>
        </style:tab-stops>
      </style:paragraph-properties>
    </style:style>
    <style:style style:name="MP26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MP27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28" style:family="paragraph">
      <loext:graphic-properties draw:fill="none"/>
      <style:paragraph-properties fo:text-align="left"/>
      <style:text-properties fo:font-size="18pt"/>
    </style:style>
    <style:style style:name="MP29" style:family="paragraph">
      <style:paragraph-properties fo:margin-left="0cm" fo:margin-right="0cm" fo:margin-top="0.5cm" fo:margin-bottom="0cm" fo:line-height="100%" fo:text-align="left" fo:text-indent="0cm"/>
    </style:style>
    <style:style style:name="MP30" style:family="paragraph">
      <style:paragraph-properties fo:margin-left="0cm" fo:margin-right="0cm" fo:margin-top="0.4cm" fo:margin-bottom="0cm" fo:line-height="100%" fo:text-align="left" fo:text-indent="0cm"/>
    </style:style>
    <style:style style:name="MP31" style:family="paragraph">
      <style:paragraph-properties fo:margin-left="0cm" fo:margin-right="0cm" fo:margin-top="0.3cm" fo:margin-bottom="0cm" fo:line-height="100%" fo:text-align="left" fo:text-indent="0cm"/>
    </style:style>
    <style:style style:name="MP32" style:family="paragraph">
      <style:paragraph-properties fo:margin-left="0cm" fo:margin-right="0cm" fo:margin-top="0.2cm" fo:margin-bottom="0cm" fo:line-height="100%" fo:text-align="left" fo:text-indent="0cm"/>
    </style:style>
    <style:style style:name="MP33" style:family="paragraph">
      <style:paragraph-properties fo:margin-left="0cm" fo:margin-right="0cm" fo:margin-top="0.1cm" fo:margin-bottom="0cm" fo:line-height="100%" fo:text-align="left" fo:text-indent="0cm"/>
    </style:style>
    <style:style style:name="MP34" style:family="paragraph">
      <loext:graphic-properties draw:fill="none"/>
      <style:paragraph-properties fo:text-align="left" style:font-independent-line-spacing="true"/>
      <style:text-properties fo:font-size="22pt"/>
    </style:style>
    <style:style style:name="MP35" style:family="paragraph">
      <loext:graphic-properties draw:fill="solid" draw:fill-color="#2e3440"/>
      <style:paragraph-properties fo:text-align="left" style:font-independent-line-spacing="true"/>
      <style:text-properties fo:font-size="12pt" style:font-size-asian="14pt" style:font-size-complex="14pt"/>
    </style:style>
    <style:style style:name="MP36" style:family="paragraph">
      <loext:graphic-properties draw:fill="none"/>
      <style:paragraph-properties fo:text-align="lef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41pt" fo:letter-spacing="normal" fo:language="en" fo:country="US" fo:font-style="normal" style:text-underline-style="none" fo:font-weight="normal" fo:background-color="transparent" style:font-size-asian="41pt" style:font-style-asian="normal" style:font-weight-asian="normal" style:font-size-complex="41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5.2000007629395pt" fo:letter-spacing="normal" fo:language="en" fo:country="US" fo:font-style="normal" style:text-underline-style="none" fo:font-weight="normal" fo:background-color="transparent" style:font-size-asian="35.2000007629395pt" style:font-style-asian="normal" style:font-weight-asian="normal" style:font-size-complex="35.2000007629395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4.5pt" fo:letter-spacing="normal" fo:language="en" fo:country="US" fo:font-style="normal" style:text-underline-style="none" fo:font-weight="normal" fo:background-color="transparent" style:font-size-asian="64.5pt" style:font-style-asian="normal" style:font-weight-asian="normal" style:font-size-complex="64.5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>
          <loext:transformation loext:type="tint" loext:value="8200"/>
        </loext:char-complex-color>
      </style:text-properties>
    </style:style>
    <style:style style:name="M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8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-0.9cm" text:min-label-width="0.9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">
        <style:list-level-properties text:space-before="-0.9cm" text:min-label-width="0.9cm"/>
        <style:text-properties fo:font-family="Wingdings" style:font-charset="x-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-0.9cm" text:min-label-width="0.9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Zwei_20_Inhalte" style:display-name="Zwei Inhalte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1" draw:text-style-name="MP6" draw:layer="backgroundobjects" svg:width="21.899cm" svg:height="3.672cm" svg:x="1.744cm" svg:y="1.012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PlaceHolder 2" presentation:style-name="Mpr2" draw:text-style-name="MP9" draw:layer="backgroundobjects" svg:width="10.785cm" svg:height="12.077cm" svg:x="1.744cm" svg:y="5.07cm" presentation:class="outline" presentation:user-transformed="true">
        <draw:text-box>
          <text:list text:style-name="ML3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8"><text:span text:style-name="MT5">Dritte Ebene</text:span></text:p>
                      <text:list>
                        <text:list-item>
                          <text:p text:style-name="MP8"><text:span text:style-name="MT6">Vierte Ebene</text:span></text:p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" draw:text-style-name="MP9" draw:layer="backgroundobjects" svg:width="10.785cm" svg:height="12.077cm" svg:x="12.858cm" svg:y="5.07cm" presentation:class="outline" presentation:user-transformed="true">
        <draw:text-box>
          <text:list text:style-name="ML4">
            <text:list-item>
              <text:p text:style-name="MP7"><text:span text:style-name="MT3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3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5" presentation:style-name="Mpr3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6" presentation:style-name="Mpr3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Zwei_20_Inhalte-title" draw:layer="backgroundobjects" svg:width="18.624cm" svg:height="10.476cm" svg:x="1.482cm" svg:y="2.123cm" presentation:class="page"/>
        <draw:frame presentation:style-name="Zwei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6" draw:text-style-name="MP6" draw:layer="backgroundobjects" svg:width="21.899cm" svg:height="3.672cm" svg:x="1.749cm" svg:y="1.012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PlaceHolder 2" presentation:style-name="Mpr7" draw:text-style-name="MP16" draw:layer="backgroundobjects" svg:width="10.735cm" svg:height="2.279cm" svg:x="1.749cm" svg:y="4.668cm" presentation:class="outline" presentation:user-transformed="true">
        <draw:text-box>
          <text:list text:style-name="ML3">
            <text:list-item>
              <text:p text:style-name="MP15"><text:span text:style-name="MT9">Mastertextformat bearbeiten</text:span></text:p>
            </text:list-item>
          </text:list>
        </draw:text-box>
      </draw:frame>
      <draw:frame draw:name="PlaceHolder 3" presentation:style-name="Mpr8" draw:text-style-name="MP9" draw:layer="backgroundobjects" svg:width="10.735cm" svg:height="10.225cm" svg:x="1.749cm" svg:y="6.957cm" presentation:class="outline" presentation:user-transformed="true">
        <draw:text-box>
          <text:list text:style-name="ML4">
            <text:list-item>
              <text:p text:style-name="MP15"><text:span text:style-name="MT3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7" draw:text-style-name="MP16" draw:layer="backgroundobjects" svg:width="10.787cm" svg:height="2.279cm" svg:x="12.858cm" svg:y="4.668cm" presentation:class="outline" presentation:user-transformed="true">
        <draw:text-box>
          <text:p text:style-name="MP15"><text:span text:style-name="MT9">Mastertextformat bearbeiten</text:span></text:p>
        </draw:text-box>
      </draw:frame>
      <draw:frame draw:name="PlaceHolder 5" presentation:style-name="Mpr8" draw:text-style-name="MP9" draw:layer="backgroundobjects" svg:width="10.787cm" svg:height="10.225cm" svg:x="12.858cm" svg:y="6.957cm" presentation:class="outline" presentation:user-transformed="true">
        <draw:text-box>
          <text:list text:style-name="ML4">
            <text:list-item>
              <text:p text:style-name="MP15"><text:span text:style-name="MT3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6" presentation:style-name="Mpr9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7" presentation:style-name="Mpr9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8" presentation:style-name="Mpr9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Vergleich-title" draw:layer="backgroundobjects" svg:width="0.001cm" svg:height="0.001cm" svg:x="0cm" svg:y="2.123cm" presentation:class="page"/>
        <draw:frame presentation:style-name="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12" draw:text-style-name="MP6" draw:layer="backgroundobjects" svg:width="21.899cm" svg:height="3.672cm" svg:x="1.744cm" svg:y="1.012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PlaceHolder 2" presentation:style-name="Mpr13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3" presentation:style-name="Mpr13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4" presentation:style-name="Mpr13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draw:name="PlaceHolder 5" presentation:style-name="Mpr14" draw:text-style-name="MP21" draw:layer="backgroundobjects" svg:width="22.85cm" svg:height="11.037cm" svg:x="1.27cm" svg:y="4.457cm" presentation:class="outline" presentation:user-transformed="true">
        <draw:text-box>
          <text:list text:style-name="ML3">
            <text:list-item>
              <text:p text:style-name="MP18"><text:span text:style-name="MT10">Click to edit the outline text format</text:span></text:p>
              <text:list>
                <text:list-item>
                  <text:p text:style-name="MP19"><text:span text:style-name="MT11">Second Outline Level</text:span></text:p>
                  <text:list>
                    <text:list-item>
                      <text:p text:style-name="MP19"><text:span text:style-name="MT12">Third Outline Level</text:span></text:p>
                      <text:list>
                        <text:list-item>
                          <text:p text:style-name="MP19"><text:span text:style-name="MT13">Fourth Outline Level</text:span></text:p>
                          <text:list>
                            <text:list-item>
                              <text:p text:style-name="MP19"><text:span text:style-name="MT13">Fifth Outline Level</text:span></text:p>
                              <text:list>
                                <text:list-item>
                                  <text:p text:style-name="MP20"><text:span text:style-name="MT12">Sixth Outline Level</text:span></text:p>
                                  <text:list>
                                    <text:list-item>
                                      <text:p text:style-name="MP20"><text:span text:style-name="MT1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ur_20_Titel-title" draw:layer="backgroundobjects" svg:width="0.001cm" svg:height="0.001cm" svg:x="0cm" svg:y="2.123cm" presentation:class="page"/>
        <draw:frame presentation:style-name="Nur_20_Titel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17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2" presentation:style-name="Mpr17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3" presentation:style-name="Mpr17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draw:name="PlaceHolder 4" presentation:style-name="Mpr18" draw:text-style-name="MP22" draw:layer="backgroundobjects" svg:width="22.85cm" svg:height="3.17cm" svg:x="1.27cm" svg:y="0.759cm" presentation:class="title" presentation:user-transformed="true">
        <draw:text-box>
          <text:p text:style-name="MP5"><text:span text:style-name="MT14">Click to edit the title text format</text:span></text:p>
        </draw:text-box>
      </draw:frame>
      <draw:frame draw:name="PlaceHolder 5" presentation:style-name="Mpr19" draw:text-style-name="MP21" draw:layer="backgroundobjects" svg:width="22.85cm" svg:height="11.037cm" svg:x="1.27cm" svg:y="4.457cm" presentation:class="outline" presentation:user-transformed="true">
        <draw:text-box>
          <text:list text:style-name="ML3">
            <text:list-item>
              <text:p text:style-name="MP18"><text:span text:style-name="MT10">Click to edit the outline text format</text:span></text:p>
              <text:list>
                <text:list-item>
                  <text:p text:style-name="MP19"><text:span text:style-name="MT11">Second Outline Level</text:span></text:p>
                  <text:list>
                    <text:list-item>
                      <text:p text:style-name="MP19"><text:span text:style-name="MT12">Third Outline Level</text:span></text:p>
                      <text:list>
                        <text:list-item>
                          <text:p text:style-name="MP19"><text:span text:style-name="MT13">Fourth Outline Level</text:span></text:p>
                          <text:list>
                            <text:list-item>
                              <text:p text:style-name="MP19"><text:span text:style-name="MT13">Fifth Outline Level</text:span></text:p>
                              <text:list>
                                <text:list-item>
                                  <text:p text:style-name="MP20"><text:span text:style-name="MT12">Sixth Outline Level</text:span></text:p>
                                  <text:list>
                                    <text:list-item>
                                      <text:p text:style-name="MP20"><text:span text:style-name="MT1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Leer-title" draw:layer="backgroundobjects" svg:width="0.001cm" svg:height="0.001cm" svg:x="0cm" svg:y="2.123cm" presentation:class="page"/>
        <draw:frame presentation:style-name="Leer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mit_20_Überschrift" style:display-name="Inhalt mit Überschrif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22" draw:text-style-name="MP23" draw:layer="backgroundobjects" svg:width="8.182cm" svg:height="4.436cm" svg:x="1.749cm" svg:y="1.269cm" presentation:class="title" presentation:user-transformed="true">
        <draw:text-box>
          <text:p text:style-name="MP5"><text:span text:style-name="MT15">Mastertitelformat bearbeiten</text:span></text:p>
        </draw:text-box>
      </draw:frame>
      <draw:frame draw:name="PlaceHolder 2" presentation:style-name="Mpr23" draw:text-style-name="MP23" draw:layer="backgroundobjects" svg:width="12.848cm" svg:height="13.528cm" svg:x="10.797cm" svg:y="2.741cm" presentation:class="outline" presentation:user-transformed="true">
        <draw:text-box>
          <text:list text:style-name="ML10">
            <text:list-item>
              <text:p text:style-name="MP7"><text:span text:style-name="MT16">Mastertext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8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3" draw:text-style-name="MP24" draw:layer="backgroundobjects" svg:width="8.182cm" svg:height="10.578cm" svg:x="1.749cm" svg:y="5.715cm" presentation:class="outline" presentation:user-transformed="true">
        <draw:text-box>
          <text:p text:style-name="MP15"><text:span text:style-name="MT17">Mastertextformat bearbeiten</text:span></text:p>
        </draw:text-box>
      </draw:frame>
      <draw:frame draw:name="PlaceHolder 4" presentation:style-name="Mpr24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5" presentation:style-name="Mpr24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6" presentation:style-name="Mpr24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Inhalt_20_mit_20_Überschrift-title" draw:layer="backgroundobjects" svg:width="0.001cm" svg:height="0.001cm" svg:x="0cm" svg:y="2.123cm" presentation:class="page"/>
        <draw:frame presentation:style-name="Inhalt_20_mit_20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27" draw:text-style-name="MP23" draw:layer="backgroundobjects" svg:width="8.182cm" svg:height="4.436cm" svg:x="1.749cm" svg:y="1.269cm" presentation:class="title" presentation:user-transformed="true">
        <draw:text-box>
          <text:p text:style-name="MP5"><text:span text:style-name="MT15">Mastertitelformat bearbeiten</text:span></text:p>
        </draw:text-box>
      </draw:frame>
      <draw:frame draw:name="PlaceHolder 2" presentation:style-name="Mpr28" draw:text-style-name="MP23" draw:layer="backgroundobjects" svg:width="12.848cm" svg:height="13.528cm" svg:x="10.797cm" svg:y="2.741cm" presentation:class="outline" presentation:user-transformed="true">
        <draw:text-box>
          <text:list text:style-name="ML11">
            <text:list-item>
              <text:p text:style-name="MP25"><text:span text:style-name="MT16">Bild durch Klicken auf Symbol hinzufügen</text:span></text:p>
            </text:list-item>
          </text:list>
        </draw:text-box>
      </draw:frame>
      <draw:frame draw:name="PlaceHolder 3" presentation:style-name="Mpr29" draw:text-style-name="MP24" draw:layer="backgroundobjects" svg:width="8.182cm" svg:height="10.578cm" svg:x="1.749cm" svg:y="5.715cm" presentation:class="outline" presentation:user-transformed="true">
        <draw:text-box>
          <text:p text:style-name="MP15"><text:span text:style-name="MT17">Mastertextformat bearbeiten</text:span></text:p>
        </draw:text-box>
      </draw:frame>
      <draw:frame draw:name="PlaceHolder 4" presentation:style-name="Mpr30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5" presentation:style-name="Mpr30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6" presentation:style-name="Mpr30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Bild_20_mit_20_Überschrift-title" draw:layer="backgroundobjects" svg:width="0.001cm" svg:height="0.001cm" svg:x="0cm" svg:y="2.123cm" presentation:class="page"/>
        <draw:frame presentation:style-name="Bild_20_mit_20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2">
      <office:forms form:automatic-focus="false" form:apply-design-mode="false"/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33" draw:text-style-name="MP27" draw:layer="backgroundobjects" svg:width="21.58cm" svg:height="4.59cm" svg:x="1.921cm" svg:y="6.498cm" presentation:class="title" presentation:user-transformed="true">
        <draw:text-box>
          <text:p text:style-name="MP26"><text:span text:style-name="MT18">Mastertitelformat bearbeiten</text:span></text:p>
        </draw:text-box>
      </draw:frame>
      <draw:frame draw:name="Grafik 7" draw:style-name="Mgr3" draw:text-style-name="MP28" draw:layer="backgroundobjects" svg:width="12.701cm" svg:height="6.993cm" svg:x="7.129cm" svg:y="-1.28cm">
        <draw:image xlink:href="Pictures/1000552500001DFC00001082C4678447.svg" xlink:type="simple" xlink:show="embed" xlink:actuate="onLoad" draw:mime-type="image/svg+xml">
          <text:p/>
        </draw:image>
        <draw:image xlink:href="Pictures/1000000100000122000000A01C174621.png" xlink:type="simple" xlink:show="embed" xlink:actuate="onLoad" draw:mime-type="image/png"/>
      </draw:frame>
      <draw:frame draw:name="PlaceHolder 2" presentation:style-name="Mpr34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3" presentation:style-name="Mpr34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19"><presentation:footer/></text:span></text:p>
        </draw:text-box>
      </draw:frame>
      <draw:frame draw:name="PlaceHolder 4" presentation:style-name="Mpr34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draw:name="Grafik 22" draw:style-name="Mgr3" draw:text-style-name="MP28" draw:layer="backgroundobjects" svg:width="21.58cm" svg:height="2.558cm" svg:x="1.744cm" svg:y="3.374cm">
        <draw:image xlink:href="Pictures/100030300000E33800001B155418B09F.svg" xlink:type="simple" xlink:show="embed" xlink:actuate="onLoad" draw:mime-type="image/svg+xml">
          <text:p/>
        </draw:image>
        <draw:image xlink:href="Pictures/1000000100000800000000F4829ECB2B.png" xlink:type="simple" xlink:show="embed" xlink:actuate="onLoad" draw:mime-type="image/png"/>
      </draw:frame>
      <draw:frame draw:name="PlaceHolder 5" presentation:style-name="Mpr35" draw:text-style-name="MP23" draw:layer="backgroundobjects" svg:width="22.852cm" svg:height="11.041cm" svg:x="1.27cm" svg:y="4.457cm" presentation:class="outline" presentation:user-transformed="true">
        <draw:text-box>
          <text:list text:style-name="ML12">
            <text:list-item>
              <text:p text:style-name="MP29"><text:span text:style-name="MT20">Click to edit the outline text format</text:span></text:p>
              <text:list>
                <text:list-item>
                  <text:p text:style-name="MP30"><text:span text:style-name="MT21">Second Outline Level</text:span></text:p>
                  <text:list>
                    <text:list-item>
                      <text:p text:style-name="MP31"><text:span text:style-name="MT22">Third Outline Level</text:span></text:p>
                      <text:list>
                        <text:list-item>
                          <text:p text:style-name="MP32"><text:span text:style-name="MT23">Fourth Outline Level</text:span></text:p>
                          <text:list>
                            <text:list-item>
                              <text:p text:style-name="MP33"><text:span text:style-name="MT23">Fifth Outline Level</text:span></text:p>
                              <text:list>
                                <text:list-item>
                                  <text:p text:style-name="MP33"><text:span text:style-name="MT23">Sixth Outline Level</text:span></text:p>
                                  <text:list>
                                    <text:list-item>
                                      <text:p text:style-name="MP33"><text:span text:style-name="MT2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elfolie-title" draw:layer="backgroundobjects" svg:width="0.001cm" svg:height="0.001cm" svg:x="0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38" draw:text-style-name="MP27" draw:layer="backgroundobjects" svg:width="21.58cm" svg:height="4.59cm" svg:x="1.921cm" svg:y="6.498cm" presentation:class="title" presentation:user-transformed="true">
        <draw:text-box>
          <text:p text:style-name="MP26"><text:span text:style-name="MT18">Mastertitelformat bearbeiten</text:span></text:p>
        </draw:text-box>
      </draw:frame>
      <draw:frame draw:name="Grafik 7" draw:style-name="Mgr3" draw:text-style-name="MP28" draw:layer="backgroundobjects" svg:width="12.701cm" svg:height="6.993cm" svg:x="7.129cm" svg:y="-1.28cm">
        <draw:image xlink:href="Pictures/1000552500001DFC00001082C4678447.svg" xlink:type="simple" xlink:show="embed" xlink:actuate="onLoad" draw:mime-type="image/svg+xml">
          <text:p/>
        </draw:image>
        <draw:image xlink:href="Pictures/1000000100000122000000A01C174621.png" xlink:type="simple" xlink:show="embed" xlink:actuate="onLoad" draw:mime-type="image/png"/>
      </draw:frame>
      <draw:frame draw:name="PlaceHolder 2" presentation:style-name="Mpr39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3" presentation:style-name="Mpr39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19"><presentation:footer/></text:span></text:p>
        </draw:text-box>
      </draw:frame>
      <draw:frame draw:name="PlaceHolder 4" presentation:style-name="Mpr39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draw:name="Grafik 22" draw:style-name="Mgr3" draw:text-style-name="MP28" draw:layer="backgroundobjects" svg:width="21.58cm" svg:height="2.558cm" svg:x="1.744cm" svg:y="3.374cm">
        <draw:image xlink:href="Pictures/100030300000E33800001B155418B09F.svg" xlink:type="simple" xlink:show="embed" xlink:actuate="onLoad" draw:mime-type="image/svg+xml">
          <text:p/>
        </draw:image>
        <draw:image xlink:href="Pictures/1000000100000800000000F4829ECB2B.png" xlink:type="simple" xlink:show="embed" xlink:actuate="onLoad" draw:mime-type="image/png"/>
      </draw:frame>
      <draw:frame draw:name="PlaceHolder 5" presentation:style-name="Mpr40" draw:text-style-name="MP23" draw:layer="backgroundobjects" svg:width="22.852cm" svg:height="11.041cm" svg:x="1.27cm" svg:y="4.457cm" presentation:class="outline" presentation:user-transformed="true">
        <draw:text-box>
          <text:list text:style-name="ML12">
            <text:list-item>
              <text:p text:style-name="MP29"><text:span text:style-name="MT20">Click to edit the outline text format</text:span></text:p>
              <text:list>
                <text:list-item>
                  <text:p text:style-name="MP30"><text:span text:style-name="MT21">Second Outline Level</text:span></text:p>
                  <text:list>
                    <text:list-item>
                      <text:p text:style-name="MP31"><text:span text:style-name="MT22">Third Outline Level</text:span></text:p>
                      <text:list>
                        <text:list-item>
                          <text:p text:style-name="MP32"><text:span text:style-name="MT23">Fourth Outline Level</text:span></text:p>
                          <text:list>
                            <text:list-item>
                              <text:p text:style-name="MP33"><text:span text:style-name="MT23">Fifth Outline Level</text:span></text:p>
                              <text:list>
                                <text:list-item>
                                  <text:p text:style-name="MP33"><text:span text:style-name="MT23">Sixth Outline Level</text:span></text:p>
                                  <text:list>
                                    <text:list-item>
                                      <text:p text:style-name="MP33"><text:span text:style-name="MT2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vertikaler_20_Text" style:display-name="Titel und vertikaler Tex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43" draw:text-style-name="MP6" draw:layer="backgroundobjects" svg:width="21.899cm" svg:height="3.672cm" svg:x="1.744cm" svg:y="1.012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PlaceHolder 2" presentation:style-name="Mpr44" draw:text-style-name="MP9" draw:layer="backgroundobjects" svg:width="21.899cm" svg:height="12.078cm" svg:x="1.744cm" svg:y="5.07cm" presentation:class="outline" presentation:user-transformed="true">
        <draw:text-box>
          <text:list text:style-name="ML3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8"><text:span text:style-name="MT5">Dritte Ebene</text:span></text:p>
                      <text:list>
                        <text:list-item>
                          <text:p text:style-name="MP8"><text:span text:style-name="MT6">Vierte Ebene</text:span></text:p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5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4" presentation:style-name="Mpr45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5" presentation:style-name="Mpr45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el_20_und_20_vertikaler_20_Text-title" draw:layer="backgroundobjects" svg:width="0.001cm" svg:height="0.001cm" svg:x="0cm" svg:y="2.123cm" presentation:class="page"/>
        <draw:frame presentation:style-name="Titel_20_und_20_vertikaler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kaler_20_Titel_20_und_20_Text" style:display-name="Vertikaler Titel und Tex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48" draw:text-style-name="MP6" draw:layer="backgroundobjects" svg:width="5.467cm" svg:height="16.134cm" svg:x="18.176cm" svg:y="1.012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PlaceHolder 2" presentation:style-name="Mpr49" draw:text-style-name="MP9" draw:layer="backgroundobjects" svg:width="16.103cm" svg:height="16.135cm" svg:x="1.744cm" svg:y="1.012cm" presentation:class="outline" presentation:user-transformed="true">
        <draw:text-box>
          <text:list text:style-name="ML3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8"><text:span text:style-name="MT5">Dritte Ebene</text:span></text:p>
                      <text:list>
                        <text:list-item>
                          <text:p text:style-name="MP8"><text:span text:style-name="MT6">Vierte Ebene</text:span></text:p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50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4" presentation:style-name="Mpr50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5" presentation:style-name="Mpr50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Vertikaler_20_Titel_20_und_20_Text-title" draw:layer="backgroundobjects" svg:width="0.001cm" svg:height="0.001cm" svg:x="0cm" svg:y="2.123cm" presentation:class="page"/>
        <draw:frame presentation:style-name="Vertikaler_20_Titel_20_u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53" draw:text-style-name="MP23" draw:layer="backgroundobjects" svg:width="21.899cm" svg:height="3.672cm" svg:x="1.744cm" svg:y="2.596cm" presentation:class="title" presentation:user-transformed="true">
        <draw:text-box>
          <text:p text:style-name="MP5"><text:span text:style-name="MT24">Mastertitelformat bearbeiten</text:span></text:p>
        </draw:text-box>
      </draw:frame>
      <draw:frame draw:name="PlaceHolder 2" presentation:style-name="Mpr54" draw:text-style-name="MP34" draw:layer="backgroundobjects" svg:width="21.899cm" svg:height="10.59cm" svg:x="1.744cm" svg:y="6.557cm" presentation:class="outline" presentation:user-transformed="true">
        <draw:text-box>
          <text:list text:style-name="ML13">
            <text:list-item>
              <text:p text:style-name="MP7"><text:span text:style-name="MT25">Mastertextformat bearbeiten</text:span></text:p>
              <text:list>
                <text:list-item>
                  <text:p text:style-name="MP8"><text:span text:style-name="MT25">Zweite Ebene</text:span></text:p>
                  <text:list>
                    <text:list-item>
                      <text:p text:style-name="MP8"><text:span text:style-name="MT25">Dritte Ebene</text:span></text:p>
                      <text:list>
                        <text:list-item>
                          <text:p text:style-name="MP8"><text:span text:style-name="MT25">Vierte Ebene</text:span></text:p>
                          <text:list>
                            <text:list-item>
                              <text:p text:style-name="MP8"><text:span text:style-name="MT2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55" draw:text-style-name="MP35" draw:layer="backgroundobjects" svg:width="5.705cm" svg:height="1.004cm" svg:x="1.744cm" svg:y="17.656cm" presentation:class="date-time" presentation:user-transformed="true">
        <draw:text-box>
          <text:p text:style-name="MP10"><text:span text:style-name="MT26"><presentation:date-time/></text:span></text:p>
        </draw:text-box>
      </draw:frame>
      <draw:frame draw:name="PlaceHolder 4" presentation:style-name="Mpr56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19"><presentation:footer/></text:span></text:p>
        </draw:text-box>
      </draw:frame>
      <draw:frame draw:name="PlaceHolder 5" presentation:style-name="Mpr56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26"><text:page-number>&lt;number&gt;</text:page-number></text:span></text:p>
        </draw:text-box>
      </draw:frame>
      <draw:frame draw:name="Grafik 9" draw:style-name="Mgr3" draw:text-style-name="MP28" draw:layer="backgroundobjects" svg:width="7.61cm" svg:height="4.188cm" svg:x="9.364cm" svg:y="-0.754cm">
        <draw:image xlink:href="Pictures/1000552500001DFC00001082C4678447.svg" xlink:type="simple" xlink:show="embed" xlink:actuate="onLoad" draw:mime-type="image/svg+xml">
          <text:p/>
        </draw:image>
        <draw:image xlink:href="Pictures/1000000100000122000000A01C174621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0.001cm" svg:height="0.001cm" svg:x="0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59" draw:text-style-name="MP36" draw:layer="backgroundobjects" svg:width="21.899cm" svg:height="7.914cm" svg:x="1.732cm" svg:y="4.747cm" presentation:class="title" presentation:user-transformed="true">
        <draw:text-box>
          <text:p text:style-name="MP5"><text:span text:style-name="MT27">Mastertitelformat bearbeiten</text:span></text:p>
        </draw:text-box>
      </draw:frame>
      <draw:frame draw:name="PlaceHolder 2" presentation:style-name="Mpr60" draw:text-style-name="MP16" draw:layer="backgroundobjects" svg:width="21.899cm" svg:height="4.157cm" svg:x="1.732cm" svg:y="12.748cm" presentation:class="outline" presentation:user-transformed="true">
        <draw:text-box>
          <text:list text:style-name="ML11">
            <text:list-item>
              <text:p text:style-name="MP15"><text:span text:style-name="MT28">Mastertextformat bearbeiten</text:span></text:p>
            </text:list-item>
          </text:list>
        </draw:text-box>
      </draw:frame>
      <draw:frame draw:name="PlaceHolder 3" presentation:style-name="Mpr61" draw:text-style-name="MP11" draw:layer="backgroundobjects" svg:width="5.705cm" svg:height="1.004cm" svg:x="1.744cm" svg:y="17.656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PlaceHolder 4" presentation:style-name="Mpr61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8"><presentation:footer/></text:span></text:p>
        </draw:text-box>
      </draw:frame>
      <draw:frame draw:name="PlaceHolder 5" presentation:style-name="Mpr61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Abschnitts-_a_überschrift-title" draw:layer="backgroundobjects" svg:width="0.001cm" svg:height="0.001cm" svg:x="0cm" svg:y="2.123cm" presentation:class="page"/>
        <draw:frame presentation:style-name="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2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64" draw:text-style-name="MP23" draw:layer="backgroundobjects" svg:width="21.899cm" svg:height="3.672cm" svg:x="1.744cm" svg:y="2.596cm" presentation:class="title" presentation:user-transformed="true">
        <draw:text-box>
          <text:p text:style-name="MP5"><text:span text:style-name="MT24">Mastertitelformat bearbeiten</text:span></text:p>
        </draw:text-box>
      </draw:frame>
      <draw:frame draw:name="PlaceHolder 2" presentation:style-name="Mpr65" draw:text-style-name="MP34" draw:layer="backgroundobjects" svg:width="21.899cm" svg:height="10.59cm" svg:x="1.744cm" svg:y="6.557cm" presentation:class="outline" presentation:user-transformed="true">
        <draw:text-box>
          <text:list text:style-name="ML13">
            <text:list-item>
              <text:p text:style-name="MP7"><text:span text:style-name="MT25">Mastertextformat bearbeiten</text:span></text:p>
              <text:list>
                <text:list-item>
                  <text:p text:style-name="MP8"><text:span text:style-name="MT25">Zweite Ebene</text:span></text:p>
                  <text:list>
                    <text:list-item>
                      <text:p text:style-name="MP8"><text:span text:style-name="MT25">Dritte Ebene</text:span></text:p>
                      <text:list>
                        <text:list-item>
                          <text:p text:style-name="MP8"><text:span text:style-name="MT25">Vierte Ebene</text:span></text:p>
                          <text:list>
                            <text:list-item>
                              <text:p text:style-name="MP8"><text:span text:style-name="MT2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66" draw:text-style-name="MP35" draw:layer="backgroundobjects" svg:width="5.705cm" svg:height="1.004cm" svg:x="1.744cm" svg:y="17.656cm" presentation:class="date-time" presentation:user-transformed="true">
        <draw:text-box>
          <text:p text:style-name="MP10"><text:span text:style-name="MT26"><presentation:date-time/></text:span></text:p>
        </draw:text-box>
      </draw:frame>
      <draw:frame draw:name="PlaceHolder 4" presentation:style-name="Mpr67" draw:text-style-name="MP13" draw:layer="backgroundobjects" svg:width="8.564cm" svg:height="1.004cm" svg:x="8.413cm" svg:y="17.656cm" presentation:class="footer" presentation:user-transformed="true">
        <draw:text-box>
          <text:p text:style-name="MP12"><text:span text:style-name="MT19"><presentation:footer/></text:span></text:p>
        </draw:text-box>
      </draw:frame>
      <draw:frame draw:name="PlaceHolder 5" presentation:style-name="Mpr67" draw:text-style-name="MP11" draw:layer="backgroundobjects" svg:width="5.705cm" svg:height="1.004cm" svg:x="17.938cm" svg:y="17.656cm" presentation:class="page-number" presentation:user-transformed="true">
        <draw:text-box>
          <text:p text:style-name="MP14"><text:span text:style-name="MT26"><text:page-number>&lt;number&gt;</text:page-number></text:span></text:p>
        </draw:text-box>
      </draw:frame>
      <draw:frame draw:name="Grafik 9" draw:style-name="Mgr3" draw:text-style-name="MP28" draw:layer="backgroundobjects" svg:width="7.61cm" svg:height="4.188cm" svg:x="9.364cm" svg:y="-0.754cm">
        <draw:image xlink:href="Pictures/1000552500001DFC00001082C4678447.svg" xlink:type="simple" xlink:show="embed" xlink:actuate="onLoad" draw:mime-type="image/svg+xml">
          <text:p/>
        </draw:image>
        <draw:image xlink:href="Pictures/1000000100000122000000A01C174621.png" xlink:type="simple" xlink:show="embed" xlink:actuate="onLoad" draw:mime-type="image/png"/>
      </draw:frame>
      <presentation:notes style:page-layout-name="PM0">
        <draw:page-thumbnail presentation:style-name="_31__5f_Titel_20_und_20_Inhalt-title" draw:layer="backgroundobjects" svg:width="0.001cm" svg:height="0.001cm" svg:x="0cm" svg:y="2.123cm" presentation:class="page"/>
        <draw:frame presentation:style-name="_31__5f_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1T10:45:46</meta:creation-date>
    <meta:initial-creator>Philipp Bierwirth</meta:initial-creator>
    <dc:language>en-US</dc:language>
    <meta:print-date>2026-06-22T16:41:52.678972659</meta:print-date>
    <dc:date>2026-06-22T17:01:36.414788612</dc:date>
    <meta:editing-cycles>182</meta:editing-cycles>
    <meta:editing-duration>PT12H29M32S</meta:editing-duration>
    <meta:generator>LibreOffice/26.2.4.2$Linux_X86_64 LibreOffice_project/620$Build-2</meta:generator>
    <meta:printed-by>PDF files</meta:printed-by>
    <meta:document-statistic meta:object-count="300"/>
    <meta:user-defined meta:name="AppVersion">15.0000</meta:user-defined>
    <meta:user-defined meta:name="MMClips" meta:value-type="float">2</meta:user-defined>
    <meta:user-defined meta:name="Notes" meta:value-type="float">1</meta:user-defined>
    <meta:user-defined meta:name="PresentationFormat">Bildschirmpräsentation (4:3)</meta:user-defined>
    <meta:user-defined meta:name="Slides" meta:value-type="float">26</meta:user-defined>
    <meta:template xlink:type="simple" xlink:actuate="onRequest" xlink:title="Office Theme" xlink:href=""/>
  </office:meta>
</office:document-meta>
</file>

<file path=Object 1/content.xml><?xml version="1.0" encoding="utf-8"?>
<math xmlns="http://www.w3.org/1998/Math/MathML" display="block">
  <semantics>
    <mstyle mathcolor="white">
      <mrow>
        <msub>
          <mi>β</mi>
          <mn>0</mn>
        </msub>
        <mo stretchy="false">+</mo>
        <mrow>
          <msub>
            <mi>β</mi>
            <mn>1</mn>
          </msub>
          <mo stretchy="false">×</mo>
          <msub>
            <mi>x</mi>
            <mn>1</mn>
          </msub>
        </mrow>
        <mo stretchy="false">+</mo>
        <mrow>
          <msub>
            <mi>β</mi>
            <mn>2</mn>
          </msub>
          <mo stretchy="false">×</mo>
          <msub>
            <mi>x</mi>
            <mn>2</mn>
          </msub>
        </mrow>
      </mrow>
    </mstyle>
    <annotation encoding="StarMath 5.0">color white{ %beta_{0} + %beta_{1} times x_1 + %beta_2 times x_2 }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style mathcolor="white">
      <mrow>
        <msub>
          <mi>β</mi>
          <mn>0</mn>
        </msub>
        <mo stretchy="false">+</mo>
        <mrow>
          <msub>
            <mi>β</mi>
            <mn>1</mn>
          </msub>
          <mo stretchy="false">×</mo>
          <msub>
            <mi>x</mi>
            <mn>1</mn>
          </msub>
        </mrow>
        <mo stretchy="false">+</mo>
        <mrow>
          <msub>
            <mi>β</mi>
            <mn>2</mn>
          </msub>
          <mo stretchy="false">×</mo>
          <msub>
            <mi>x</mi>
            <mn>2</mn>
          </msub>
        </mrow>
      </mrow>
    </mstyle>
    <annotation encoding="StarMath 5.0">color white{ %beta_{0} + %beta_{1} times x_1 + %beta_2 times x_2 }</annotation>
  </semantics>
</math>
</file>