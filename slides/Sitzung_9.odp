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Pictures/1000000100000960000009601691CC6D.png" manifest:media-type="image/png"/>
  <manifest:file-entry manifest:full-path="Pictures/100000010000096000000960BAE272A4.png" manifest:media-type="image/png"/>
  <manifest:file-entry manifest:full-path="Pictures/TablePreview7.svm" manifest:media-type=""/>
  <manifest:file-entry manifest:full-path="Pictures/100000010000096000000960C1E74EFB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2.svm" manifest:media-type=""/>
  <manifest:file-entry manifest:full-path="Pictures/10000001000001640000014D740B1280.png" manifest:media-type="image/png"/>
  <manifest:file-entry manifest:full-path="Pictures/TablePreview1.svm" manifest:media-type=""/>
  <manifest:file-entry manifest:full-path="Pictures/10000001000004950000046764B14BE0.png" manifest:media-type="image/png"/>
  <manifest:file-entry manifest:full-path="Pictures/1000000100000497000004665B1F80D6.png" manifest:media-type="image/png"/>
  <manifest:file-entry manifest:full-path="Pictures/10000001000002F000000048422E8E44.png" manifest:media-type="image/png"/>
  <manifest:file-entry manifest:full-path="Pictures/100000010000047D0000046725ED115B.png" manifest:media-type="image/png"/>
  <manifest:file-entry manifest:full-path="Pictures/TablePreview3.svm" manifest:media-type=""/>
  <manifest:file-entry manifest:full-path="Pictures/1000000100000800000000F4829ECB2B.png" manifest:media-type="image/png"/>
  <manifest:file-entry manifest:full-path="Pictures/100000010000028D000000D949F7CE57.png" manifest:media-type="image/png"/>
  <manifest:file-entry manifest:full-path="Pictures/10000001000004E600000467FF3733B4.png" manifest:media-type="image/png"/>
  <manifest:file-entry manifest:full-path="Pictures/1000000100000122000000A01C174621.png" manifest:media-type="image/png"/>
  <manifest:file-entry manifest:full-path="Pictures/10000001000004E70000046747D45128.png" manifest:media-type="image/png"/>
  <manifest:file-entry manifest:full-path="Pictures/100030300000E33800001B155418B09F.svg" manifest:media-type="image/svg+xml"/>
  <manifest:file-entry manifest:full-path="Pictures/1000000100000648000004654C1B4988.png" manifest:media-type="image/png"/>
  <manifest:file-entry manifest:full-path="Pictures/100000010000096000000960405863A4.png" manifest:media-type="image/png"/>
  <manifest:file-entry manifest:full-path="Pictures/1000552500001DFC00001082C4678447.svg" manifest:media-type="image/svg+xml"/>
  <manifest:file-entry manifest:full-path="Pictures/100000010000049D000004637117AD83.png" manifest:media-type="image/png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4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content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/>
    <style:font-face style:name="Aptos Display" svg:font-family="'Aptos Display'"/>
    <style:font-face style:name="Arial" svg:font-family="Arial"/>
    <style:font-face style:name="Calibri" svg:font-family="Calibri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 New Roman" svg:font-family="'Time New Roman'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9.244cm" loext:decorative="false"/>
      <style:paragraph-properties style:writing-mode="lr-tb"/>
    </style:style>
    <style:style style:name="gr3" style:family="graphic" style:parent-style-name="Default_20_Drawing_20_Style_5f_1" style:list-style-name="L6">
      <style:graphic-properties draw:stroke="none" svg:stroke-width="0.053cm" draw:stroke-linejoin="miter" svg:stroke-linecap="butt" draw:fill="solid" draw:fill-color="#ef8a62" draw:textarea-horizontal-align="justify" draw:textarea-vertical-align="middle" draw:auto-grow-height="false" draw:fit-to-size="false" style:shrink-to-fit="false" fo:min-height="1.66cm" fo:min-width="4.20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Default_20_Drawing_20_Style_5f_1">
      <style:graphic-properties draw:stroke="solid" svg:stroke-width="0cm" svg:stroke-color="#000000" draw:marker-start="msArrowEnd_20_5" draw:marker-start-width="0.21cm" draw:marker-start-center="false" draw:marker-end="msArrowEnd_20_5" draw:marker-end-width="0.21cm" draw:marker-end-center="fals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gr5" style:family="graphic" style:parent-style-name="Default_20_Drawing_20_Style_5f_1" style:list-style-name="L6">
      <style:graphic-properties draw:stroke="none" svg:stroke-width="0.053cm" draw:stroke-linejoin="miter" svg:stroke-linecap="butt" draw:fill="solid" draw:fill-color="#67a9cf" draw:textarea-horizontal-align="justify" draw:textarea-vertical-align="middle" draw:auto-grow-height="false" draw:fit-to-size="false" style:shrink-to-fit="false" fo:min-height="1.66cm" fo:min-width="4.20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Default_20_Drawing_20_Style_5f_1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Default_20_Drawing_20_Style_5f_1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Default_20_Drawing_20_Style_5f_1">
      <style:graphic-properties draw:stroke="solid" svg:stroke-width="0.053cm" svg:stroke-color="#000000" draw:marker-start="msArrowEnd_20_5" draw:marker-start-width="0.21cm" draw:marker-start-center="false" draw:marker-end="msArrowEnd_20_5" draw:marker-end-width="0.21cm" draw:marker-end-center="false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gr9" style:family="graphic" style:parent-style-name="Default_20_Drawing_20_Style_5f_1" style:list-style-name="L6">
      <style:graphic-properties draw:stroke="none" svg:stroke-width="0cm" draw:fill="bitmap" draw:fill-image-name="msFillBitmap_20_5" style:repeat="stretch" draw:textarea-horizontal-align="justify" draw:textarea-vertical-align="top" draw:auto-grow-height="false" draw:fit-to-size="false" style:shrink-to-fit="false" fo:min-height="0.936cm" fo:min-width="12.21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Default_20_Drawing_20_Style_5f_1">
      <style:graphic-properties draw:stroke="solid" svg:stroke-width="0cm" svg:stroke-color="#000000" draw:marker-end="msArrowEnd_20_5" draw:marker-end-width="0.21cm" draw:marker-end-center="fals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gr11" style:family="graphic" style:parent-style-name="Default_20_Drawing_20_Style_5f_1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Default_20_Drawing_20_Style_5f_1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8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41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909cm" loext:decorative="false"/>
      <style:paragraph-properties style:writing-mode="lr-tb"/>
    </style:style>
    <style:style style:name="gr19" style:family="graphic" style:parent-style-name="standard">
      <style:graphic-properties svg:stroke-width="0.051cm" svg:stroke-color="#000000" draw:marker-start-width="0.279cm" draw:marker-end-width="0.279cm" draw:fill="solid" draw:fill-color="#66c2a5" draw:textarea-horizontal-align="justify" draw:textarea-vertical-align="middle" draw:auto-grow-height="false" fo:min-height="0.648cm" fo:min-width="0.398cm" fo:padding-top="0.15cm" fo:padding-bottom="0.15cm" fo:padding-left="0.275cm" fo:padding-right="0.275cm" loext:decorative="false"/>
    </style:style>
    <style:style style:name="gr20" style:family="graphic" style:parent-style-name="standard">
      <style:graphic-properties draw:stroke="solid" draw:stroke-dash="Dot_20__28_Rounded_29_" svg:stroke-width="0.051cm" svg:stroke-color="#000000" draw:marker-start-width="0.279cm" draw:marker-end-width="0.279cm" svg:stroke-linecap="round" draw:fill="solid" draw:fill-color="#fc8d62" draw:textarea-horizontal-align="justify" draw:textarea-vertical-align="middle" draw:auto-grow-height="false" fo:min-height="0.648cm" fo:min-width="0.398cm" fo:padding-top="0.15cm" fo:padding-bottom="0.15cm" fo:padding-left="0.275cm" fo:padding-right="0.275cm" loext:decorative="false"/>
    </style:style>
    <style:style style:name="gr21" style:family="graphic" style:parent-style-name="objectwithoutfill">
      <style:graphic-properties svg:stroke-width="0.051cm" svg:stroke-color="#000000" draw:marker-start-width="0.279cm" draw:marker-end="Arrowheads_20_1" draw:marker-end-width="0.279cm" draw:fill="none" draw:textarea-vertical-align="middle" fo:padding-top="0.15cm" fo:padding-bottom="0.15cm" fo:padding-left="0.275cm" fo:padding-right="0.275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655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loext:decorative="false"/>
      <style:paragraph-properties style:writing-mode="lr-tb"/>
    </style:style>
    <style:style style:name="gr24" style:family="graphic" style:parent-style-name="standard">
      <style:graphic-properties svg:stroke-width="0.051cm" svg:stroke-color="#000000" draw:marker-start-width="0.279cm" draw:marker-end-width="0.279cm" draw:fill="solid" draw:fill-color="#66c2a5" draw:textarea-horizontal-align="justify" draw:textarea-vertical-align="middle" draw:auto-grow-height="false" fo:min-height="0.598cm" fo:min-width="0.348cm" fo:padding-top="0.15cm" fo:padding-bottom="0.15cm" fo:padding-left="0.275cm" fo:padding-right="0.275cm" loext:decorative="false"/>
    </style:style>
    <style:style style:name="gr25" style:family="graphic" style:parent-style-name="standard">
      <style:graphic-properties draw:stroke="solid" draw:stroke-dash="Dot_20__28_Rounded_29_" svg:stroke-width="0.051cm" svg:stroke-color="#000000" draw:marker-start-width="0.279cm" draw:marker-end-width="0.279cm" svg:stroke-linecap="round" draw:fill="solid" draw:fill-color="#fc8d62" draw:textarea-horizontal-align="justify" draw:textarea-vertical-align="middle" draw:auto-grow-height="false" fo:min-height="0.598cm" fo:min-width="0.348cm" fo:padding-top="0.15cm" fo:padding-bottom="0.15cm" fo:padding-left="0.275cm" fo:padding-right="0.275cm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12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loext:decorative="false"/>
    </style:style>
    <style:style style:name="gr28" style:family="graphic" style:parent-style-name="objectwithoutfill">
      <style:graphic-properties draw:stroke="dash" draw:stroke-dash="Double_20_Dash" svg:stroke-width="0.051cm" svg:stroke-color="#8b0000" draw:marker-start-width="0.279cm" draw:marker-end-width="0.279cm" svg:stroke-linecap="butt" draw:fill="none" draw:textarea-vertical-align="middle" fo:padding-top="0.15cm" fo:padding-bottom="0.15cm" fo:padding-left="0.275cm" fo:padding-right="0.275cm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loext:decorative="false"/>
      <style:paragraph-properties style:writing-mode="lr-tb"/>
    </style:style>
    <style:style style:name="gr30" style:family="graphic" style:parent-style-name="standard">
      <style:graphic-properties loext:decorative="false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655cm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655cm" loext:decorative="false"/>
      <style:paragraph-properties style:writing-mode="lr-tb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center" draw:auto-grow-height="true" draw:auto-grow-width="false" fo:min-height="1.655cm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center" draw:auto-grow-height="true" draw:auto-grow-width="false" fo:min-height="1.655cm" loext:decorative="false"/>
      <style:paragraph-properties style:writing-mode="lr-tb"/>
    </style:style>
    <style:style style:name="gr3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655cm" loext:decorative="false"/>
      <style:paragraph-properties style:writing-mode="lr-tb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655cm" loext:decorative="false"/>
      <style:paragraph-properties style:writing-mode="lr-tb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5.689cm" loext:decorative="false"/>
      <style:paragraph-properties style:writing-mode="lr-tb"/>
    </style:style>
    <style:style style:name="gr38" style:family="graphic" style:parent-style-name="Object_20_with_20_no_20_fill_20_and_20_no_20_line">
      <style:graphic-properties svg:stroke-color="#ffffff" draw:textarea-horizontal-align="center" draw:textarea-vertical-align="middle" draw:ole-draw-aspect="1" style:protect="size" loext:decorative="false"/>
    </style:style>
    <style:style style:name="gr39" style:family="graphic" style:parent-style-name="standard" style:list-style-name="L2">
      <style:graphic-properties draw:stroke="none" svg:stroke-color="#000000" draw:fill="none" draw:fill-color="#ffffff" draw:textarea-horizontal-align="center" draw:auto-grow-height="true" draw:auto-grow-width="false" fo:min-height="5.689cm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6.4cm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6.4cm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78cm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5.689cm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1.377cm" loext:decorative="false"/>
      <style:paragraph-properties style:writing-mode="lr-tb"/>
    </style:style>
    <style:style style:name="gr4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7.305cm" loext:decorative="false"/>
      <style:paragraph-properties style:writing-mode="lr-tb"/>
    </style:style>
    <style:style style:name="gr47" style:family="graphic" style:parent-style-name="objectwithoutfill">
      <style:graphic-properties svg:stroke-color="#ffffff" draw:marker-end="Arrowheads_20_2" draw:marker-end-width="0.2cm" draw:fill="none" draw:textarea-vertical-align="middle" loext:decorative="false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in-height="7.822cm" loext:decorative="false"/>
      <style:paragraph-properties style:writing-mode="lr-tb"/>
    </style:style>
    <style:style style:name="gr50" style:family="graphic" style:parent-style-name="objectwithoutfill">
      <style:graphic-properties svg:stroke-color="#ffffff" draw:marker-end="Arrowheads_20_3" draw:marker-end-width="0.2cm" draw:fill="solid" draw:fill-color="#ffffff" draw:textarea-vertical-align="middle" loext:decorative="false"/>
    </style:style>
    <style:style style:name="gr51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199cm" fo:min-width="0cm" fo:padding-top="0.15cm" fo:padding-bottom="0.15cm" fo:padding-left="0.275cm" fo:padding-right="0.275cm" style:writing-mode="lr-tb" loext:decorative="false"/>
      <style:paragraph-properties style:writing-mode="lr-tb"/>
    </style:style>
    <style:style style:name="gr52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149cm" fo:min-width="0cm" fo:padding-top="0.15cm" fo:padding-bottom="0.15cm" fo:padding-left="0.275cm" fo:padding-right="0.275cm" style:writing-mode="lr-tb" loext:decorative="false"/>
      <style:paragraph-properties style:writing-mode="lr-tb"/>
    </style:style>
    <style:style style:name="gr53" style:family="graphic" style:parent-style-name="objectwithoutfill">
      <style:graphic-properties svg:stroke-color="#ffffff" draw:fill="none" draw:textarea-vertical-align="middle" loext:decorative="false"/>
    </style:style>
    <style:style style:name="gr54" style:family="graphic" style:parent-style-name="objectwithoutfill">
      <style:graphic-properties draw:stroke="dash" draw:stroke-dash="Long_20_Dash" svg:stroke-color="#ff0000" svg:stroke-linecap="butt" draw:fill="none" draw:textarea-vertical-align="middle" loext:decorative="false"/>
    </style:style>
    <style:style style:name="gr5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134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3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fo:min-height="0.713cm" loext:decorative="false"/>
      <style:paragraph-properties style:writing-mode="lr-tb"/>
    </style:style>
    <style:style style:name="gr6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78cm" loext:decorative="false"/>
      <style:paragraph-properties style:writing-mode="lr-tb"/>
    </style:style>
    <style:style style:name="gr6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168cm" loext:decorative="false"/>
      <style:paragraph-properties style:writing-mode="lr-tb"/>
    </style:style>
    <style:style style:name="gr6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168cm" loext:decorative="false"/>
      <style:paragraph-properties style:writing-mode="lr-tb"/>
    </style:style>
    <style:style style:name="gr63" style:family="graphic" style:parent-style-name="objectwithoutfill">
      <style:graphic-properties svg:stroke-width="0.051cm" svg:stroke-color="#ffffff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6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4.996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fo:min-height="2.221cm" loext:decorative="false"/>
      <style:paragraph-properties style:writing-mode="lr-tb"/>
    </style:style>
    <style:style style:name="gr66" style:family="graphic" style:parent-style-name="objectwithoutfill">
      <style:graphic-properties svg:stroke-color="#ffffff" draw:marker-end="Arrowheads_20_4" draw:marker-end-width="0.2cm" draw:fill="none" draw:textarea-vertical-align="middle" loext:decorative="false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6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423cm" loext:decorative="false"/>
      <style:paragraph-properties style:writing-mode="lr-tb"/>
    </style:style>
    <style:style style:name="gr6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134cm" loext:decorative="false"/>
      <style:paragraph-properties style:writing-mode="lr-tb"/>
    </style:style>
    <style:style style:name="pr1" style:family="presentation" style:parent-style-name="Defaul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title">
      <style:graphic-properties fo:min-height="4.59cm" loext:decorative="false"/>
      <style:paragraph-properties style:writing-mode="lr-tb"/>
    </style:style>
    <style:style style:name="pr6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7" style:family="presentation" style:parent-style-name="Titel_20_und_20_Inhalt-title">
      <style:graphic-properties draw:textarea-horizontal-align="center" fo:min-height="3.672cm" loext:decorative="false"/>
      <style:paragraph-properties style:writing-mode="lr-tb"/>
    </style:style>
    <style:style style:name="pr8" style:family="presentation" style:parent-style-name="Titel_20_und_20_Inhalt-notes">
      <style:graphic-properties draw:fill-color="#ffffff" draw:auto-grow-height="false" fo:min-height="12.573cm" loext:decorative="false"/>
      <style:paragraph-properties style:writing-mode="lr-tb"/>
    </style:style>
    <style:style style:name="pr9" style:family="presentation" style:parent-style-name="_31__5f_Titel_20_und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_31__5f_Titel_20_und_20_Inhalt-backgroundobjects" style:list-style-name="L5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_31__5f_Titel_20_und_20_Inhalt-backgroundobjects" style:list-style-name="L5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_31__5f_Titel_20_und_20_Inhalt-notes">
      <style:graphic-properties draw:fill-color="#ffffff" draw:auto-grow-height="false" fo:min-height="12.573cm" loext:decorative="false"/>
      <style:paragraph-properties style:writing-mode="lr-tb"/>
    </style:style>
    <style:style style:name="pr13" style:family="presentation" style:parent-style-name="Titelfoli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elfolie-notes">
      <style:graphic-properties draw:fill-color="#ffffff" draw:auto-grow-height="false" fo:min-height="12.573cm" loext:decorative="false"/>
      <style:paragraph-properties style:writing-mode="lr-tb"/>
    </style:style>
    <style:style style:name="pr15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Titel_20_und_20_Inhalt-title">
      <style:graphic-properties fo:min-height="3.672cm" loext:decorative="false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175cm" style:use-optimal-row-height="false"/>
    </style:style>
    <style:style style:name="ro2" style:family="table-row">
      <style:table-row-properties style:row-height="1.24cm" style:use-optimal-row-height="false"/>
    </style:style>
    <style:style style:name="ro3" style:family="table-row">
      <style:table-row-properties style:row-height="1.241cm" style:use-optimal-row-height="false"/>
    </style:style>
    <style:style style:name="ro4" style:family="table-row">
      <style:table-row-properties style:row-height="1.245cm" style:use-optimal-row-height="false"/>
    </style:style>
    <style:style style:name="ce1" style:family="table-cell">
      <style:paragraph-properties fo:text-align="center"/>
      <style:text-properties fo:color="#ffffff" loext:opacity="100%"/>
    </style:style>
    <style:style style:name="ce2" style:family="table-cell">
      <loext:graphic-properties draw:textarea-horizontal-align="center"/>
      <style:paragraph-properties fo:text-align="center"/>
      <style:text-properties fo:color="#ffffff" loext:opacity="100%"/>
    </style:style>
    <style:style style:name="ce3" style:family="table-cell">
      <style:paragraph-properties fo:text-align="center" fo:border-left="0.28pt solid #000000" fo:border-right="0.28pt solid #000000" fo:border-top="0.28pt solid #000000" fo:border-bottom="none"/>
      <style:text-properties fo:color="#ffffff" loext:opacity="100%"/>
    </style:style>
    <style:style style:name="ce4" style:family="table-cell">
      <style:paragraph-properties fo:text-align="center" fo:border-left="0.28pt solid #000000" fo:border-right="none" fo:border-top="0.28pt solid #000000" fo:border-bottom="0.28pt solid #000000"/>
      <style:text-properties fo:color="#ffffff" loext:opacity="100%"/>
    </style:style>
    <style:style style:name="ce5" style:family="table-cell">
      <loext:graphic-properties draw:fill="solid" draw:fill-color="#66c2a5"/>
      <style:paragraph-properties fo:text-align="center" fo:border="0.28pt solid #000000"/>
      <style:text-properties fo:color="#000000" loext:opacity="100%" fo:background-color="transparent"/>
    </style:style>
    <style:style style:name="ce6" style:family="table-cell">
      <loext:graphic-properties draw:fill="solid" draw:fill-color="#fc8d62"/>
      <style:paragraph-properties fo:text-align="center" fo:border-left="none" fo:border-right="0.28pt solid #000000" fo:border-top="0.28pt solid #000000" fo:border-bottom="none"/>
      <style:text-properties fo:color="#000000" loext:opacity="100%"/>
    </style:style>
    <style:style style:name="ce7" style:family="table-cell">
      <style:paragraph-properties fo:text-align="center" fo:border-left="none" fo:border-right="0.28pt solid #000000" fo:border-top="0.28pt solid #000000" fo:border-bottom="0.28pt solid #000000"/>
      <style:text-properties fo:color="#ffffff" loext:opacity="100%"/>
    </style:style>
    <style:style style:name="ce8" style:family="table-cell">
      <loext:graphic-properties draw:fill="solid" draw:fill-color="#fc8d62"/>
      <style:paragraph-properties fo:text-align="center" fo:border-left="0.28pt solid #000000" fo:border-right="none" fo:border-top="none" fo:border-bottom="0.28pt solid #000000"/>
      <style:text-properties fo:color="#000000" loext:opacity="100%"/>
    </style:style>
    <style:style style:name="ce9" style:family="table-cell">
      <loext:graphic-properties draw:fill="solid" draw:fill-color="#66c2a5"/>
      <style:paragraph-properties fo:text-align="center"/>
      <style:text-properties fo:color="#000000" loext:opacity="100%"/>
    </style:style>
    <style:style style:name="ce10" style:family="table-cell">
      <style:paragraph-properties fo:text-align="center" fo:border-left="0.28pt solid #000000" fo:border-right="0.28pt solid #000000" fo:border-top="none" fo:border-bottom="0.28pt solid #000000"/>
      <style:text-properties fo:color="#ffffff" loext:opacity="100%"/>
    </style:style>
    <style:style style:name="P1" style:family="paragraph">
      <style:paragraph-properties fo:margin-left="0cm" fo:margin-right="0cm" fo:margin-top="0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3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right" fo:text-indent="0cm" loext:tab-stop-distance="0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P8" style:family="paragraph">
      <style:text-properties fo:color="#ff9424" loext:opacity="100%"/>
    </style:style>
    <style:style style:name="P9" style:family="paragraph">
      <style:text-properties fo:color="#ff9424" loext:opacity="100%"/>
    </style:style>
    <style:style style:name="P10" style:family="paragraph">
      <loext:graphic-properties draw:fill-color="#ffffff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color="#ff9424" loext:opacity="100%">
        <loext:char-complex-color loext:theme-type="light1" loext:color-type="theme"/>
      </style:text-properties>
    </style:style>
    <style:style style:name="P13" style:family="paragraph">
      <style:paragraph-properties fo:margin-left="0cm" fo:margin-right="0cm" fo:margin-top="0cm" fo:margin-bottom="0cm" fo:line-height="100%" fo:text-align="left" fo:text-indent="0cm"/>
    </style:style>
    <style:style style:name="P14" style:family="paragraph"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/>
      <style:text-properties fo:color="#ffffff" loext:opacity="100%" style:font-name="Time New Roman" fo:font-size="18pt" style:font-size-asian="18pt" style:font-size-complex="18pt"/>
    </style:style>
    <style:style style:name="P16" style:family="paragraph">
      <loext:graphic-properties draw:fill="none"/>
      <style:paragraph-properties fo:text-align="center" style:font-independent-line-spacing="true"/>
      <style:text-properties fo:font-size="32pt"/>
    </style:style>
    <style:style style:name="P17" style:family="paragraph">
      <style:paragraph-properties fo:margin-left="0cm" fo:margin-right="0cm" fo:margin-top="0cm" fo:margin-bottom="0cm" fo:line-height="100%" fo:text-align="left" fo:text-indent="0cm" loext:tab-stop-distance="1.27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loext:tab-stop-distance="1.27cm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align="right" fo:text-indent="0cm" loext:tab-stop-distance="1.27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right" fo:text-indent="0cm" loext:tab-stop-distance="1.27cm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align="center" fo:text-indent="0cm" loext:tab-stop-distance="1.27cm">
        <style:tab-stops/>
      </style:paragraph-properties>
      <style:text-properties fo:font-size="18pt"/>
    </style:style>
    <style:style style:name="P22" style:family="paragraph">
      <loext:graphic-properties draw:fill="solid" draw:fill-color="#ef8a62"/>
      <style:paragraph-properties fo:margin-left="0cm" fo:margin-right="0cm" fo:margin-top="0cm" fo:margin-bottom="0cm" fo:line-height="100%" fo:text-align="center" fo:text-indent="0cm" loext:tab-stop-distance="1.27cm" style:writing-mode="lr-tb" style:font-independent-line-spacing="true">
        <style:tab-stops/>
      </style:paragraph-properties>
      <style:text-properties fo:font-size="18pt"/>
    </style:style>
    <style:style style:name="P23" style:family="paragraph">
      <loext:graphic-properties draw:fill="none"/>
      <style:paragraph-properties fo:text-align="left"/>
      <style:text-properties fo:font-size="18pt"/>
    </style:style>
    <style:style style:name="P24" style:family="paragraph">
      <loext:graphic-properties draw:fill="solid" draw:fill-color="#67a9cf"/>
      <style:paragraph-properties fo:margin-left="0cm" fo:margin-right="0cm" fo:margin-top="0cm" fo:margin-bottom="0cm" fo:line-height="100%" fo:text-align="center" fo:text-indent="0cm" loext:tab-stop-distance="1.27cm" style:writing-mode="lr-tb" style:font-independent-line-spacing="true">
        <style:tab-stops/>
      </style:paragraph-properties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left" fo:text-indent="0cm" loext:tab-stop-distance="1.27cm">
        <style:tab-stops/>
      </style:paragraph-properties>
      <style:text-properties fo:font-size="18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left" fo:text-indent="0cm" loext:tab-stop-distance="1.27cm" style:writing-mode="lr-tb" style:font-independent-line-spacing="true">
        <style:tab-stops/>
      </style:paragraph-properties>
      <style:text-properties fo:font-size="18pt"/>
    </style:style>
    <style:style style:name="P27" style:family="paragraph">
      <loext:graphic-properties draw:fill="bitmap" draw:fill-image-name="msFillBitmap_20_5" style:repeat="stretch"/>
      <style:paragraph-properties fo:margin-left="0cm" fo:margin-right="0cm" fo:margin-top="0cm" fo:margin-bottom="0cm" fo:line-height="100%" fo:text-align="left" fo:text-indent="0cm" loext:tab-stop-distance="1.27cm" style:writing-mode="lr-tb" style:font-independent-line-spacing="true">
        <style:tab-stops/>
      </style:paragraph-properties>
      <style:text-properties fo:font-size="18pt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1.27cm" style:writing-mode="lr-tb" style:font-independent-line-spacing="true">
        <style:tab-stops/>
      </style:paragraph-properties>
      <style:text-properties fo:font-size="18pt"/>
    </style:style>
    <style:style style:name="P29" style:family="paragraph">
      <loext:graphic-properties draw:fill="none"/>
      <style:paragraph-properties fo:text-align="center"/>
    </style:style>
    <style:style style:name="P30" style:family="paragraph">
      <style:paragraph-properties fo:text-align="left"/>
    </style:style>
    <style:style style:name="P31" style:family="paragraph">
      <loext:graphic-properties draw:fill="none" draw:fill-color="#ffffff"/>
      <style:paragraph-properties fo:text-align="left"/>
      <style:text-properties fo:font-size="14pt" style:font-size-asian="14pt" style:font-size-complex="14pt"/>
    </style:style>
    <style:style style:name="P32" style:family="paragraph">
      <loext:graphic-properties draw:fill="none" draw:fill-color="#ffffff"/>
      <style:paragraph-properties fo:text-align="left"/>
    </style:style>
    <style:style style:name="P33" style:family="paragraph">
      <loext:graphic-properties draw:fill="solid" draw:fill-color="#66c2a5"/>
      <style:paragraph-properties fo:text-align="center"/>
    </style:style>
    <style:style style:name="P34" style:family="paragraph">
      <loext:graphic-properties draw:fill="solid" draw:fill-color="#fc8d62"/>
      <style:paragraph-properties fo:text-align="center"/>
    </style:style>
    <style:style style:name="P35" style:family="paragraph">
      <loext:graphic-properties draw:fill="none" draw:fill-color="#ffffff"/>
    </style:style>
    <style:style style:name="P36" style:family="paragraph">
      <loext:graphic-properties draw:fill="none" draw:fill-color="#ffffff"/>
      <style:paragraph-properties fo:text-align="center"/>
    </style:style>
    <style:style style:name="P37" style:family="paragraph">
      <loext:graphic-properties draw:fill="none" draw:fill-color="#ffffff"/>
      <style:paragraph-properties fo:text-align="center"/>
      <style:text-properties fo:color="#8b0000" loext:opacity="100%" fo:font-size="18pt"/>
    </style:style>
    <style:style style:name="P38" style:family="paragraph">
      <style:paragraph-properties fo:text-align="center"/>
      <style:text-properties fo:color="#ffffff" loext:opacity="100%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/>
      <style:text-properties fo:font-size="18pt"/>
    </style:style>
    <style:style style:name="P40" style:family="paragraph">
      <style:paragraph-properties fo:margin-left="0cm" fo:margin-right="0cm" fo:margin-top="0cm" fo:margin-bottom="0cm" fo:line-height="100%" fo:text-align="center" fo:text-indent="0cm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42" style:family="paragraph">
      <loext:graphic-properties draw:fill="none"/>
      <style:paragraph-properties fo:text-align="center" style:font-independent-line-spacing="true"/>
      <style:text-properties fo:color="#ff9424" loext:opacity="100%" fo:font-size="32pt">
        <loext:char-complex-color loext:theme-type="light1" loext:color-type="theme"/>
      </style:text-properties>
    </style:style>
    <style:style style:name="P43" style:family="paragraph">
      <loext:graphic-properties draw:fill="none" draw:fill-color="#ffffff"/>
      <style:text-properties fo:color="#8b0000" loext:opacity="100%"/>
    </style:style>
    <style:style style:name="P44" style:family="paragraph">
      <style:paragraph-properties fo:text-align="center"/>
      <style:text-properties fo:color="#000000" loext:opacity="100%" fo:background-color="transparent"/>
    </style:style>
    <style:style style:name="P45" style:family="paragraph">
      <style:paragraph-properties fo:text-align="center"/>
      <style:text-properties fo:color="#000000" loext:opacity="100%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/>
    </style:style>
    <style:style style:name="P47" style:family="paragraph">
      <style:paragraph-properties fo:margin-left="0cm" fo:margin-right="0cm" fo:margin-top="0cm" fo:margin-bottom="0cm" fo:line-height="100%" fo:text-align="center" fo:text-indent="0cm" loext:tab-stop-distance="2.54cm">
        <style:tab-stops>
          <style:tab-stop style:position="0cm"/>
        </style:tab-stops>
      </style:paragraph-properties>
    </style:style>
    <style:style style:name="P48" style:family="paragraph">
      <loext:graphic-properties draw:fill="none" draw:fill-color="#ffffff"/>
      <style:paragraph-properties fo:text-align="center"/>
      <style:text-properties fo:font-size="18pt"/>
    </style:style>
    <style:style style:name="P49" style:family="paragraph">
      <style:paragraph-properties fo:text-align="center"/>
      <style:text-properties fo:color="#ff9424" loext:opacity="100%" fo:font-size="32pt" style:font-size-asian="32pt" style:font-size-complex="32pt">
        <loext:char-complex-color loext:theme-type="light1" loext:color-type="theme"/>
      </style:text-properties>
    </style:style>
    <style:style style:name="P50" style:family="paragraph">
      <style:paragraph-properties fo:margin-left="0cm" fo:margin-right="0cm" fo:margin-top="0cm" fo:margin-bottom="0cm" fo:line-height="100%" fo:text-indent="0cm"/>
    </style:style>
    <style:style style:name="P51" style:family="paragraph">
      <loext:graphic-properties draw:fill="none" draw:fill-color="#ffffff"/>
      <style:paragraph-properties fo:text-align="center"/>
      <style:text-properties fo:color="#8b0000" loext:opacity="100%"/>
    </style:style>
    <style:style style:name="P52" style:family="paragraph">
      <loext:graphic-properties draw:fill="solid" draw:fill-color="#ffffff"/>
      <style:paragraph-properties fo:text-align="center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54" style:family="paragraph">
      <loext:graphic-properties draw:fill="solid" draw:fill-color="#ffffff"/>
      <style:paragraph-properties fo:text-align="center" style:writing-mode="lr-tb"/>
    </style:style>
    <style:style style:name="P55" style:family="paragraph">
      <loext:graphic-properties draw:fill="none"/>
    </style:style>
    <style:style style:name="P56" style:family="paragraph">
      <loext:graphic-properties draw:fill="none"/>
      <style:paragraph-properties fo:text-align="center" style:font-independent-line-spacing="true"/>
      <style:text-properties fo:color="#ff9424" loext:opacity="100%" fo:font-size="60pt">
        <loext:char-complex-color loext:theme-type="light1" loext:color-type="theme"/>
      </style:text-properties>
    </style:style>
    <style:style style:name="P5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variant="normal" fo:text-transform="none" fo:color="#ff9424" loext:opacity="100%" style:text-outline="false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ff9424" loext:opacity="100%" style:text-outline="false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ff9424" loext:opacity="100%"/>
    </style:style>
    <style:style style:name="T8" style:family="text">
      <style:text-properties fo:color="#ff9424" loext:opacity="100%">
        <loext:char-complex-color loext:theme-type="light1" loext:color-type="theme"/>
      </style:text-properties>
    </style:style>
    <style:style style:name="T9" style:family="text">
      <style:text-properties fo:color="#ffffff" loext:opacity="100%" style:font-name="Time New Roman" fo:font-size="18pt" fo:font-style="normal" style:font-size-asian="18pt" style:font-style-asian="normal" style:font-size-complex="18pt" style:font-style-complex="normal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 New Roman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 New Roman" fo:font-size="18pt" fo:letter-spacing="normal" fo:language="en" fo:country="US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color="#ffffff" loext:opacity="100%" style:font-name="Time New Roman" fo:font-size="18pt" style:font-size-asian="18pt" style:font-size-complex="18pt"/>
    </style:style>
    <style:style style:name="T13" style:family="text">
      <style:text-properties fo:font-variant="normal" fo:text-transform="none" fo:color="#ff9424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/>
      </style:text-properties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light1" loext:color-type="theme">
          <loext:transformation loext:type="tint" loext:value="7500"/>
        </loext:char-complex-color>
      </style:text-properties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/>
      </style:text-properties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-25% 58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ffffff" loext:opacity="1%" style:text-outline="false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ff9424" loext:opacity="100%" style:text-outline="false" style:text-line-through-style="none" style:text-line-through-type="none" style:text-position="0% 100%" style:font-name="Arial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>
        <loext:char-complex-color loext:theme-type="light1" loext:color-type="theme"/>
      </style:text-properties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fo:font-variant="normal" fo:text-transform="none" fo:color="#ff9424" loext:opacity="100%" style:text-outline="false" style:text-line-through-style="none" style:text-line-through-type="none" style:text-position="0% 100%" style:font-name="Arial" fo:font-size="30pt" fo:letter-spacing="normal" fo:language="en" fo:country="US" fo:font-style="italic" style:text-underline-style="none" fo:font-weight="normal" fo:background-color="transparent" style:font-size-asian="30pt" style:font-style-asian="italic" style:font-weight-asian="normal" style:font-size-complex="30pt" style:font-style-complex="italic" style:font-weight-complex="normal">
        <loext:char-complex-color loext:theme-type="light1" loext:color-type="theme"/>
      </style:text-properties>
    </style:style>
    <style:style style:name="T24" style:family="text">
      <style:text-properties fo:color="#8b0000" loext:opacity="100%" fo:font-size="18pt"/>
    </style:style>
    <style:style style:name="T2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color="#ffffff" loext:opacity="100%" fo:font-size="18pt"/>
    </style:style>
    <style:style style:name="T29" style:family="text">
      <style:text-properties fo:font-size="18pt"/>
    </style:style>
    <style:style style:name="T30" style:family="text">
      <style:text-properties fo:color="#8b0000" loext:opacity="100%"/>
    </style:style>
    <style:style style:name="T31" style:family="text">
      <style:text-properties fo:color="#ffffff" loext:opacity="100%"/>
    </style:style>
    <style:style style:name="T32" style:family="text">
      <style:text-properties fo:color="#000000" loext:opacity="100%" fo:background-color="transparent"/>
    </style:style>
    <style:style style:name="T33" style:family="text">
      <style:text-properties fo:color="#000000" loext:opacity="100%"/>
    </style:style>
    <style:style style:name="T3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5" style:family="text">
      <style:text-properties fo:font-size="18pt" fo:font-style="italic" style:font-size-asian="18pt" style:font-style-asian="italic" style:font-size-complex="18pt" style:font-style-complex="italic"/>
    </style:style>
    <style:style style:name="T36" style:family="text">
      <style:text-properties fo:color="#000000" loext:opacity="100%" fo:font-size="18pt" fo:background-color="transparent"/>
    </style:style>
    <style:style style:name="T37" style:family="text">
      <style:text-properties fo:color="#000000" loext:opacity="100%" fo:font-size="18pt"/>
    </style:style>
    <style:style style:name="T38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fo:font-size="18pt" fo:font-style="normal" style:font-size-asian="18pt" style:font-style-asian="normal" style:font-size-complex="18pt" style:font-style-complex="normal"/>
    </style:style>
    <style:style style:name="T40" style:family="text">
      <style:text-properties fo:color="#ff9424" loext:opacity="100%" fo:font-size="32pt" fo:font-style="normal" style:font-size-asian="32pt" style:font-style-asian="normal" style:font-size-complex="32pt" style:font-style-complex="normal">
        <loext:char-complex-color loext:theme-type="light1" loext:color-type="theme"/>
      </style:text-properties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fc8d62" loext:opacity="100%"/>
    </style:style>
    <style:style style:name="T43" style:family="text">
      <style:text-properties fo:color="#66c2a5" loext:opacity="100%"/>
    </style:style>
    <style:style style:name="T44" style:family="text">
      <style:text-properties style:text-position="sub 58%"/>
    </style:style>
    <style:style style:name="T45" style:family="text">
      <style:text-properties style:text-position="0% 100%"/>
    </style:style>
    <style:style style:name="T46" style:family="text">
      <style:text-properties style:font-name="DejaVu Sans" fo:font-size="12pt" style:font-name-asian="DejaVu Sans" style:font-size-asian="12pt" style:font-name-complex="DejaVu Sans" style:font-size-complex="12pt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Sitzung 8: &#10;Die Kluft zwischen Persönlichkeitsmaßen/Psychopatho" draw:style-name="dp1" draw:master-page-name="Default" presentation:presentation-page-layout-name="AL1T0" presentation:use-date-time-name="dtd1">
        <office:forms form:automatic-focus="false" form:apply-design-mode="false"/>
        <draw:frame draw:name="PlaceHolder 1" presentation:style-name="pr1" draw:text-style-name="P2" draw:layer="layout" svg:width="21.58cm" svg:height="6.622cm" svg:x="1.921cm" svg:y="4.775cm" presentation:class="title" presentation:user-transformed="true">
          <draw:text-box>
            <text:p text:style-name="P1"><text:span text:style-name="T1">Sitzung 9: </text:span><text:span text:style-name="T2"><text:line-break/></text:span><text:span text:style-name="T1">Paradigmenw</text:span><text:span text:style-name="T3">echsel: Inferenz vs. Prädiktio</text:span><text:span text:style-name="T1">n <text:s/></text:span></text:p>
          </draw:text-box>
        </draw:frame>
        <draw:frame draw:name="PlaceHolder 2" presentation:style-name="pr2" draw:text-style-name="P4" draw:layer="layout" svg:width="19.04cm" svg:height="4.589cm" svg:x="3.191cm" svg:y="11.764cm" presentation:class="subtitle" presentation:user-transformed="true">
          <draw:text-box>
            <text:p text:style-name="P3"><text:span text:style-name="T4">Dr. Philipp Bierwirth</text:span></text:p>
            <text:p text:style-name="P3"><text:span text:style-name="T4">Differentielle Psychologie und <text:s/>Persönlichkeitsforschung</text:span></text:p>
            <text:p text:style-name="P3"><text:span text:style-name="T4">SoSe 2026</text:span></text:p>
            <text:p text:style-name="P3"><text:span text:style-name="T5"/></text:p>
          </draw:text-box>
        </draw:frame>
        <presentation:notes draw:style-name="dp2">
          <draw:page-thumbnail draw:name="PlaceHolder 1" draw:style-name="gr1" draw:layer="layout" svg:width="11.42cm" svg:height="8.563cm" svg:x="3.81cm" svg:y="3.175cm" draw:page-number="1" presentation:class="page"/>
          <draw:frame draw:name="PlaceHolder 2" presentation:style-name="pr3" draw:text-style-name="P5" draw:layer="layout" svg:width="15.23cm" svg:height="9.991cm" svg:x="1.905cm" svg:y="12.224cm" presentation:class="notes" presentation:placeholder="true" presentation:user-transformed="true">
            <draw:text-box/>
          </draw:frame>
          <draw:frame draw:name="PlaceHolder 3" presentation:style-name="pr4" draw:text-style-name="P7" draw:layer="layout" svg:width="8.245cm" svg:height="1.264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1.58cm" svg:height="6.39cm" svg:x="1.921cm" svg:y="8.05cm" presentation:class="title" presentation:user-transformed="true">
          <draw:text-box>
            <text:p text:style-name="P8"><text:span text:style-name="T7">Lerntagebuchabgabe</text:span><text:span text:style-name="T7"><text:line-break/></text:span><text:span text:style-name="T7"><text:line-break/></text:span><text:span text:style-name="T7">15.09.2026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3T11">
        <office:forms form:automatic-focus="false" form:apply-design-mode="false"/>
        <draw:frame presentation:style-name="pr7" draw:text-style-name="P12" draw:layer="layout" svg:width="21.899cm" svg:height="3.672cm" svg:x="1.744cm" svg:y="2.596cm" presentation:class="title">
          <draw:text-box>
            <text:p text:style-name="P11"><text:span text:style-name="T8">Inhalt</text:span></text:p>
          </draw:text-box>
        </draw:frame>
        <draw:frame draw:style-name="gr2" draw:text-style-name="P15" draw:layer="layout" svg:width="21.591cm" svg:height="9.494cm" svg:x="2.54cm" svg:y="6.203cm">
          <draw:text-box>
            <text:list text:style-name="L4">
              <text:list-item>
                <text:p text:style-name="P13"><text:span text:style-name="T9"><text:s/>Rückblick</text:span></text:p>
              </text:list-item>
              <text:list-item>
                <text:p text:style-name="P13"><text:span text:style-name="T9">Darstellung von Effekten: <text:s/>Inferenz &amp; Prädiktion</text:span></text:p>
              </text:list-item>
              <text:list-item>
                <text:p text:style-name="P14"><text:span text:style-name="T10">Ausgewählte Leistungs-Metriken im </text:span><text:span text:style-name="T11">Machine Learning (statistischem Lernen)</text:span></text:p>
              </text:list-item>
              <text:list-item>
                <text:p text:style-name="P14"><text:span text:style-name="T10"><text:s/>Kombination von Merkmalen (multivariat)</text:span></text:p>
              </text:list-item>
            </text:list>
            <text:list text:style-name="L2">
              <text:list-header>
                <text:p text:style-name="P13"><text:span text:style-name="T9"/></text:p>
              </text:list-header>
            </text:list>
            <text:p text:style-name="P13"><text:span text:style-name="T12"/></text:p>
          </draw:text-box>
        </draw:frame>
        <presentation:notes draw:style-name="dp4">
          <draw:page-thumbnail draw:style-name="gr1" draw:layer="layout" svg:width="0.001cm" svg:height="0.001cm" svg:x="0cm" svg:y="2.123cm" draw:page-number="3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" draw:style-name="dp3" draw:master-page-name="_31__5f_Titel_20_und_20_Inhalt" presentation:presentation-page-layout-name="AL3T11">
        <office:forms form:automatic-focus="false" form:apply-design-mode="false"/>
        <draw:frame draw:name="PlaceHolder 14" presentation:style-name="pr9" draw:text-style-name="P16" draw:layer="layout" svg:width="21.905cm" svg:height="2.33cm" svg:x="1.746cm" svg:y="2.505cm" presentation:class="title" presentation:user-transformed="true">
          <draw:text-box>
            <text:p text:style-name="P1"><text:span text:style-name="T13">Rückblick</text:span></text:p>
          </draw:text-box>
        </draw:frame>
        <draw:frame draw:name="PlaceHolder 15" presentation:style-name="pr10" draw:text-style-name="P18" draw:layer="layout" svg:width="5.712cm" svg:height="1.011cm" svg:x="1.746cm" svg:y="17.657cm" presentation:class="date-time" presentation:user-transformed="true">
          <draw:text-box>
            <text:p text:style-name="P17"><text:span text:style-name="T14"><text:date style:data-style-name="D4" text:date-value="2026-06-16">06/16/2026</text:date></text:span></text:p>
          </draw:text-box>
        </draw:frame>
        <draw:frame draw:name="PlaceHolder 16" presentation:style-name="pr11" draw:text-style-name="P20" draw:layer="layout" svg:width="5.712cm" svg:height="1.011cm" svg:x="17.939cm" svg:y="17.657cm" presentation:class="page-number" presentation:user-transformed="true">
          <draw:text-box>
            <text:p text:style-name="P19"><text:span text:style-name="T14"><text:page-number>&lt;number&gt;</text:page-number></text:span></text:p>
          </draw:text-box>
        </draw:frame>
        <draw:custom-shape draw:name="Abgerundetes Rechteck 3" draw:style-name="gr3" draw:text-style-name="P22" xml:id="id1" draw:id="id1" draw:layer="layout" svg:width="4.908cm" svg:height="2.116cm" svg:x="4.12cm" svg:y="7.758cm">
          <text:p text:style-name="P21"><text:span text:style-name="T15">Neurobiological variable (x)</text:span></text:p>
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onnector draw:name="Gekrümmte Verbindung 1" draw:style-name="gr4" draw:text-style-name="P23" draw:layer="layout" draw:type="curve" draw:line-skew="-0.538cm -1.016cm" svg:x1="4.12cm" svg:y1="8.816cm" svg:x2="6.574cm" svg:y2="7.758cm" draw:start-shape="id1" draw:start-glue-point="5" draw:end-shape="id1" draw:end-glue-point="4" svg:d="M4120 8816c-269 0-538-519-538-1037 0-519 748-1037 1496-1037s1496 508 1496 1016" svg:viewBox="0 0 2993 2075">
          <text:p/>
        </draw:connector>
        <draw:custom-shape draw:name="Abgerundetes Rechteck 4" draw:style-name="gr5" draw:text-style-name="P24" xml:id="id2" draw:id="id2" draw:layer="layout" svg:width="4.908cm" svg:height="2.116cm" svg:x="15.961cm" svg:y="7.676cm">
          <text:p text:style-name="P21"><text:span text:style-name="T15">Trait variable (y)</text:span></text:p>
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onnector draw:name="Gekrümmte Verbindung 2" draw:style-name="gr4" draw:text-style-name="P23" draw:layer="layout" draw:type="curve" draw:line-skew="0.641cm -1.053cm" svg:x1="20.869cm" svg:y1="8.734cm" svg:x2="18.415cm" svg:y2="7.676cm" draw:start-shape="id2" draw:start-glue-point="7" draw:end-shape="id2" draw:end-glue-point="4" svg:d="M20869 8734c321 0 641-528 641-1056 0-527-774-1055-1548-1055-773 0-1547 527-1547 1053" svg:viewBox="0 0 3096 2112">
          <text:p/>
        </draw:connector>
        <draw:custom-shape draw:name="Textfeld 7" draw:style-name="gr6" draw:text-style-name="P26" draw:layer="layout" svg:width="4.792cm" svg:height="0.925cm" svg:x="18.859cm" svg:y="5.762cm">
          <text:p text:style-name="P25"><text:span text:style-name="T16">(A) r</text:span><text:span text:style-name="T17">yy</text:span><text:span text:style-name="T16"> </text:span><text:span text:style-name="T18">≈</text:span><text:span text:style-name="T16"> 0.80 - 0.95 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7" draw:text-style-name="P26" draw:layer="layout" svg:width="4.792cm" svg:height="0.925cm" svg:x="2.762cm" svg:y="5.957cm">
          <text:p text:style-name="P25"><text:span text:style-name="T16">(A) r</text:span><text:span text:style-name="T17">xx</text:span><text:span text:style-name="T16"> ≈ 0.75-0.95 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erade Verbindung mit Pfeil 4" draw:style-name="gr8" draw:text-style-name="P23" draw:layer="layout" draw:type="line" svg:x1="8.99cm" svg:y1="8.787cm" svg:x2="15.922cm" svg:y2="8.704cm" svg:d="M8990 8787l6932-83" svg:viewBox="0 0 6933 84">
          <text:p/>
        </draw:connector>
        <draw:custom-shape draw:name="Textfeld 9" draw:style-name="gr9" draw:text-style-name="P27" draw:layer="layout" svg:width="12.717cm" svg:height="1.185cm" svg:x="6.242cm" svg:y="7.557cm">
          <text:p text:style-name="P25"><text:span text:style-name="T19"> 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erade Verbindung mit Pfeil 5" draw:style-name="gr10" draw:text-style-name="P23" draw:layer="layout" draw:type="line" svg:x1="6.443cm" svg:y1="9.925cm" svg:x2="6.442cm" svg:y2="14.082cm" draw:end-shape="id3" draw:end-glue-point="4" svg:d="M6443 9925l-1 4157" svg:viewBox="0 0 2 4158">
          <text:p/>
        </draw:connector>
        <draw:connector draw:name="Gerade Verbindung mit Pfeil 6" draw:style-name="gr10" draw:text-style-name="P23" draw:layer="layout" draw:type="line" svg:x1="18.539cm" svg:y1="9.816cm" svg:x2="18.557cm" svg:y2="14.082cm" draw:end-shape="id4" draw:end-glue-point="4" svg:d="M18539 9816l18 4266" svg:viewBox="0 0 19 4267">
          <text:p/>
        </draw:connector>
        <draw:custom-shape draw:name="Textfeld 10" draw:style-name="gr11" draw:text-style-name="P28" xml:id="id3" draw:id="id3" draw:layer="layout" svg:width="4.792cm" svg:height="0.844cm" svg:x="4.046cm" svg:y="14.082cm">
          <text:p text:style-name="P21"><text:span text:style-name="T16">(A) Validity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12" draw:text-style-name="P28" xml:id="id4" draw:id="id4" draw:layer="layout" svg:width="4.792cm" svg:height="0.844cm" svg:x="16.161cm" svg:y="14.082cm">
          <text:p text:style-name="P21"><text:span text:style-name="T16">(A) Validity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2" draw:style-name="gr13" draw:text-style-name="P23" draw:layer="layout" svg:width="12.067cm" svg:height="4.008cm" svg:x="6.437cm" svg:y="9.817cm">
          <draw:image xlink:href="Pictures/100000010000028D000000D949F7CE57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699cm" svg:height="9.524cm" svg:x="3.175cm" svg:y="1.93cm" draw:page-number="4" presentation:class="page"/>
          <draw:frame presentation:style-name="pr1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elfolie" presentation:presentation-page-layout-name="AL4T19">
        <office:forms form:automatic-focus="false" form:apply-design-mode="false"/>
        <draw:frame draw:name="PlaceHolder 11" presentation:style-name="pr13" draw:text-style-name="P2" draw:layer="layout" svg:width="21.905cm" svg:height="3.679cm" svg:x="1.978cm" svg:y="6.603cm" presentation:class="title" presentation:user-transformed="true">
          <draw:text-box>
            <text:p text:style-name="P1"><text:span text:style-name="T20">1. Darstellung von Effekten: Inferenz und Prädiktion</text:span></text:p>
          </draw:text-box>
        </draw:frame>
        <presentation:notes draw:style-name="dp4">
          <draw:page-thumbnail draw:style-name="gr1" draw:layer="layout" svg:width="0.001cm" svg:height="0.001cm" svg:x="0cm" svg:y="2.123cm" draw:page-number="5" presentation:class="page"/>
          <draw:frame presentation:style-name="pr1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3T11">
        <office:forms form:automatic-focus="false" form:apply-design-mode="false"/>
        <draw:frame draw:style-name="gr14" draw:text-style-name="P29" draw:layer="layout" svg:width="5.913cm" svg:height="5.31cm" svg:x="17.857cm" svg:y="12.065cm">
          <draw:image xlink:href="Pictures/10000001000004E70000046747D45128.png" xlink:type="simple" xlink:show="embed" xlink:actuate="onLoad" draw:mime-type="image/png">
            <text:p/>
          </draw:image>
        </draw:frame>
        <draw:frame draw:style-name="gr14" draw:text-style-name="P29" draw:layer="layout" svg:width="5.415cm" svg:height="5.31cm" svg:x="17.857cm" svg:y="6.115cm">
          <draw:image xlink:href="Pictures/100000010000047D0000046725ED115B.png" xlink:type="simple" xlink:show="embed" xlink:actuate="onLoad" draw:mime-type="image/png">
            <text:p/>
          </draw:image>
        </draw:frame>
        <draw:frame draw:style-name="gr14" draw:text-style-name="P29" draw:layer="layout" svg:width="5.527cm" svg:height="5.31cm" svg:x="10.425cm" svg:y="12.06cm">
          <draw:image xlink:href="Pictures/10000001000004950000046764B14BE0.png" xlink:type="simple" xlink:show="embed" xlink:actuate="onLoad" draw:mime-type="image/png">
            <text:p/>
          </draw:image>
        </draw:frame>
        <draw:frame draw:style-name="gr14" draw:text-style-name="P29" draw:layer="layout" svg:width="5.909cm" svg:height="5.31cm" svg:x="10.678cm" svg:y="6.115cm">
          <draw:image xlink:href="Pictures/10000001000004E600000467FF3733B4.png" xlink:type="simple" xlink:show="embed" xlink:actuate="onLoad" draw:mime-type="image/png">
            <text:p/>
          </draw:image>
        </draw:frame>
        <draw:frame draw:name="PlaceHolder 12" presentation:style-name="pr15" draw:text-style-name="P16" draw:layer="layout" svg:width="21.905cm" svg:height="2.33cm" svg:x="1.748cm" svg:y="2.505cm" presentation:class="title" presentation:user-transformed="true">
          <draw:text-box>
            <text:p text:style-name="P1"><text:span text:style-name="T13">Darstellung von Zwischensubjekteffekten:</text:span><text:span text:style-name="T13"><text:line-break/></text:span><text:span text:style-name="T13">Prädiktion vs. Inferenz</text:span></text:p>
          </draw:text-box>
        </draw:frame>
        <draw:frame draw:style-name="gr15" draw:text-style-name="P31" draw:layer="layout" svg:width="9.525cm" svg:height="4.136cm" svg:x="0.635cm" svg:y="12.065cm">
          <draw:text-box>
            <text:list text:style-name="L2">
              <text:list-item>
                <text:p text:style-name="P30"><text:span text:style-name="T21">Inferenz (D) bezieht sich v.a. auf statistische Signifikanz:</text:span></text:p>
                <text:list>
                  <text:list-item>
                    <text:p text:style-name="P30"><text:span text:style-name="T21">z.B. unterscheiden sich die Mittelwerte zwischen zwei Gruppen</text:span></text:p>
                  </text:list-item>
                  <text:list-item>
                    <text:p text:style-name="P30"><text:span text:style-name="T21">Hängt davon ab, wie präzise man die Mittelwerte schätzen kann </text:span></text:p>
                  </text:list-item>
                  <text:list-item>
                    <text:p text:style-name="P30"><text:span text:style-name="T21">Epistemische Ungewissheit</text:span></text:p>
                  </text:list-item>
                </text:list>
              </text:list-item>
            </text:list>
          </draw:text-box>
        </draw:frame>
        <draw:frame draw:style-name="gr16" draw:text-style-name="P31" draw:layer="layout" svg:width="9.525cm" svg:height="4.691cm" svg:x="0.636cm" svg:y="6.366cm">
          <draw:text-box>
            <text:list text:style-name="L2">
              <text:list-item>
                <text:p text:style-name="P30"><text:span text:style-name="T21">Prädiktion (A-C) bezieht sich auf Klassifizierbarkeit:</text:span></text:p>
                <text:list>
                  <text:list-item>
                    <text:p text:style-name="P30"><text:span text:style-name="T21">Können wir alleine aufgrund des Messwertes vorhersagen, aus welcher Gruppe eine Beobachtung stammt</text:span></text:p>
                  </text:list-item>
                  <text:list-item>
                    <text:p text:style-name="P30"><text:span text:style-name="T21">Aleatorische Ungewissheit</text:span></text:p>
                    <text:p text:style-name="P30"><text:span text:style-name="T21"/></text:p>
                  </text:list-item>
                </text:list>
              </text:list-item>
            </text:list>
          </draw:text-box>
        </draw:frame>
        <draw:frame draw:style-name="gr17" draw:text-style-name="P32" draw:layer="layout" svg:width="9.525cm" svg:height="3.095cm" svg:x="10.16cm" svg:y="5.16cm">
          <draw:text-box>
            <text:list text:style-name="L2">
              <text:list-header>
                <text:p text:style-name="P30">(A)</text:p>
              </text:list-header>
            </text:list>
          </draw:text-box>
        </draw:frame>
        <draw:frame draw:style-name="gr17" draw:text-style-name="P32" draw:layer="layout" svg:width="9.525cm" svg:height="3.095cm" svg:x="17.78cm" svg:y="5.16cm">
          <draw:text-box>
            <text:list text:style-name="L2">
              <text:list-header>
                <text:p text:style-name="P30">(B)</text:p>
              </text:list-header>
            </text:list>
          </draw:text-box>
        </draw:frame>
        <draw:frame draw:style-name="gr17" draw:text-style-name="P32" draw:layer="layout" svg:width="9.525cm" svg:height="3.095cm" svg:x="17.145cm" svg:y="11.23cm">
          <draw:text-box>
            <text:list text:style-name="L2">
              <text:list-header>
                <text:p text:style-name="P30">(D)</text:p>
              </text:list-header>
            </text:list>
          </draw:text-box>
        </draw:frame>
        <draw:frame draw:style-name="gr17" draw:text-style-name="P32" draw:layer="layout" svg:width="9.525cm" svg:height="3.095cm" svg:x="10.16cm" svg:y="11.23cm">
          <draw:text-box>
            <text:list text:style-name="L2">
              <text:list-header>
                <text:p text:style-name="P30">(C)</text:p>
              </text:list-header>
            </text:list>
          </draw:text-box>
        </draw:frame>
        <presentation:notes draw:style-name="dp4">
          <draw:page-thumbnail draw:style-name="gr1" draw:layer="layout" svg:width="0.001cm" svg:height="0.001cm" svg:x="0cm" svg:y="2.123cm" draw:page-number="6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3T11">
        <office:forms form:automatic-focus="false" form:apply-design-mode="false"/>
        <draw:frame draw:name="PlaceHolder 13" presentation:style-name="pr15" draw:text-style-name="P16" draw:layer="layout" svg:width="21.905cm" svg:height="2.33cm" svg:x="1.748cm" svg:y="2.505cm" presentation:class="title" presentation:user-transformed="true">
          <draw:text-box>
            <text:p text:style-name="P1"><text:span text:style-name="T13">Darstellung von Innersubjekteffekten:</text:span><text:span text:style-name="T13"><text:line-break/></text:span><text:span text:style-name="T13">Prädiktion vs. Inferenz</text:span></text:p>
          </draw:text-box>
        </draw:frame>
        <draw:frame draw:style-name="gr14" draw:text-style-name="P29" draw:layer="layout" svg:width="6.069cm" svg:height="5.816cm" svg:x="14.251cm" svg:y="12.399cm">
          <draw:image xlink:href="Pictures/1000000100000497000004665B1F80D6.png" xlink:type="simple" xlink:show="embed" xlink:actuate="onLoad" draw:mime-type="image/png">
            <text:p/>
          </draw:image>
        </draw:frame>
        <draw:frame draw:style-name="gr14" draw:text-style-name="P29" draw:layer="layout" svg:width="8.306cm" svg:height="5.811cm" svg:x="16.994cm" svg:y="5.419cm">
          <draw:image xlink:href="Pictures/1000000100000648000004654C1B4988.png" xlink:type="simple" xlink:show="embed" xlink:actuate="onLoad" draw:mime-type="image/png">
            <text:p/>
          </draw:image>
        </draw:frame>
        <draw:frame draw:style-name="gr14" draw:text-style-name="P29" draw:layer="layout" svg:width="6.1cm" svg:height="5.8cm" svg:x="10.66cm" svg:y="5.515cm">
          <draw:image xlink:href="Pictures/100000010000049D000004637117AD83.png" xlink:type="simple" xlink:show="embed" xlink:actuate="onLoad" draw:mime-type="image/png">
            <text:p/>
          </draw:image>
        </draw:frame>
        <draw:frame draw:style-name="gr18" draw:text-style-name="P32" draw:layer="layout" svg:width="9.525cm" svg:height="11.159cm" svg:x="0.637cm" svg:y="7.867cm">
          <draw:text-box>
            <text:list text:style-name="L2">
              <text:list-item>
                <text:p text:style-name="P30"><text:span text:style-name="T22">Zwischensubjektvarianz kann sehr starke Innersubjekteffekte visuell völlig verschleichern (A) </text:span></text:p>
                <text:p text:style-name="P30"><text:span text:style-name="T22"/></text:p>
              </text:list-item>
              <text:list-item>
                <text:p text:style-name="P30"><text:span text:style-name="T22">Wichtig ist hier die gepaarte Differenz innerhalb eines jeden Probanden (B-C)</text:span></text:p>
                <text:p text:style-name="P30"><text:span text:style-name="T22"/></text:p>
              </text:list-item>
              <text:list-item>
                <text:p text:style-name="P30"><text:span text:style-name="T22">Gepaarte Differenz bestimmt Effektstärke (B-C) und damit auch Prädiktionskraft</text:span></text:p>
              </text:list-item>
            </text:list>
            <text:p text:style-name="P30"><text:span text:style-name="T21"/></text:p>
            <text:p text:style-name="P30"><text:span text:style-name="T21"/></text:p>
            <text:p text:style-name="P30"><text:span text:style-name="T21"/></text:p>
            <text:list text:continue-numbering="true" text:style-name="L2">
              <text:list-item>
                <text:list>
                  <text:list-header>
                    <text:p text:style-name="P30"/>
                  </text:list-header>
                </text:list>
              </text:list-item>
            </text:list>
          </draw:text-box>
        </draw:frame>
        <draw:frame draw:style-name="gr17" draw:text-style-name="P32" draw:layer="layout" svg:width="9.525cm" svg:height="3.095cm" svg:x="9.525cm" svg:y="4.835cm">
          <draw:text-box>
            <text:list text:style-name="L2">
              <text:list-header>
                <text:p text:style-name="P30">(A)</text:p>
              </text:list-header>
            </text:list>
          </draw:text-box>
        </draw:frame>
        <draw:frame draw:style-name="gr17" draw:text-style-name="P32" draw:layer="layout" svg:width="9.525cm" svg:height="3.095cm" svg:x="16.51cm" svg:y="4.835cm">
          <draw:text-box>
            <text:list text:style-name="L2">
              <text:list-header>
                <text:p text:style-name="P30">(B)</text:p>
              </text:list-header>
            </text:list>
          </draw:text-box>
        </draw:frame>
        <draw:frame draw:style-name="gr17" draw:text-style-name="P32" draw:layer="layout" svg:width="9.525cm" svg:height="3.095cm" svg:x="9.526cm" svg:y="4.836cm">
          <draw:text-box>
            <text:list text:style-name="L2">
              <text:list-header>
                <text:p text:style-name="P30">(A)</text:p>
              </text:list-header>
            </text:list>
          </draw:text-box>
        </draw:frame>
        <draw:frame draw:style-name="gr17" draw:text-style-name="P32" draw:layer="layout" svg:width="9.525cm" svg:height="3.095cm" svg:x="13.335cm" svg:y="12.065cm">
          <draw:text-box>
            <text:list text:style-name="L2">
              <text:list-header>
                <text:p text:style-name="P30">(C)</text:p>
              </text:list-header>
            </text:list>
          </draw:text-box>
        </draw:frame>
        <presentation:notes draw:style-name="dp4">
          <draw:page-thumbnail draw:style-name="gr1" draw:layer="layout" svg:width="0.001cm" svg:height="0.001cm" svg:x="0cm" svg:y="2.123cm" draw:page-number="7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. Introduction" draw:style-name="dp3" draw:master-page-name="Titelfolie" presentation:presentation-page-layout-name="AL4T19">
        <office:forms form:automatic-focus="false" form:apply-design-mode="false"/>
        <draw:frame draw:name="PlaceHolder 1" presentation:style-name="pr13" draw:text-style-name="P2" draw:layer="layout" svg:width="21.905cm" svg:height="3.679cm" svg:x="1.977cm" svg:y="6.602cm" presentation:class="title" presentation:user-transformed="true">
          <draw:text-box>
            <text:p text:style-name="P1"><text:span text:style-name="T20">2. Ausgewählte Leistungs-Metriken im </text:span><text:span text:style-name="T23">Machine Learning (statistischem Lernen)</text:span></text:p>
          </draw:text-box>
        </draw:frame>
        <presentation:notes draw:style-name="dp4">
          <draw:page-thumbnail draw:style-name="gr1" draw:layer="layout" svg:width="12.699cm" svg:height="9.524cm" svg:x="3.175cm" svg:y="1.93cm" draw:page-number="8" presentation:class="page"/>
          <draw:frame presentation:style-name="pr1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3T11">
        <office:forms form:automatic-focus="false" form:apply-design-mode="false"/>
        <draw:custom-shape draw:style-name="gr19" draw:text-style-name="P33" draw:layer="layout" svg:width="1.27cm" svg:height="1.27cm" svg:x="4.445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3" draw:layer="layout" svg:width="1.27cm" svg:height="1.27cm" svg:x="5.08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3" draw:layer="layout" svg:width="1.27cm" svg:height="1.27cm" svg:x="6.985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3" draw:layer="layout" svg:width="1.27cm" svg:height="1.27cm" svg:x="8.89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3" draw:layer="layout" svg:width="1.27cm" svg:height="1.27cm" svg:x="7.62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3" draw:layer="layout" svg:width="1.27cm" svg:height="1.27cm" svg:x="11.43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4" draw:layer="layout" svg:width="1.27cm" svg:height="1.27cm" svg:x="16.51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4" draw:layer="layout" svg:width="1.27cm" svg:height="1.27cm" svg:x="17.145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4" draw:layer="layout" svg:width="1.27cm" svg:height="1.27cm" svg:x="15.24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4" draw:layer="layout" svg:width="1.27cm" svg:height="1.27cm" svg:x="18.415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4" draw:layer="layout" svg:width="1.27cm" svg:height="1.27cm" svg:x="20.32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4" draw:layer="layout" svg:width="1.27cm" svg:height="1.27cm" svg:x="13.97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9" draw:layer="layout" svg:x1="3.81cm" svg:y1="9.63cm" svg:x2="22.86cm" svg:y2="9.63cm">
          <text:p/>
        </draw:line>
        <draw:frame draw:style-name="gr22" draw:text-style-name="P35" draw:layer="layout" svg:width="18.415cm" svg:height="1.905cm" svg:x="3.81cm" svg:y="9.63cm">
          <draw:text-box>
            <text:p text:style-name="P11">Merkmalsausprägung</text:p>
          </draw:text-box>
        </draw:frame>
        <draw:frame draw:name="PlaceHolder 4" presentation:style-name="pr15" draw:text-style-name="P16" draw:layer="layout" svg:width="21.905cm" svg:height="2.33cm" svg:x="1.747cm" svg:y="2.505cm" presentation:class="title" presentation:user-transformed="true">
          <draw:text-box>
            <text:p text:style-name="P1"><text:span text:style-name="T13">Gruppenunterschiede in einem Merkmal</text:span></text:p>
          </draw:text-box>
        </draw:frame>
        <draw:frame draw:style-name="gr23" draw:text-style-name="P32" draw:layer="layout" svg:width="20.955cm" svg:height="1.905cm" svg:x="2.54cm" svg:y="5.08cm">
          <draw:text-box>
            <text:p text:style-name="P30">Wir erfassen ein Merkmal in zwei Gruppen.</text:p>
          </draw:text-box>
        </draw:frame>
        <draw:frame draw:style-name="gr23" draw:text-style-name="P32" draw:layer="layout" svg:width="20.955cm" svg:height="1.905cm" svg:x="2.541cm" svg:y="15.181cm">
          <draw:text-box>
            <text:p text:style-name="P30">Können wir das Merkmal nutzen, um die Beobachtungen einer der beiden Gruppen zuzuordnen?</text:p>
          </draw:text-box>
        </draw:frame>
        <draw:custom-shape draw:style-name="gr24" draw:text-style-name="P33" draw:layer="layout" svg:width="1.27cm" svg:height="1.27cm" svg:x="4.481cm" svg:y="10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.27cm" svg:height="1.27cm" svg:x="4.446cm" svg:y="11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36" draw:layer="layout" svg:width="3.175cm" svg:height="0.962cm" svg:x="5.551cm" svg:y="11.99cm">
          <draw:text-box>
            <text:p text:style-name="P11">Krank</text:p>
          </draw:text-box>
        </draw:frame>
        <draw:frame draw:style-name="gr26" draw:text-style-name="P36" draw:layer="layout" svg:width="3.175cm" svg:height="0.962cm" svg:x="5.552cm" svg:y="10.193cm">
          <draw:text-box>
            <text:p text:style-name="P11">Gesund</text:p>
          </draw:text-box>
        </draw:frame>
        <presentation:notes draw:style-name="dp4">
          <draw:page-thumbnail draw:style-name="gr1" draw:layer="layout" svg:width="0.001cm" svg:height="0.002cm" svg:x="0.004cm" svg:y="0cm" draw:page-number="9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3T11">
        <office:forms form:automatic-focus="false" form:apply-design-mode="false"/>
        <draw:custom-shape draw:style-name="gr24" draw:text-style-name="P33" draw:layer="layout" svg:width="1.27cm" svg:height="1.27cm" svg:x="4.445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5.08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6.985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8.89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7.62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11.43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.27cm" svg:height="1.27cm" svg:x="16.51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.27cm" svg:height="1.27cm" svg:x="17.145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.27cm" svg:height="1.27cm" svg:x="15.24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.27cm" svg:height="1.27cm" svg:x="18.415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.27cm" svg:height="1.27cm" svg:x="20.32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.27cm" svg:height="1.27cm" svg:x="13.97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9" draw:layer="layout" svg:x1="3.81cm" svg:y1="9.63cm" svg:x2="22.86cm" svg:y2="9.63cm">
          <text:p/>
        </draw:line>
        <draw:frame draw:style-name="gr22" draw:text-style-name="P35" draw:layer="layout" svg:width="18.415cm" svg:height="1.905cm" svg:x="3.81cm" svg:y="9.63cm">
          <draw:text-box>
            <text:p text:style-name="P11">Merkmalsausprägung</text:p>
          </draw:text-box>
        </draw:frame>
        <draw:frame draw:name="PlaceHolder 7" presentation:style-name="pr15" draw:text-style-name="P16" draw:layer="layout" svg:width="21.905cm" svg:height="2.33cm" svg:x="1.747cm" svg:y="2.505cm" presentation:class="title" presentation:user-transformed="true">
          <draw:text-box>
            <text:p text:style-name="P1"><text:span text:style-name="T13">Gruppenunterschiede in einem Merkmal</text:span></text:p>
          </draw:text-box>
        </draw:frame>
        <draw:frame draw:style-name="gr27" draw:text-style-name="P32" draw:layer="layout" svg:width="20.955cm" svg:height="1.905cm" svg:x="2.541cm" svg:y="13.881cm">
          <draw:text-box>
            <text:p/>
          </draw:text-box>
        </draw:frame>
        <draw:custom-shape draw:style-name="gr24" draw:text-style-name="P33" draw:layer="layout" svg:width="1.27cm" svg:height="1.27cm" svg:x="4.481cm" svg:y="10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.27cm" svg:height="1.27cm" svg:x="4.446cm" svg:y="11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36" draw:layer="layout" svg:width="3.175cm" svg:height="0.962cm" svg:x="5.551cm" svg:y="11.99cm">
          <draw:text-box>
            <text:p text:style-name="P11">Krank</text:p>
          </draw:text-box>
        </draw:frame>
        <draw:frame draw:style-name="gr26" draw:text-style-name="P36" draw:layer="layout" svg:width="3.175cm" svg:height="0.962cm" svg:x="5.552cm" svg:y="10.193cm">
          <draw:text-box>
            <text:p text:style-name="P11">Gesund</text:p>
          </draw:text-box>
        </draw:frame>
        <draw:line draw:style-name="gr28" draw:text-style-name="P29" draw:layer="layout" svg:x1="13.236cm" svg:y1="6.271cm" svg:x2="13.236cm" svg:y2="9.446cm">
          <text:p/>
        </draw:line>
        <draw:frame draw:style-name="gr22" draw:text-style-name="P37" draw:layer="layout" svg:width="18.415cm" svg:height="1.905cm" svg:x="4.011cm" svg:y="5.301cm">
          <draw:text-box>
            <text:p text:style-name="P11"><text:span text:style-name="T24">cut off (co)</text:span></text:p>
          </draw:text-box>
        </draw:frame>
        <draw:frame draw:style-name="gr29" draw:text-style-name="P32" draw:layer="layout" svg:width="24.13cm" svg:height="3.806cm" svg:x="0.635cm" svg:y="14.282cm">
          <draw:text-box>
            <text:p text:style-name="P30">“Model”: wenn Merkmal &gt; co dann Klassifikation als <text:span text:style-name="T25">krank</text:span><text:span text:style-name="T26">,</text:span><text:span text:style-name="T27"> wenn nicht als</text:span><text:span text:style-name="T26"> </text:span><text:span text:style-name="T25">gesund</text:span></text:p>
            <text:p text:style-name="P30"/>
            <text:p text:style-name="P30">Klassifikationsleistung über Vergleich der klassifizierten Gruppe mit tatsächlicher Gruppenzugehörigkeit</text:p>
          </draw:text-box>
        </draw:frame>
        <presentation:notes draw:style-name="dp4">
          <draw:page-thumbnail draw:style-name="gr1" draw:layer="layout" svg:width="0.001cm" svg:height="0.002cm" svg:x="0.004cm" svg:y="0cm" draw:page-number="10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3T11">
        <office:forms form:automatic-focus="false" form:apply-design-mode="false"/>
        <draw:custom-shape draw:style-name="gr24" draw:text-style-name="P33" draw:layer="layout" svg:width="1.27cm" svg:height="1.27cm" svg:x="4.445cm" svg:y="7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5.08cm" svg:y="7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6.985cm" svg:y="7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8.89cm" svg:y="7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7.62cm" svg:y="7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11.43cm" svg:y="7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.27cm" svg:height="1.27cm" svg:x="16.51cm" svg:y="7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.27cm" svg:height="1.27cm" svg:x="17.145cm" svg:y="7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.27cm" svg:height="1.27cm" svg:x="15.24cm" svg:y="7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.27cm" svg:height="1.27cm" svg:x="18.415cm" svg:y="7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.27cm" svg:height="1.27cm" svg:x="20.32cm" svg:y="7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.27cm" svg:height="1.27cm" svg:x="13.97cm" svg:y="7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laceHolder 9" presentation:style-name="pr15" draw:text-style-name="P16" draw:layer="layout" svg:width="21.905cm" svg:height="2.33cm" svg:x="1.747cm" svg:y="2.505cm" presentation:class="title" presentation:user-transformed="true">
          <draw:text-box>
            <text:p text:style-name="P1"><text:span text:style-name="T13">Gruppenunterschiede in einem Merkmal</text:span></text:p>
          </draw:text-box>
        </draw:frame>
        <draw:frame draw:style-name="gr27" draw:text-style-name="P32" draw:layer="layout" svg:width="20.955cm" svg:height="1.905cm" svg:x="2.541cm" svg:y="13.881cm">
          <draw:text-box>
            <text:p/>
          </draw:text-box>
        </draw:frame>
        <draw:line draw:style-name="gr28" draw:text-style-name="P29" draw:layer="layout" svg:x1="13.236cm" svg:y1="6.071cm" svg:x2="13.236cm" svg:y2="9.246cm">
          <text:p/>
        </draw:line>
        <draw:frame draw:style-name="gr22" draw:text-style-name="P37" draw:layer="layout" svg:width="18.415cm" svg:height="1.905cm" svg:x="4.011cm" svg:y="5.201cm">
          <draw:text-box>
            <text:p text:style-name="P11"><text:span text:style-name="T24">cut off</text:span></text:p>
          </draw:text-box>
        </draw:frame>
        <draw:frame draw:style-name="gr30" draw:layer="layout" svg:width="18.799cm" svg:height="4.896cm" svg:x="3.759cm" svg:y="11.4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 text:style-name="P38"><text:span text:style-name="T28">Krank</text:span></text:p>
              </table:table-cell>
              <table:table-cell>
                <text:p text:style-name="P38"><text:span text:style-name="T28">Gesund</text:span></text:p>
              </table:table-cell>
              <table:table-cell table:style-name="ce2">
                <text:p text:style-name="P38"><text:span text:style-name="T28">Test N=</text:span></text:p>
              </table:table-cell>
            </table:table-row>
            <table:table-row table:style-name="ro2" table:default-cell-style-name="ce1">
              <table:table-cell>
                <text:p text:style-name="P38"><text:span text:style-name="T28">Merkmal &gt; co</text:span></text:p>
              </table:table-cell>
              <table:table-cell>
                <text:p text:style-name="P38"><text:span text:style-name="T28">6</text:span></text:p>
              </table:table-cell>
              <table:table-cell>
                <text:p text:style-name="P38"><text:span text:style-name="T28">0</text:span></text:p>
              </table:table-cell>
              <table:table-cell>
                <text:p text:style-name="P38"><text:span text:style-name="T28">+ = 6</text:span></text:p>
              </table:table-cell>
            </table:table-row>
            <table:table-row table:style-name="ro3" table:default-cell-style-name="ce1">
              <table:table-cell>
                <text:p text:style-name="P38"><text:span text:style-name="T28">Merkmal &lt; co</text:span></text:p>
              </table:table-cell>
              <table:table-cell>
                <text:p text:style-name="P38"><text:span text:style-name="T28">0</text:span></text:p>
              </table:table-cell>
              <table:table-cell>
                <text:p text:style-name="P38"><text:span text:style-name="T28">6</text:span></text:p>
              </table:table-cell>
              <table:table-cell>
                <text:p text:style-name="P38"><text:span text:style-name="T28">- = 6</text:span></text:p>
              </table:table-cell>
            </table:table-row>
            <table:table-row table:style-name="ro3" table:default-cell-style-name="ce1">
              <table:table-cell table:style-name="ce2">
                <text:p text:style-name="P38"><text:span text:style-name="T28">N=</text:span></text:p>
              </table:table-cell>
              <table:table-cell>
                <text:p text:style-name="P38"><text:span text:style-name="T28">6</text:span></text:p>
              </table:table-cell>
              <table:table-cell>
                <text:p text:style-name="P38"><text:span text:style-name="T28">6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1" draw:text-style-name="P39" draw:layer="layout" svg:width="19.051cm" svg:height="1.905cm" svg:x="3.476cm" svg:y="16.432cm">
          <draw:text-box>
            <text:p text:style-name="P13"><text:span text:style-name="T29">“Konfusionsmatrix”</text:span></text:p>
          </draw:text-box>
        </draw:frame>
        <draw:frame draw:style-name="gr32" draw:text-style-name="P39" draw:layer="layout" svg:width="19.051cm" svg:height="1.905cm" svg:x="3.476cm" svg:y="16.432cm">
          <draw:text-box>
            <text:p text:style-name="P13"><text:span text:style-name="T29">“Konfusionsmatrix”</text:span></text:p>
          </draw:text-box>
        </draw:frame>
        <draw:line draw:style-name="gr21" draw:text-style-name="P29" draw:layer="layout" svg:x1="3.81cm" svg:y1="9.631cm" svg:x2="22.86cm" svg:y2="9.631cm">
          <text:p/>
        </draw:line>
        <draw:frame draw:style-name="gr33" draw:text-style-name="P41" draw:layer="layout" svg:width="18.415cm" svg:height="1.905cm" svg:x="3.81cm" svg:y="9.631cm">
          <draw:text-box>
            <text:p text:style-name="P40"><text:span text:style-name="T29">Merkmalsausprägung</text:span></text:p>
          </draw:text-box>
        </draw:frame>
        <presentation:notes draw:style-name="dp4">
          <draw:page-thumbnail draw:style-name="gr1" draw:layer="layout" svg:width="0.001cm" svg:height="0.002cm" svg:x="0.004cm" svg:y="0cm" draw:page-number="11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3T11">
        <office:forms form:automatic-focus="false" form:apply-design-mode="false"/>
        <draw:custom-shape draw:style-name="gr24" draw:text-style-name="P33" draw:layer="layout" svg:width="1.27cm" svg:height="1.27cm" svg:x="6.345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6.98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8.885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13.29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9.52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14.23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.27cm" svg:height="1.27cm" svg:x="15.61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.27cm" svg:height="1.27cm" svg:x="16.245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.27cm" svg:height="1.27cm" svg:x="11.94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.27cm" svg:height="1.27cm" svg:x="17.515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.27cm" svg:height="1.27cm" svg:x="19.42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.27cm" svg:height="1.27cm" svg:x="10.67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9" draw:layer="layout" svg:x1="3.81cm" svg:y1="9.63cm" svg:x2="22.86cm" svg:y2="9.63cm">
          <text:p/>
        </draw:line>
        <draw:frame draw:style-name="gr34" draw:text-style-name="P41" draw:layer="layout" svg:width="18.415cm" svg:height="1.905cm" svg:x="3.81cm" svg:y="9.63cm">
          <draw:text-box>
            <text:p text:style-name="P40"><text:span text:style-name="T29">Merkmalsausprägung</text:span></text:p>
          </draw:text-box>
        </draw:frame>
        <draw:frame draw:name="PlaceHolder 6" presentation:style-name="pr15" draw:text-style-name="P16" draw:layer="layout" svg:width="21.905cm" svg:height="2.33cm" svg:x="1.747cm" svg:y="2.505cm" presentation:class="title" presentation:user-transformed="true">
          <draw:text-box>
            <text:p text:style-name="P1"><text:span text:style-name="T13">Gruppenunterschiede in einem Merkmal</text:span></text:p>
          </draw:text-box>
        </draw:frame>
        <draw:line draw:style-name="gr28" draw:text-style-name="P29" draw:layer="layout" svg:x1="13.235cm" svg:y1="6.27cm" svg:x2="13.235cm" svg:y2="9.445cm">
          <text:p/>
        </draw:line>
        <draw:frame draw:style-name="gr22" draw:text-style-name="P37" draw:layer="layout" svg:width="18.415cm" svg:height="1.905cm" svg:x="4.01cm" svg:y="5.3cm">
          <draw:text-box>
            <text:p text:style-name="P11"><text:span text:style-name="T24">cut off (co)</text:span></text:p>
          </draw:text-box>
        </draw:frame>
        <draw:frame draw:style-name="gr30" draw:layer="layout" svg:width="18.799cm" svg:height="4.896cm" svg:x="3.758cm" svg:y="11.4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 text:style-name="P38"><text:span text:style-name="T28">Krank</text:span></text:p>
              </table:table-cell>
              <table:table-cell>
                <text:p text:style-name="P38"><text:span text:style-name="T28">Gesund</text:span></text:p>
              </table:table-cell>
              <table:table-cell table:style-name="ce2">
                <text:p text:style-name="P38"><text:span text:style-name="T28">Test N=</text:span></text:p>
              </table:table-cell>
            </table:table-row>
            <table:table-row table:style-name="ro2" table:default-cell-style-name="ce1">
              <table:table-cell>
                <text:p text:style-name="P38"><text:span text:style-name="T28">Merkmal &gt; co</text:span></text:p>
              </table:table-cell>
              <table:table-cell>
                <text:p text:style-name="P38"><text:span text:style-name="T28">4</text:span></text:p>
              </table:table-cell>
              <table:table-cell>
                <text:p text:style-name="P38"><text:span text:style-name="T28">2</text:span></text:p>
              </table:table-cell>
              <table:table-cell>
                <text:p text:style-name="P38"><text:span text:style-name="T28">+ = 6</text:span></text:p>
              </table:table-cell>
            </table:table-row>
            <table:table-row table:style-name="ro3" table:default-cell-style-name="ce1">
              <table:table-cell>
                <text:p text:style-name="P38"><text:span text:style-name="T28">Merkmal &lt; co</text:span></text:p>
              </table:table-cell>
              <table:table-cell>
                <text:p text:style-name="P38"><text:span text:style-name="T28">2</text:span></text:p>
              </table:table-cell>
              <table:table-cell>
                <text:p text:style-name="P38"><text:span text:style-name="T28">4</text:span></text:p>
              </table:table-cell>
              <table:table-cell>
                <text:p text:style-name="P38"><text:span text:style-name="T28">- = 6</text:span></text:p>
              </table:table-cell>
            </table:table-row>
            <table:table-row table:style-name="ro3" table:default-cell-style-name="ce1">
              <table:table-cell table:style-name="ce2">
                <text:p text:style-name="P38"><text:span text:style-name="T28">N=</text:span></text:p>
              </table:table-cell>
              <table:table-cell>
                <text:p text:style-name="P38"><text:span text:style-name="T28">6</text:span></text:p>
              </table:table-cell>
              <table:table-cell>
                <text:p text:style-name="P38"><text:span text:style-name="T28">6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gr35" draw:text-style-name="P39" draw:layer="layout" svg:width="19.051cm" svg:height="1.905cm" svg:x="3.475cm" svg:y="16.431cm">
          <draw:text-box>
            <text:p text:style-name="P13"><text:span text:style-name="T29">“Konfusionsmatrix”</text:span></text:p>
          </draw:text-box>
        </draw:frame>
        <presentation:notes draw:style-name="dp4">
          <draw:page-thumbnail draw:style-name="gr1" draw:layer="layout" svg:width="0.001cm" svg:height="0.002cm" svg:x="0.004cm" svg:y="0cm" draw:page-number="12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3T11">
        <office:forms form:automatic-focus="false" form:apply-design-mode="false"/>
        <draw:custom-shape draw:style-name="gr24" draw:text-style-name="P33" draw:layer="layout" svg:width="1.27cm" svg:height="1.27cm" svg:x="6.345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6.98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8.885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13.29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9.52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14.23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.27cm" svg:height="1.27cm" svg:x="15.61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.27cm" svg:height="1.27cm" svg:x="16.245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.27cm" svg:height="1.27cm" svg:x="11.94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.27cm" svg:height="1.27cm" svg:x="17.515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.27cm" svg:height="1.27cm" svg:x="19.42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.27cm" svg:height="1.27cm" svg:x="10.67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9" draw:layer="layout" svg:x1="3.81cm" svg:y1="9.63cm" svg:x2="22.86cm" svg:y2="9.63cm">
          <text:p/>
        </draw:line>
        <draw:frame draw:style-name="gr22" draw:text-style-name="P35" draw:layer="layout" svg:width="18.415cm" svg:height="1.905cm" svg:x="3.81cm" svg:y="9.63cm">
          <draw:text-box>
            <text:p text:style-name="P40">Merkmalsausprägung</text:p>
          </draw:text-box>
        </draw:frame>
        <draw:frame draw:name="PlaceHolder 8" presentation:style-name="pr15" draw:text-style-name="P42" draw:layer="layout" svg:width="21.905cm" svg:height="2.33cm" svg:x="1.747cm" svg:y="2.505cm" presentation:class="title" presentation:user-transformed="true">
          <draw:text-box>
            <text:p text:style-name="P1"><text:span text:style-name="T13">Gruppenunterschiede in einem Merkmal</text:span></text:p>
          </draw:text-box>
        </draw:frame>
        <draw:line draw:style-name="gr28" draw:text-style-name="P29" draw:layer="layout" svg:x1="13.235cm" svg:y1="6.27cm" svg:x2="13.235cm" svg:y2="9.445cm">
          <text:p/>
        </draw:line>
        <draw:frame draw:style-name="gr22" draw:text-style-name="P43" draw:layer="layout" svg:width="18.415cm" svg:height="1.905cm" svg:x="4.01cm" svg:y="5.3cm">
          <draw:text-box>
            <text:p text:style-name="P11"><text:span text:style-name="T30">cut off (co)</text:span></text:p>
          </draw:text-box>
        </draw:frame>
        <draw:frame draw:style-name="gr30" draw:layer="layout" svg:width="18.799cm" svg:height="4.896cm" svg:x="3.758cm" svg:y="11.4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3">
              <table:table-cell table:style-name="ce1"/>
              <table:table-cell>
                <text:p text:style-name="P38"><text:span text:style-name="T31">Krank</text:span></text:p>
              </table:table-cell>
              <table:table-cell>
                <text:p text:style-name="P38"><text:span text:style-name="T31">Gesund</text:span></text:p>
              </table:table-cell>
              <table:table-cell table:style-name="ce2">
                <text:p text:style-name="P38"><text:span text:style-name="T31">Test N=</text:span></text:p>
              </table:table-cell>
            </table:table-row>
            <table:table-row table:style-name="ro2">
              <table:table-cell table:style-name="ce4">
                <text:p text:style-name="P38"><text:span text:style-name="T31">Merkmal &gt; co</text:span></text:p>
              </table:table-cell>
              <table:table-cell table:style-name="ce5">
                <text:p text:style-name="P44"><text:span text:style-name="T32">4 (TP)</text:span></text:p>
              </table:table-cell>
              <table:table-cell table:style-name="ce6">
                <text:p text:style-name="P45"><text:span text:style-name="T33">2 (FP)</text:span></text:p>
              </table:table-cell>
              <table:table-cell table:style-name="ce7">
                <text:p text:style-name="P38"><text:span text:style-name="T31">+ = 6</text:span></text:p>
              </table:table-cell>
            </table:table-row>
            <table:table-row table:style-name="ro3">
              <table:table-cell table:style-name="ce4">
                <text:p text:style-name="P38"><text:span text:style-name="T31">Merkmal &lt; co</text:span></text:p>
              </table:table-cell>
              <table:table-cell table:style-name="ce8">
                <text:p text:style-name="P45"><text:span text:style-name="T33">2 (FN)</text:span></text:p>
              </table:table-cell>
              <table:table-cell table:style-name="ce9">
                <text:p text:style-name="P45"><text:span text:style-name="T33">4 (TN)</text:span></text:p>
              </table:table-cell>
              <table:table-cell table:style-name="ce7">
                <text:p text:style-name="P38"><text:span text:style-name="T31">- = 6</text:span></text:p>
              </table:table-cell>
            </table:table-row>
            <table:table-row table:style-name="ro3" table:default-cell-style-name="ce10">
              <table:table-cell table:style-name="ce2">
                <text:p text:style-name="P38"><text:span text:style-name="T31">N=</text:span></text:p>
              </table:table-cell>
              <table:table-cell>
                <text:p text:style-name="P38"><text:span text:style-name="T31">6</text:span></text:p>
              </table:table-cell>
              <table:table-cell>
                <text:p text:style-name="P38"><text:span text:style-name="T31">6</text:span></text:p>
              </table:table-cell>
              <table:table-cell table:style-name="ce1"/>
            </table:table-row>
          </table:table>
          <draw:image xlink:href="Pictures/TablePreview3.svm" xlink:type="simple" xlink:show="embed" xlink:actuate="onLoad"/>
        </draw:frame>
        <draw:frame draw:style-name="gr36" draw:text-style-name="P46" draw:layer="layout" svg:width="19.051cm" svg:height="1.905cm" svg:x="3.476cm" svg:y="16.432cm">
          <draw:text-box>
            <text:p text:style-name="P13">“Konfusionsmatrix”</text:p>
          </draw:text-box>
        </draw:frame>
        <presentation:notes draw:style-name="dp4">
          <draw:page-thumbnail draw:style-name="gr1" draw:layer="layout" svg:width="0.001cm" svg:height="0.002cm" svg:x="0.004cm" svg:y="0cm" draw:page-number="13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3T11">
        <office:forms form:automatic-focus="false" form:apply-design-mode="false"/>
        <draw:frame presentation:style-name="pr7" draw:text-style-name="P12" draw:layer="layout" svg:width="21.899cm" svg:height="3.672cm" svg:x="1.744cm" svg:y="2.596cm" presentation:class="title">
          <draw:text-box>
            <text:p text:style-name="P47"><text:span text:style-name="T8">Konfusionsmatrix</text:span></text:p>
          </draw:text-box>
        </draw:frame>
        <draw:frame draw:style-name="gr30" draw:layer="layout" svg:width="18.799cm" svg:height="4.9cm" svg:x="3.759cm" svg:y="5.8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3">
              <table:table-cell table:style-name="ce1"/>
              <table:table-cell>
                <text:p text:style-name="P38"><text:span text:style-name="T31">Krank</text:span></text:p>
              </table:table-cell>
              <table:table-cell>
                <text:p text:style-name="P38"><text:span text:style-name="T31">Gesund</text:span></text:p>
              </table:table-cell>
              <table:table-cell table:style-name="ce2">
                <text:p text:style-name="P38"><text:span text:style-name="T31">Test n=</text:span></text:p>
              </table:table-cell>
            </table:table-row>
            <table:table-row table:style-name="ro2">
              <table:table-cell table:style-name="ce4">
                <text:p text:style-name="P38"><text:span text:style-name="T31">Merkmal &gt; co</text:span></text:p>
              </table:table-cell>
              <table:table-cell table:style-name="ce5">
                <text:p text:style-name="P44"><text:span text:style-name="T32">4 (TP)</text:span></text:p>
              </table:table-cell>
              <table:table-cell table:style-name="ce6">
                <text:p text:style-name="P45"><text:span text:style-name="T33">2 (FP)</text:span></text:p>
              </table:table-cell>
              <table:table-cell table:style-name="ce7">
                <text:p text:style-name="P38"><text:span text:style-name="T31">+ = 6</text:span></text:p>
              </table:table-cell>
            </table:table-row>
            <table:table-row table:style-name="ro3">
              <table:table-cell table:style-name="ce4">
                <text:p text:style-name="P38"><text:span text:style-name="T31">Merkmal &lt; co</text:span></text:p>
              </table:table-cell>
              <table:table-cell table:style-name="ce8">
                <text:p text:style-name="P45"><text:span text:style-name="T33">2 (FN)</text:span></text:p>
              </table:table-cell>
              <table:table-cell table:style-name="ce9">
                <text:p text:style-name="P45"><text:span text:style-name="T33">4 (TN)</text:span></text:p>
              </table:table-cell>
              <table:table-cell table:style-name="ce7">
                <text:p text:style-name="P38"><text:span text:style-name="T31">- = 6</text:span></text:p>
              </table:table-cell>
            </table:table-row>
            <table:table-row table:style-name="ro4" table:default-cell-style-name="ce10">
              <table:table-cell table:style-name="ce2">
                <text:p text:style-name="P38"><text:span text:style-name="T31">n=</text:span></text:p>
              </table:table-cell>
              <table:table-cell>
                <text:p text:style-name="P38"><text:span text:style-name="T31">n = 6</text:span></text:p>
              </table:table-cell>
              <table:table-cell>
                <text:p text:style-name="P38"><text:span text:style-name="T31">n = 6</text:span></text:p>
              </table:table-cell>
              <table:table-cell table:style-name="ce1">
                <text:p text:style-name="P38"><text:span text:style-name="T31">N = 12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7" draw:text-style-name="P46" draw:layer="layout" svg:width="19.051cm" svg:height="5.939cm" svg:x="3.474cm" svg:y="11.2cm">
          <draw:text-box>
            <text:p text:style-name="P13">Quantifizierung der Klassifikationsleistung über die <text:span text:style-name="T34">Akkuratheit</text:span>:</text:p>
            <text:p text:style-name="P13"/>
            <text:p text:style-name="P13"><text:span text:style-name="T35">Wie viel Prozent all meiner Vorhersagen waren insgesamt richtig?</text:span></text:p>
            <text:p text:style-name="P13"/>
            <text:p text:style-name="P13"/>
            <text:p text:style-name="P13"/>
            <text:p text:style-name="P13"/>
            <text:p text:style-name="P13"/>
          </draw:text-box>
        </draw:frame>
        <draw:frame draw:style-name="gr38" draw:text-style-name="P11" draw:layer="layout" svg:width="6.222cm" svg:height="1.564cm" svg:x="3.81cm" svg:y="14.36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8" draw:text-style-name="P11" draw:layer="layout" svg:width="7.014cm" svg:height="1.564cm" svg:x="3.81cm" svg:y="16.57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9" draw:text-style-name="P46" draw:layer="layout" svg:width="9.591cm" svg:height="5.939cm" svg:x="11.734cm" svg:y="15.917cm">
          <draw:text-box>
            <text:p text:style-name="P40">Wenn wir raten würden, lege die Akkuratheit in unserem Beispiel bei 0.5</text:p>
            <text:p text:style-name="P13"/>
            <text:p text:style-name="P13"/>
            <text:p text:style-name="P13"/>
            <text:p text:style-name="P13"/>
            <text:p text:style-name="P13"/>
          </draw:text-box>
        </draw:frame>
        <presentation:notes draw:style-name="dp4">
          <draw:page-thumbnail draw:style-name="gr1" draw:layer="layout" svg:width="0.001cm" svg:height="0.002cm" svg:x="0.004cm" svg:y="0cm" draw:page-number="14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el_20_und_20_Inhalt" presentation:presentation-page-layout-name="AL3T11">
        <office:forms form:automatic-focus="false" form:apply-design-mode="false"/>
        <draw:frame presentation:style-name="pr7" draw:text-style-name="P12" draw:layer="layout" svg:width="21.899cm" svg:height="3.672cm" svg:x="1.744cm" svg:y="2.596cm" presentation:class="title">
          <draw:text-box>
            <text:p text:style-name="P47"><text:span text:style-name="T8">Konfusionsmatrix</text:span></text:p>
          </draw:text-box>
        </draw:frame>
        <draw:frame draw:style-name="gr30" draw:layer="layout" svg:width="18.799cm" svg:height="4.9cm" svg:x="3.759cm" svg:y="5.8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3">
              <table:table-cell table:style-name="ce1"/>
              <table:table-cell>
                <text:p text:style-name="P38"><text:span text:style-name="T28">Krank</text:span></text:p>
              </table:table-cell>
              <table:table-cell>
                <text:p text:style-name="P38"><text:span text:style-name="T28">Gesund</text:span></text:p>
              </table:table-cell>
              <table:table-cell table:style-name="ce2">
                <text:p text:style-name="P38"><text:span text:style-name="T28">Test n=</text:span></text:p>
              </table:table-cell>
            </table:table-row>
            <table:table-row table:style-name="ro2">
              <table:table-cell table:style-name="ce4">
                <text:p text:style-name="P38"><text:span text:style-name="T28">Merkmal &gt; co</text:span></text:p>
              </table:table-cell>
              <table:table-cell table:style-name="ce5">
                <text:p text:style-name="P44"><text:span text:style-name="T36">4 (TP)</text:span></text:p>
              </table:table-cell>
              <table:table-cell table:style-name="ce6">
                <text:p text:style-name="P45"><text:span text:style-name="T37">2 (FP)</text:span></text:p>
              </table:table-cell>
              <table:table-cell table:style-name="ce7">
                <text:p text:style-name="P38"><text:span text:style-name="T28">+ = 6</text:span></text:p>
              </table:table-cell>
            </table:table-row>
            <table:table-row table:style-name="ro3">
              <table:table-cell table:style-name="ce4">
                <text:p text:style-name="P38"><text:span text:style-name="T28">Merkmal &lt; co</text:span></text:p>
              </table:table-cell>
              <table:table-cell table:style-name="ce8">
                <text:p text:style-name="P45"><text:span text:style-name="T37">2 (FN)</text:span></text:p>
              </table:table-cell>
              <table:table-cell table:style-name="ce9">
                <text:p text:style-name="P45"><text:span text:style-name="T37">4 (TN)</text:span></text:p>
              </table:table-cell>
              <table:table-cell table:style-name="ce7">
                <text:p text:style-name="P38"><text:span text:style-name="T28">- = 6</text:span></text:p>
              </table:table-cell>
            </table:table-row>
            <table:table-row table:style-name="ro4" table:default-cell-style-name="ce10">
              <table:table-cell table:style-name="ce2">
                <text:p text:style-name="P38"><text:span text:style-name="T28">n=</text:span></text:p>
              </table:table-cell>
              <table:table-cell>
                <text:p text:style-name="P38"><text:span text:style-name="T28">n = 6</text:span></text:p>
              </table:table-cell>
              <table:table-cell>
                <text:p text:style-name="P38"><text:span text:style-name="T28">n = 6</text:span></text:p>
              </table:table-cell>
              <table:table-cell table:style-name="ce1">
                <text:p text:style-name="P38"><text:span text:style-name="T28">N = 12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40" draw:text-style-name="P39" draw:layer="layout" svg:width="19.051cm" svg:height="6.65cm" svg:x="3.474cm" svg:y="11.2cm">
          <draw:text-box>
            <text:p text:style-name="P13"><text:span text:style-name="T29">Quantifizierung der Klassifikationsleistung über die </text:span><text:span text:style-name="T38">Sensitivität</text:span><text:span text:style-name="T29">:</text:span></text:p>
            <text:p text:style-name="P13"><text:span text:style-name="T29"/></text:p>
            <text:p text:style-name="P13"><text:span text:style-name="T35">Wie viel Prozent aller Kranken hat mein Test als krank klassifiziert?</text:span></text:p>
            <text:p text:style-name="P13"><text:span text:style-name="T29"/></text:p>
            <text:p text:style-name="P13"><text:span text:style-name="T29"/></text:p>
            <text:p text:style-name="P13"><text:span text:style-name="T29"/></text:p>
            <text:p text:style-name="P13"><text:span text:style-name="T29"/></text:p>
            <text:p text:style-name="P13"><text:span text:style-name="T29"/></text:p>
          </draw:text-box>
        </draw:frame>
        <draw:frame draw:style-name="gr38" draw:text-style-name="P11" draw:layer="layout" svg:width="6.107cm" svg:height="1.564cm" svg:x="3.81cm" svg:y="14.36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8" draw:text-style-name="P11" draw:layer="layout" svg:width="5.582cm" svg:height="1.5cm" svg:x="3.81cm" svg:y="16.57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4">
          <draw:page-thumbnail draw:style-name="gr1" draw:layer="layout" svg:width="0.001cm" svg:height="0.002cm" svg:x="0.004cm" svg:y="0cm" draw:page-number="15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el_20_und_20_Inhalt" presentation:presentation-page-layout-name="AL3T11">
        <office:forms form:automatic-focus="false" form:apply-design-mode="false"/>
        <draw:frame presentation:style-name="pr7" draw:text-style-name="P12" draw:layer="layout" svg:width="21.899cm" svg:height="3.672cm" svg:x="1.744cm" svg:y="2.596cm" presentation:class="title">
          <draw:text-box>
            <text:p text:style-name="P47"><text:span text:style-name="T8">Konfusionsmatrix</text:span></text:p>
          </draw:text-box>
        </draw:frame>
        <draw:frame draw:style-name="gr30" draw:layer="layout" svg:width="18.799cm" svg:height="4.9cm" svg:x="3.759cm" svg:y="5.8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3">
              <table:table-cell table:style-name="ce1"/>
              <table:table-cell>
                <text:p text:style-name="P38"><text:span text:style-name="T28">Krank</text:span></text:p>
              </table:table-cell>
              <table:table-cell>
                <text:p text:style-name="P38"><text:span text:style-name="T28">Gesund</text:span></text:p>
              </table:table-cell>
              <table:table-cell table:style-name="ce2">
                <text:p text:style-name="P38"><text:span text:style-name="T28">Test n=</text:span></text:p>
              </table:table-cell>
            </table:table-row>
            <table:table-row table:style-name="ro2">
              <table:table-cell table:style-name="ce4">
                <text:p text:style-name="P38"><text:span text:style-name="T28">Merkmal &gt; co</text:span></text:p>
              </table:table-cell>
              <table:table-cell table:style-name="ce5">
                <text:p text:style-name="P44"><text:span text:style-name="T36">4 (TP)</text:span></text:p>
              </table:table-cell>
              <table:table-cell table:style-name="ce6">
                <text:p text:style-name="P45"><text:span text:style-name="T37">2 (FP)</text:span></text:p>
              </table:table-cell>
              <table:table-cell table:style-name="ce7">
                <text:p text:style-name="P38"><text:span text:style-name="T28">+ = 6</text:span></text:p>
              </table:table-cell>
            </table:table-row>
            <table:table-row table:style-name="ro3">
              <table:table-cell table:style-name="ce4">
                <text:p text:style-name="P38"><text:span text:style-name="T28">Merkmal &lt; co</text:span></text:p>
              </table:table-cell>
              <table:table-cell table:style-name="ce8">
                <text:p text:style-name="P45"><text:span text:style-name="T37">2 (FN)</text:span></text:p>
              </table:table-cell>
              <table:table-cell table:style-name="ce9">
                <text:p text:style-name="P45"><text:span text:style-name="T37">4 (TN)</text:span></text:p>
              </table:table-cell>
              <table:table-cell table:style-name="ce7">
                <text:p text:style-name="P38"><text:span text:style-name="T28">- = 6</text:span></text:p>
              </table:table-cell>
            </table:table-row>
            <table:table-row table:style-name="ro4" table:default-cell-style-name="ce10">
              <table:table-cell table:style-name="ce2">
                <text:p text:style-name="P38"><text:span text:style-name="T28">n=</text:span></text:p>
              </table:table-cell>
              <table:table-cell>
                <text:p text:style-name="P38"><text:span text:style-name="T28">n = 6</text:span></text:p>
              </table:table-cell>
              <table:table-cell>
                <text:p text:style-name="P38"><text:span text:style-name="T28">n = 6</text:span></text:p>
              </table:table-cell>
              <table:table-cell table:style-name="ce1">
                <text:p text:style-name="P38"><text:span text:style-name="T28">N = 12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41" draw:text-style-name="P39" draw:layer="layout" svg:width="19.051cm" svg:height="6.65cm" svg:x="3.474cm" svg:y="11.2cm">
          <draw:text-box>
            <text:p text:style-name="P13"><text:span text:style-name="T29">Quantifizierung der Klassifikationsleistung über die </text:span><text:span text:style-name="T38">Sensitivität</text:span><text:span text:style-name="T29">:</text:span></text:p>
            <text:p text:style-name="P13"><text:span text:style-name="T29"/></text:p>
            <text:p text:style-name="P13"><text:span text:style-name="T35">Wie viel Prozent aller Gesunden hat mein Test als gesund klassifiziert?</text:span></text:p>
            <text:p text:style-name="P13"><text:span text:style-name="T29"/></text:p>
            <text:p text:style-name="P13"><text:span text:style-name="T29"/></text:p>
            <text:p text:style-name="P13"><text:span text:style-name="T29"/></text:p>
            <text:p text:style-name="P13"><text:span text:style-name="T29"/></text:p>
            <text:p text:style-name="P13"><text:span text:style-name="T29"/></text:p>
          </draw:text-box>
        </draw:frame>
        <draw:frame draw:style-name="gr38" draw:text-style-name="P11" draw:layer="layout" svg:width="5.652cm" svg:height="1.564cm" svg:x="3.81cm" svg:y="14.36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8" draw:text-style-name="P11" draw:layer="layout" svg:width="5.125cm" svg:height="1.5cm" svg:x="3.81cm" svg:y="16.57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4">
          <draw:page-thumbnail draw:style-name="gr1" draw:layer="layout" svg:width="0.001cm" svg:height="0.002cm" svg:x="0.004cm" svg:y="0cm" draw:page-number="16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el_20_und_20_Inhalt" presentation:presentation-page-layout-name="AL3T11">
        <office:forms form:automatic-focus="false" form:apply-design-mode="false"/>
        <draw:custom-shape draw:style-name="gr24" draw:text-style-name="P33" draw:layer="layout" svg:width="1.27cm" svg:height="1.27cm" svg:x="6.145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6.78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8.685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10.59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9.32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13.13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.27cm" svg:height="1.27cm" svg:x="10.165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9" draw:layer="layout" svg:x1="3.81cm" svg:y1="9.63cm" svg:x2="22.86cm" svg:y2="9.63cm">
          <text:p/>
        </draw:line>
        <draw:frame draw:style-name="gr22" draw:text-style-name="P41" draw:layer="layout" svg:width="18.415cm" svg:height="1.905cm" svg:x="3.81cm" svg:y="9.63cm">
          <draw:text-box>
            <text:p text:style-name="P40"><text:span text:style-name="T29">Merkmalsausprägung</text:span></text:p>
          </draw:text-box>
        </draw:frame>
        <draw:frame draw:name="PlaceHolder 5" presentation:style-name="pr15" draw:text-style-name="P16" draw:layer="layout" svg:width="21.905cm" svg:height="2.33cm" svg:x="1.747cm" svg:y="2.505cm" presentation:class="title" presentation:user-transformed="true">
          <draw:text-box>
            <text:p text:style-name="P1"><text:span text:style-name="T13">Gruppenunterschiede in einem Merkmal</text:span></text:p>
          </draw:text-box>
        </draw:frame>
        <draw:custom-shape draw:style-name="gr24" draw:text-style-name="P33" draw:layer="layout" svg:width="1.27cm" svg:height="1.27cm" svg:x="4.48cm" svg:y="10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.27cm" svg:height="1.27cm" svg:x="4.445cm" svg:y="11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48" draw:layer="layout" svg:width="3.175cm" svg:height="0.962cm" svg:x="5.55cm" svg:y="11.989cm">
          <draw:text-box>
            <text:p text:style-name="P11"><text:span text:style-name="T29">Krank</text:span></text:p>
          </draw:text-box>
        </draw:frame>
        <draw:frame draw:style-name="gr26" draw:text-style-name="P48" draw:layer="layout" svg:width="3.175cm" svg:height="0.962cm" svg:x="5.551cm" svg:y="10.192cm">
          <draw:text-box>
            <text:p text:style-name="P11"><text:span text:style-name="T29">Gesund</text:span></text:p>
          </draw:text-box>
        </draw:frame>
        <draw:custom-shape draw:style-name="gr24" draw:text-style-name="P33" draw:layer="layout" svg:width="1.27cm" svg:height="1.27cm" svg:x="12.07cm" svg:y="7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13.975cm" svg:y="7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15.88cm" svg:y="7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14.61cm" svg:y="7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18.42cm" svg:y="7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39" draw:layer="layout" svg:width="19.051cm" svg:height="5.228cm" svg:x="3.475cm" svg:y="13.97cm">
          <draw:text-box>
            <text:p text:style-name="P13"><text:span text:style-name="T39">Erstellen Sie eine Konfusionsmatrix für das obige Beispiel und berechnen Sie die Akkuratheit, Sensitivität und Spezifität</text:span></text:p>
            <text:p text:style-name="P13"><text:span text:style-name="T29"/></text:p>
            <text:p text:style-name="P13"><text:span text:style-name="T29"/></text:p>
            <text:p text:style-name="P13"><text:span text:style-name="T29"/></text:p>
            <text:p text:style-name="P13"><text:span text:style-name="T29"/></text:p>
            <text:p text:style-name="P13"><text:span text:style-name="T29"/></text:p>
          </draw:text-box>
        </draw:frame>
        <draw:line draw:style-name="gr28" draw:text-style-name="P29" draw:layer="layout" svg:x1="20.036cm" svg:y1="6.271cm" svg:x2="20.036cm" svg:y2="9.446cm">
          <text:p/>
        </draw:line>
        <draw:frame draw:style-name="gr22" draw:text-style-name="P37" draw:layer="layout" svg:width="18.415cm" svg:height="1.905cm" svg:x="10.811cm" svg:y="5.301cm">
          <draw:text-box>
            <text:p text:style-name="P11"><text:span text:style-name="T24">cut off</text:span></text:p>
          </draw:text-box>
        </draw:frame>
        <presentation:notes draw:style-name="dp4">
          <draw:page-thumbnail draw:style-name="gr1" draw:layer="layout" svg:width="0.001cm" svg:height="0.002cm" svg:x="0.004cm" svg:y="0cm" draw:page-number="17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itel_20_und_20_Inhalt" presentation:presentation-page-layout-name="AL3T11">
        <office:forms form:automatic-focus="false" form:apply-design-mode="false"/>
        <draw:frame draw:style-name="gr30" draw:layer="layout" svg:width="18.799cm" svg:height="4.9cm" svg:x="3.76cm" svg:y="4.3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3">
              <table:table-cell table:style-name="ce1"/>
              <table:table-cell>
                <text:p text:style-name="P38"><text:span text:style-name="T28">Krank</text:span></text:p>
              </table:table-cell>
              <table:table-cell>
                <text:p text:style-name="P38"><text:span text:style-name="T28">Gesund</text:span></text:p>
              </table:table-cell>
              <table:table-cell table:style-name="ce2">
                <text:p text:style-name="P38"><text:span text:style-name="T28">Test n=</text:span></text:p>
              </table:table-cell>
            </table:table-row>
            <table:table-row table:style-name="ro2">
              <table:table-cell table:style-name="ce4">
                <text:p text:style-name="P38"><text:span text:style-name="T28">Merkmal &gt; co</text:span></text:p>
              </table:table-cell>
              <table:table-cell table:style-name="ce5">
                <text:p text:style-name="P44"><text:span text:style-name="T36">0 (TP)</text:span></text:p>
              </table:table-cell>
              <table:table-cell table:style-name="ce6">
                <text:p text:style-name="P45"><text:span text:style-name="T37">0 (FP)</text:span></text:p>
              </table:table-cell>
              <table:table-cell table:style-name="ce7">
                <text:p text:style-name="P38"><text:span text:style-name="T28">+ = 0</text:span></text:p>
              </table:table-cell>
            </table:table-row>
            <table:table-row table:style-name="ro3">
              <table:table-cell table:style-name="ce4">
                <text:p text:style-name="P38"><text:span text:style-name="T28">Merkmal &lt; co</text:span></text:p>
              </table:table-cell>
              <table:table-cell table:style-name="ce8">
                <text:p text:style-name="P45"><text:span text:style-name="T37">1 (FN)</text:span></text:p>
              </table:table-cell>
              <table:table-cell table:style-name="ce9">
                <text:p text:style-name="P45"><text:span text:style-name="T37">11 (TN)</text:span></text:p>
              </table:table-cell>
              <table:table-cell table:style-name="ce7">
                <text:p text:style-name="P38"><text:span text:style-name="T28">- = 12</text:span></text:p>
              </table:table-cell>
            </table:table-row>
            <table:table-row table:style-name="ro4" table:default-cell-style-name="ce10">
              <table:table-cell table:style-name="ce2">
                <text:p text:style-name="P38"><text:span text:style-name="T28">n=</text:span></text:p>
              </table:table-cell>
              <table:table-cell>
                <text:p text:style-name="P38"><text:span text:style-name="T28">n = 1</text:span></text:p>
              </table:table-cell>
              <table:table-cell>
                <text:p text:style-name="P38"><text:span text:style-name="T28">n = 11</text:span></text:p>
              </table:table-cell>
              <table:table-cell table:style-name="ce1">
                <text:p text:style-name="P38"><text:span text:style-name="T28">N = 12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43" draw:text-style-name="P39" draw:layer="layout" svg:width="19.051cm" svg:height="5.939cm" svg:x="3.475cm" svg:y="11.2cm">
          <draw:text-box>
            <text:p text:style-name="P13"><text:span text:style-name="T35">Akkuratheit = 0.9167</text:span></text:p>
            <text:p text:style-name="P13"><text:span text:style-name="T35">Sensitivität = 0</text:span></text:p>
            <text:p text:style-name="P13"><text:span text:style-name="T35">Spezifität <text:s text:c="2"/>= 1 </text:span></text:p>
            <text:p text:style-name="P13"><text:span text:style-name="T29"/></text:p>
            <text:p text:style-name="P13"><text:span text:style-name="T29"/></text:p>
            <text:p text:style-name="P13"><text:span text:style-name="T29"/></text:p>
            <text:p text:style-name="P13"><text:span text:style-name="T29"/></text:p>
            <text:p text:style-name="P13"><text:span text:style-name="T29"/></text:p>
          </draw:text-box>
        </draw:frame>
        <presentation:notes draw:style-name="dp4">
          <draw:page-thumbnail draw:style-name="gr1" draw:layer="layout" svg:width="0.001cm" svg:height="0.001cm" svg:x="0cm" svg:y="2.123cm" draw:page-number="18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el_20_und_20_Inhalt" presentation:presentation-page-layout-name="AL3T11">
        <office:forms form:automatic-focus="false" form:apply-design-mode="false"/>
        <draw:frame presentation:style-name="pr16" draw:layer="layout" svg:width="21.899cm" svg:height="3.672cm" svg:x="1.744cm" svg:y="2.596cm" presentation:class="title">
          <draw:text-box>
            <text:p text:style-name="P1"><text:span text:style-name="T13">Gruppenunterschiede in einem Merkmal</text:span></text:p>
          </draw:text-box>
        </draw:frame>
        <draw:frame draw:style-name="gr44" draw:text-style-name="P46" draw:layer="layout" svg:width="21.591cm" svg:height="11.627cm" svg:x="2.539cm" svg:y="6.202cm">
          <draw:text-box>
            <text:p text:style-name="P13"><text:span text:style-name="T39">Problem:</text:span></text:p>
            <text:p text:style-name="P13"><text:span text:style-name="T39"/></text:p>
            <text:list text:style-name="L2">
              <text:list-item>
                <text:p text:style-name="P13"><text:span text:style-name="T39">Bei unbalancierten Gruppen ist es leicht, ein Modell zu generieren, das eine hohe Akkuratheit besitzt.</text:span><text:span text:style-name="T39"><text:tab/></text:span></text:p>
                <text:p text:style-name="P13"><text:span text:style-name="T39"/></text:p>
              </text:list-item>
              <text:list-item>
                <text:p text:style-name="P13"><text:span text:style-name="T39">Wenn eine Krankheit eine sehr geringe Prävalenz hat (&lt;1%), können wir einfach alle Beobachtungen als gesund klassifizieren und wir erhalten eine Akkuratheit von über 99%</text:span></text:p>
              </text:list-item>
            </text:list>
            <text:p text:style-name="P13"><text:span text:style-name="T39"/></text:p>
            <text:p text:style-name="P13"><text:span text:style-name="T39">Potentielle Lösungen:</text:span></text:p>
            <text:p text:style-name="P13"><text:span text:style-name="T39"/></text:p>
            <text:list text:continue-numbering="true" text:style-name="L2">
              <text:list-item>
                <text:p text:style-name="P13"><text:span text:style-name="T39">Balancierte Akkuratheit</text:span></text:p>
                <text:p text:style-name="P13"><text:span text:style-name="T39"/></text:p>
              </text:list-item>
              <text:list-item>
                <text:p text:style-name="P13"><text:span text:style-name="T39">Area Under the Curve (AUC)</text:span></text:p>
                <text:p text:style-name="P13"><text:span text:style-name="T39"/></text:p>
              </text:list-item>
            </text:list>
            <text:p text:style-name="P13"/>
          </draw:text-box>
        </draw:frame>
        <presentation:notes draw:style-name="dp4">
          <draw:page-thumbnail draw:style-name="gr1" draw:layer="layout" svg:width="0.001cm" svg:height="0.002cm" svg:x="0.004cm" svg:y="0cm" draw:page-number="19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itel_20_und_20_Inhalt" presentation:presentation-page-layout-name="AL3T11">
        <office:forms form:automatic-focus="false" form:apply-design-mode="false"/>
        <draw:frame presentation:style-name="pr7" draw:text-style-name="P49" draw:layer="layout" svg:width="21.899cm" svg:height="3.672cm" svg:x="1.744cm" svg:y="2.596cm" presentation:class="title">
          <draw:text-box>
            <text:list text:style-name="L2">
              <text:list-header>
                <text:p text:style-name="P47"><text:span text:style-name="T40">Balancierte Akkuratheit</text:span></text:p>
              </text:list-header>
            </text:list>
          </draw:text-box>
        </draw:frame>
        <draw:frame draw:style-name="gr45" draw:text-style-name="P11" draw:layer="layout" svg:width="6.797cm" svg:height="1.899cm" svg:x="9.478cm" svg:y="5.49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6" draw:text-style-name="P35" draw:layer="layout" svg:width="24.765cm" svg:height="7.555cm" svg:x="0.435cm" svg:y="11.025cm">
          <draw:text-box>
            <text:p>In unserem Beispiel….</text:p>
            <text:p/>
            <text:p>Wir berechnen den Summanden separat in der Gruppe der Gesunden und Kranken:</text:p>
            <text:p text:style-name="P50"><text:span text:style-name="T41"><text:tab/></text:span></text:p>
            <text:p text:style-name="P50"><text:span text:style-name="T41"><text:tab/></text:span><text:span text:style-name="T41">TP = 0; TN = 11; n = 11</text:span><text:span text:style-name="T41"><text:tab/></text:span><text:span text:style-name="T41"><text:tab/></text:span>TP = 0; TN = 0; n = 1</text:p>
            <text:p/>
            <text:p/>
          </draw:text-box>
        </draw:frame>
        <draw:frame draw:style-name="gr45" draw:text-style-name="P11" draw:layer="layout" svg:width="3.123cm" svg:height="1.74cm" svg:x="4.783cm" svg:y="15.8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5" draw:text-style-name="P11" draw:layer="layout" svg:width="2.837cm" svg:height="1.74cm" svg:x="14.808cm" svg:y="15.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24" draw:text-style-name="P33" draw:layer="layout" svg:width="1.27cm" svg:height="1.27cm" svg:x="6.145cm" svg:y="8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6.78cm" svg:y="8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8.685cm" svg:y="8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10.59cm" svg:y="8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9.32cm" svg:y="8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13.13cm" svg:y="8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.27cm" svg:height="1.27cm" svg:x="10.165cm" svg:y="8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9" draw:layer="layout" svg:x1="3.81cm" svg:y1="10.33cm" svg:x2="22.86cm" svg:y2="10.33cm">
          <text:p/>
        </draw:line>
        <draw:custom-shape draw:style-name="gr24" draw:text-style-name="P33" draw:layer="layout" svg:width="1.27cm" svg:height="1.27cm" svg:x="12.07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13.975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15.88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14.61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18.42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29" draw:layer="layout" svg:x1="20.036cm" svg:y1="7.871cm" svg:x2="20.036cm" svg:y2="11.046cm">
          <text:p/>
        </draw:line>
        <draw:frame draw:style-name="gr22" draw:text-style-name="P37" draw:layer="layout" svg:width="18.415cm" svg:height="1.905cm" svg:x="10.812cm" svg:y="7.002cm">
          <draw:text-box>
            <text:p text:style-name="P11"><text:span text:style-name="T24">cut off</text:span></text:p>
          </draw:text-box>
        </draw:frame>
        <presentation:notes draw:style-name="dp4">
          <draw:page-thumbnail draw:style-name="gr1" draw:layer="layout" svg:width="0.001cm" svg:height="0.001cm" svg:x="0cm" svg:y="2.123cm" draw:page-number="20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itel_20_und_20_Inhalt" presentation:presentation-page-layout-name="AL3T11">
        <office:forms form:automatic-focus="false" form:apply-design-mode="false"/>
        <draw:frame presentation:style-name="pr7" draw:text-style-name="P49" draw:layer="layout" svg:width="21.899cm" svg:height="3.672cm" svg:x="1.744cm" svg:y="2.596cm" presentation:class="title">
          <draw:text-box>
            <text:list text:style-name="L2">
              <text:list-header>
                <text:p text:style-name="P47"><text:span text:style-name="T40">Balancierte Akkuratheit</text:span></text:p>
              </text:list-header>
            </text:list>
          </draw:text-box>
        </draw:frame>
        <draw:frame draw:style-name="gr45" draw:text-style-name="P11" draw:layer="layout" svg:width="6.797cm" svg:height="1.899cm" svg:x="9.478cm" svg:y="5.49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5" draw:text-style-name="P11" draw:layer="layout" svg:width="3.123cm" svg:height="1.74cm" svg:x="6.985cm" svg:y="9.6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5" draw:text-style-name="P11" draw:layer="layout" svg:width="2.837cm" svg:height="1.74cm" svg:x="16.71cm" svg:y="9.52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47" draw:text-style-name="P29" draw:layer="layout" svg:x1="13.97cm" svg:y1="7.39cm" svg:x2="9.525cm" svg:y2="9.69cm">
          <text:p/>
        </draw:line>
        <draw:line draw:style-name="gr47" draw:text-style-name="P29" draw:layer="layout" svg:x1="15.24cm" svg:y1="7.39cm" svg:x2="17.78cm" svg:y2="9.525cm">
          <text:p/>
        </draw:line>
        <draw:frame draw:style-name="gr48" draw:text-style-name="P35" draw:layer="layout" svg:width="3.71cm" svg:height="1.673cm" svg:x="7.72cm" svg:y="7.852cm">
          <draw:text-box>
            <text:p>i = gesund</text:p>
          </draw:text-box>
        </draw:frame>
        <draw:frame draw:style-name="gr48" draw:text-style-name="P35" draw:layer="layout" svg:width="3.71cm" svg:height="1.673cm" svg:x="16.51cm" svg:y="7.62cm">
          <draw:text-box>
            <text:p>i = krank</text:p>
          </draw:text-box>
        </draw:frame>
        <draw:line draw:style-name="gr47" draw:text-style-name="P29" draw:layer="layout" svg:x1="8.89cm" svg:y1="11.43cm" svg:x2="11.43cm" svg:y2="13.335cm">
          <text:p/>
        </draw:line>
        <draw:line draw:style-name="gr47" draw:text-style-name="P29" draw:layer="layout" svg:x1="17.545cm" svg:y1="11.465cm" svg:x2="15.64cm" svg:y2="13.37cm">
          <text:p/>
        </draw:line>
        <draw:frame draw:style-name="gr45" draw:text-style-name="P11" draw:layer="layout" svg:width="4.294cm" svg:height="1.673cm" svg:x="11.381cm" svg:y="13.30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8" draw:text-style-name="P35" draw:layer="layout" svg:width="22.86cm" svg:height="1.673cm" svg:x="1.405cm" svg:y="16.107cm">
          <draw:text-box>
            <text:p>Anstatt einer Akkuratheit von ~0.92, erhalten wir eine balancierte Akkuratheit von 0.5. Unser “Modell” ist also eigentlich nicht besser als Raten.</text:p>
          </draw:text-box>
        </draw:frame>
        <presentation:notes draw:style-name="dp4">
          <draw:page-thumbnail draw:style-name="gr1" draw:layer="layout" svg:width="0.001cm" svg:height="0.001cm" svg:x="0cm" svg:y="2.123cm" draw:page-number="21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itel_20_und_20_Inhalt" presentation:presentation-page-layout-name="AL3T11">
        <office:forms form:automatic-focus="false" form:apply-design-mode="false"/>
        <draw:frame presentation:style-name="pr7" draw:text-style-name="P12" draw:layer="layout" svg:width="21.899cm" svg:height="3.672cm" svg:x="1.744cm" svg:y="2.596cm" presentation:class="title">
          <draw:text-box>
            <text:p text:style-name="P11"><text:span text:style-name="T8">Area Under the Curve </text:span></text:p>
          </draw:text-box>
        </draw:frame>
        <draw:frame draw:style-name="gr22" draw:text-style-name="P35" draw:layer="layout" svg:width="18.415cm" svg:height="1.905cm" svg:x="3.81cm" svg:y="9.631cm">
          <draw:text-box>
            <text:p text:style-name="P40">Merkmalsausprägung</text:p>
          </draw:text-box>
        </draw:frame>
        <draw:frame draw:style-name="gr49" draw:text-style-name="P35" draw:layer="layout" svg:width="22.86cm" svg:height="8.072cm" svg:x="1.27cm" svg:y="11.63cm">
          <draw:text-box>
            <text:p/>
            <text:p>Der cut off kann prinzipiell arbiträr festgelegt werden</text:p>
            <text:p/>
            <text:p>Allerdings geht jeder cut-off mit unterschiedlichen Sensitivitäten und Spezifitäten einher</text:p>
            <text:p/>
            <text:p>Die AUC basiert auf der Berechnung der Sensitivität und Spezifität jedes möglichen Cut-Offs <text:s/></text:p>
            <text:p/>
            <text:p/>
            <text:p/>
          </draw:text-box>
        </draw:frame>
        <draw:custom-shape draw:style-name="gr24" draw:text-style-name="P33" draw:layer="layout" svg:width="1.27cm" svg:height="1.27cm" svg:x="6.345cm" svg:y="7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6.98cm" svg:y="7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8.885cm" svg:y="7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13.29cm" svg:y="7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9.52cm" svg:y="7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14.23cm" svg:y="7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.27cm" svg:height="1.27cm" svg:x="15.61cm" svg:y="7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.27cm" svg:height="1.27cm" svg:x="16.245cm" svg:y="7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.27cm" svg:height="1.27cm" svg:x="11.94cm" svg:y="7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.27cm" svg:height="1.27cm" svg:x="17.515cm" svg:y="7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.27cm" svg:height="1.27cm" svg:x="19.42cm" svg:y="7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.27cm" svg:height="1.27cm" svg:x="10.67cm" svg:y="7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9" draw:layer="layout" svg:x1="3.81cm" svg:y1="9.631cm" svg:x2="22.86cm" svg:y2="9.631cm">
          <text:p/>
        </draw:line>
        <draw:line draw:style-name="gr28" draw:text-style-name="P29" draw:layer="layout" svg:x1="13.235cm" svg:y1="6.271cm" svg:x2="13.235cm" svg:y2="9.446cm">
          <text:p/>
        </draw:line>
        <draw:frame draw:style-name="gr22" draw:text-style-name="P51" draw:layer="layout" svg:width="3.175cm" svg:height="1.905cm" svg:x="13.985cm" svg:y="5.301cm">
          <draw:text-box>
            <text:p text:style-name="P11"><text:span text:style-name="T30">cut off 4</text:span></text:p>
          </draw:text-box>
        </draw:frame>
        <draw:line draw:style-name="gr28" draw:text-style-name="P29" draw:layer="layout" svg:x1="10.736cm" svg:y1="6.272cm" svg:x2="10.736cm" svg:y2="9.447cm">
          <text:p/>
        </draw:line>
        <draw:frame draw:style-name="gr22" draw:text-style-name="P51" draw:layer="layout" svg:width="3.175cm" svg:height="1.905cm" svg:x="8.99cm" svg:y="5.302cm">
          <draw:text-box>
            <text:p text:style-name="P11"><text:span text:style-name="T30">cut off 2</text:span></text:p>
          </draw:text-box>
        </draw:frame>
        <draw:line draw:style-name="gr28" draw:text-style-name="P29" draw:layer="layout" svg:x1="15.637cm" svg:y1="6.273cm" svg:x2="15.637cm" svg:y2="9.448cm">
          <text:p/>
        </draw:line>
        <draw:frame draw:style-name="gr22" draw:text-style-name="P51" draw:layer="layout" svg:width="3.175cm" svg:height="1.905cm" svg:x="11.43cm" svg:y="5.303cm">
          <draw:text-box>
            <text:p text:style-name="P11"><text:span text:style-name="T30">cut off 3</text:span></text:p>
          </draw:text-box>
        </draw:frame>
        <draw:line draw:style-name="gr28" draw:text-style-name="P29" draw:layer="layout" svg:x1="6.037cm" svg:y1="6.273cm" svg:x2="6.037cm" svg:y2="9.448cm">
          <text:p/>
        </draw:line>
        <draw:frame draw:style-name="gr22" draw:text-style-name="P51" draw:layer="layout" svg:width="3.175cm" svg:height="1.905cm" svg:x="4.291cm" svg:y="5.303cm">
          <draw:text-box>
            <text:p text:style-name="P11"><text:span text:style-name="T30">cut off 1</text:span></text:p>
          </draw:text-box>
        </draw:frame>
        <draw:frame draw:style-name="gr22" draw:text-style-name="P51" draw:layer="layout" svg:width="3.175cm" svg:height="1.905cm" svg:x="19.486cm" svg:y="5.302cm">
          <draw:text-box>
            <text:p text:style-name="P11"><text:span text:style-name="T30">cut off 5</text:span></text:p>
          </draw:text-box>
        </draw:frame>
        <draw:line draw:style-name="gr28" draw:text-style-name="P29" draw:layer="layout" svg:x1="21.138cm" svg:y1="6.274cm" svg:x2="21.138cm" svg:y2="9.449cm">
          <text:p/>
        </draw:line>
        <presentation:notes draw:style-name="dp4">
          <draw:page-thumbnail draw:style-name="gr1" draw:layer="layout" svg:width="0.001cm" svg:height="0.001cm" svg:x="0cm" svg:y="2.123cm" draw:page-number="22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itel_20_und_20_Inhalt" presentation:presentation-page-layout-name="AL3T11">
        <office:forms form:automatic-focus="false" form:apply-design-mode="false"/>
        <draw:frame presentation:style-name="pr7" draw:text-style-name="P12" draw:layer="layout" svg:width="21.899cm" svg:height="3.672cm" svg:x="1.744cm" svg:y="2.596cm" presentation:class="title">
          <draw:text-box>
            <text:p text:style-name="P11"><text:span text:style-name="T8">Area Under the Curve </text:span></text:p>
          </draw:text-box>
        </draw:frame>
        <draw:custom-shape draw:style-name="gr24" draw:text-style-name="P33" draw:layer="layout" svg:width="1.27cm" svg:height="1.27cm" svg:x="6.345cm" svg:y="7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6.98cm" svg:y="7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8.885cm" svg:y="7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13.29cm" svg:y="7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9.52cm" svg:y="7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1.27cm" svg:height="1.27cm" svg:x="14.23cm" svg:y="7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.27cm" svg:height="1.27cm" svg:x="15.61cm" svg:y="7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.27cm" svg:height="1.27cm" svg:x="16.245cm" svg:y="7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.27cm" svg:height="1.27cm" svg:x="11.94cm" svg:y="7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.27cm" svg:height="1.27cm" svg:x="17.515cm" svg:y="7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.27cm" svg:height="1.27cm" svg:x="19.42cm" svg:y="7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.27cm" svg:height="1.27cm" svg:x="10.67cm" svg:y="7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9" draw:layer="layout" svg:x1="3.81cm" svg:y1="9.631cm" svg:x2="22.86cm" svg:y2="9.631cm">
          <text:p/>
        </draw:line>
        <draw:line draw:style-name="gr28" draw:text-style-name="P29" draw:layer="layout" svg:x1="13.235cm" svg:y1="6.271cm" svg:x2="13.235cm" svg:y2="9.446cm">
          <text:p/>
        </draw:line>
        <draw:frame draw:style-name="gr22" draw:text-style-name="P51" draw:layer="layout" svg:width="3.175cm" svg:height="1.905cm" svg:x="13.985cm" svg:y="5.301cm">
          <draw:text-box>
            <text:p text:style-name="P11"><text:span text:style-name="T30">cut off 4</text:span></text:p>
          </draw:text-box>
        </draw:frame>
        <draw:line draw:style-name="gr28" draw:text-style-name="P29" draw:layer="layout" svg:x1="10.736cm" svg:y1="6.272cm" svg:x2="10.736cm" svg:y2="9.447cm">
          <text:p/>
        </draw:line>
        <draw:frame draw:style-name="gr22" draw:text-style-name="P51" draw:layer="layout" svg:width="3.175cm" svg:height="1.905cm" svg:x="8.99cm" svg:y="5.302cm">
          <draw:text-box>
            <text:p text:style-name="P11"><text:span text:style-name="T30">cut off 2</text:span></text:p>
          </draw:text-box>
        </draw:frame>
        <draw:line draw:style-name="gr28" draw:text-style-name="P29" draw:layer="layout" svg:x1="15.637cm" svg:y1="6.273cm" svg:x2="15.637cm" svg:y2="9.448cm">
          <text:p/>
        </draw:line>
        <draw:frame draw:style-name="gr22" draw:text-style-name="P51" draw:layer="layout" svg:width="3.175cm" svg:height="1.905cm" svg:x="11.43cm" svg:y="5.303cm">
          <draw:text-box>
            <text:p text:style-name="P11"><text:span text:style-name="T30">cut off 3</text:span></text:p>
          </draw:text-box>
        </draw:frame>
        <draw:line draw:style-name="gr50" draw:text-style-name="P52" draw:layer="layout" svg:x1="10.585cm" svg:y1="17.28cm" svg:x2="17.58cm" svg:y2="17.28cm">
          <text:p/>
        </draw:line>
        <draw:line draw:style-name="gr50" draw:text-style-name="P52" draw:layer="layout" svg:x1="10.543cm" svg:y1="17.28cm" svg:x2="10.595cm" svg:y2="11.46cm">
          <text:p/>
        </draw:line>
        <draw:frame draw:style-name="gr22" draw:text-style-name="P53" draw:layer="layout" svg:width="6.985cm" svg:height="1.905cm" svg:x="10.595cm" svg:y="17.332cm">
          <draw:text-box>
            <text:p text:style-name="P40">1-Spezifität</text:p>
          </draw:text-box>
        </draw:frame>
        <draw:frame draw:style-name="gr22" draw:text-style-name="P53" draw:layer="layout" svg:width="6.985cm" svg:height="1.905cm" draw:transform="rotate (1.56084795005853) translate (9.325cm 17.896cm)">
          <draw:text-box>
            <text:p text:style-name="P40">Sensitivität</text:p>
          </draw:text-box>
        </draw:frame>
        <draw:line draw:style-name="gr28" draw:text-style-name="P29" draw:layer="layout" svg:x1="6.037cm" svg:y1="6.273cm" svg:x2="6.037cm" svg:y2="9.448cm">
          <text:p/>
        </draw:line>
        <draw:frame draw:style-name="gr22" draw:text-style-name="P51" draw:layer="layout" svg:width="3.175cm" svg:height="1.905cm" svg:x="4.291cm" svg:y="5.303cm">
          <draw:text-box>
            <text:p text:style-name="P11"><text:span text:style-name="T30">cut off 1</text:span></text:p>
          </draw:text-box>
        </draw:frame>
        <draw:frame draw:style-name="gr22" draw:text-style-name="P51" draw:layer="layout" svg:width="3.175cm" svg:height="1.905cm" svg:x="19.486cm" svg:y="5.302cm">
          <draw:text-box>
            <text:p text:style-name="P11"><text:span text:style-name="T30">cut off 5</text:span></text:p>
          </draw:text-box>
        </draw:frame>
        <draw:line draw:style-name="gr28" draw:text-style-name="P29" draw:layer="layout" svg:x1="21.138cm" svg:y1="6.274cm" svg:x2="21.138cm" svg:y2="9.449cm">
          <text:p/>
        </draw:line>
        <draw:custom-shape draw:style-name="gr51" draw:text-style-name="P54" draw:layer="layout" svg:width="0.635cm" svg:height="0.635cm" svg:x="17.075cm" svg:y="11.365cm">
          <text:p text:style-name="P1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54" draw:layer="layout" svg:width="0.635cm" svg:height="0.635cm" svg:x="10.243cm" svg:y="16.897cm">
          <text:p text:style-name="P1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54" draw:layer="layout" svg:width="0.635cm" svg:height="0.635cm" svg:x="12.876cm" svg:y="11.366cm">
          <text:p text:style-name="P1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54" draw:layer="layout" svg:width="0.635cm" svg:height="0.635cm" svg:x="12.877cm" svg:y="13.067cm">
          <text:p text:style-name="P1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54" draw:layer="layout" svg:width="0.635cm" svg:height="0.635cm" svg:x="10.278cm" svg:y="13.068cm">
          <text:p text:style-name="P1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29" draw:layer="layout" svg:x1="17.068cm" svg:y1="11.674cm" svg:x2="13.5cm" svg:y2="11.667cm">
          <text:p/>
        </draw:line>
        <draw:line draw:style-name="gr53" draw:text-style-name="P29" draw:layer="layout" svg:x1="13.197cm" svg:y1="13.05cm" svg:x2="13.197cm" svg:y2="12.015cm">
          <text:p/>
        </draw:line>
        <draw:line draw:style-name="gr53" draw:text-style-name="P29" draw:layer="layout" svg:x1="10.929cm" svg:y1="13.376cm" svg:x2="12.865cm" svg:y2="13.376cm">
          <text:p/>
        </draw:line>
        <draw:line draw:style-name="gr54" draw:text-style-name="P29" draw:layer="layout" svg:x1="17.261cm" svg:y1="11.962cm" svg:x2="10.873cm" svg:y2="17.008cm">
          <text:p/>
        </draw:line>
        <draw:frame draw:style-name="gr55" draw:text-style-name="P53" draw:layer="layout" svg:width="22.225cm" svg:height="2.384cm" svg:x="2.64cm" svg:y="10.111cm">
          <draw:text-box>
            <text:p text:style-name="P40">Receiver Operating Characteristic Curve (ROC):</text:p>
          </draw:text-box>
        </draw:frame>
        <draw:frame draw:style-name="gr56" draw:text-style-name="P53" draw:layer="layout" svg:width="10.795cm" svg:height="1.51cm" svg:x="0.23cm" svg:y="13.605cm">
          <draw:text-box>
            <text:p text:style-name="P40">= 0.5 → Rategenauigkeit</text:p>
          </draw:text-box>
        </draw:frame>
        <draw:frame draw:style-name="gr55" draw:text-style-name="P53" draw:layer="layout" svg:width="10.795cm" svg:height="2.384cm" svg:x="-0.952cm" svg:y="15.153cm">
          <draw:text-box>
            <text:p text:style-name="P40"><text:s/>= 1.0→Perfekt klassifizierbar</text:p>
          </draw:text-box>
        </draw:frame>
        <draw:frame draw:style-name="gr56" draw:text-style-name="P53" draw:layer="layout" svg:width="10.795cm" svg:height="1.51cm" svg:x="13.97cm" svg:y="15.24cm">
          <draw:text-box>
            <text:p text:style-name="P40">AUC = 0.89 </text:p>
          </draw:text-box>
        </draw:frame>
        <draw:frame draw:style-name="gr57" draw:text-style-name="P53" draw:layer="layout" svg:width="6.985cm" svg:height="5.228cm" svg:x="18.515cm" svg:y="12.5cm">
          <draw:text-box>
            <text:p text:style-name="P40">Wahrscheinlichkeit, dass eine zufällige Beobachtung aus <text:span text:style-name="T42">Gruppe 2</text:span> größer ist als eine zufällige Beobachtung aus <text:span text:style-name="T43">Gruppe 1</text:span></text:p>
          </draw:text-box>
        </draw:frame>
        <presentation:notes draw:style-name="dp4">
          <draw:page-thumbnail draw:style-name="gr1" draw:layer="layout" svg:width="0.001cm" svg:height="0.001cm" svg:x="0cm" svg:y="2.123cm" draw:page-number="23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itel_20_und_20_Inhalt" presentation:presentation-page-layout-name="AL3T11">
        <office:forms form:automatic-focus="false" form:apply-design-mode="false"/>
        <draw:frame presentation:style-name="pr7" draw:text-style-name="P12" draw:layer="layout" svg:width="21.899cm" svg:height="3.672cm" svg:x="1.744cm" svg:y="2.596cm" presentation:class="title" presentation:user-transformed="true">
          <draw:text-box>
            <text:p text:style-name="P11"><text:span text:style-name="T8">Erwartbare Effektstärkens in der Psychologie (interindividuelle Differenzen)</text:span></text:p>
          </draw:text-box>
        </draw:frame>
        <draw:frame draw:style-name="gr14" draw:text-style-name="P29" draw:layer="layout" svg:width="9.416cm" svg:height="8.808cm" svg:x="12.809cm" svg:y="7.62cm">
          <draw:image xlink:href="Pictures/10000001000001640000014D740B1280.png" xlink:type="simple" xlink:show="embed" xlink:actuate="onLoad" draw:mime-type="image/png">
            <text:p/>
          </draw:image>
        </draw:frame>
        <draw:frame draw:style-name="gr58" draw:text-style-name="P46" draw:layer="layout" svg:width="11.43cm" svg:height="8.783cm" svg:x="1.27cm" svg:y="7.572cm">
          <draw:text-box>
            <text:p text:style-name="P13">25 %-Perzentil bei d~0.2 (r = 0.1)</text:p>
            <text:list text:style-name="L2">
              <text:list-item>
                <text:list>
                  <text:list-item>
                    <text:p text:style-name="P13">AUC ~ 0.56</text:p>
                  </text:list-item>
                </text:list>
              </text:list-item>
            </text:list>
            <text:p text:style-name="P13"/>
            <text:p text:style-name="P13"/>
            <text:p text:style-name="P13">50 %-Perzentil bei d~0.4 (r = 0.2)</text:p>
            <text:list text:continue-numbering="true" text:style-name="L2">
              <text:list-item>
                <text:list>
                  <text:list-item>
                    <text:p text:style-name="P13">AUC ~ 0.61</text:p>
                  </text:list-item>
                </text:list>
              </text:list-item>
            </text:list>
            <text:p text:style-name="P13"/>
            <text:p text:style-name="P13"/>
            <text:p text:style-name="P13">75 %-Perzentil bei d~0.6 (r = 0.3)</text:p>
            <text:list text:continue-numbering="true" text:style-name="L2">
              <text:list-item>
                <text:list>
                  <text:list-item>
                    <text:p text:style-name="P13">AUC ~ 0.66</text:p>
                  </text:list-item>
                </text:list>
              </text:list-item>
            </text:list>
            <text:p text:style-name="P13"/>
            <text:p text:style-name="P13"/>
          </draw:text-box>
        </draw:frame>
        <draw:frame draw:style-name="gr59" draw:text-style-name="P55" draw:layer="layout" svg:width="7.809cm" svg:height="0.963cm" svg:x="12.7cm" svg:y="16.428cm">
          <draw:text-box>
            <text:p>Gignac &amp; Szodorai (2016)</text:p>
          </draw:text-box>
        </draw:frame>
        <presentation:notes draw:style-name="dp4">
          <draw:page-thumbnail draw:style-name="gr1" draw:layer="layout" svg:width="0.001cm" svg:height="0.001cm" svg:x="0cm" svg:y="2.123cm" draw:page-number="24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Titelfolie" presentation:presentation-page-layout-name="AL4T19">
        <office:forms form:automatic-focus="false" form:apply-design-mode="false"/>
        <draw:frame draw:name="PlaceHolder 10" presentation:style-name="pr13" draw:text-style-name="P56" draw:layer="layout" svg:width="21.905cm" svg:height="3.679cm" svg:x="1.977cm" svg:y="6.602cm" presentation:class="title" presentation:user-transformed="true">
          <draw:text-box>
            <text:p text:style-name="P1"><text:span text:style-name="T20">3. Kombination von Merkmalen (multivariat)</text:span></text:p>
          </draw:text-box>
        </draw:frame>
        <presentation:notes draw:style-name="dp4">
          <draw:page-thumbnail draw:style-name="gr1" draw:layer="layout" svg:width="12.699cm" svg:height="9.524cm" svg:x="3.175cm" svg:y="1.93cm" draw:page-number="25" presentation:class="page"/>
          <draw:frame presentation:style-name="pr1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Titel_20_und_20_Inhalt" presentation:presentation-page-layout-name="AL3T11">
        <office:forms form:automatic-focus="false" form:apply-design-mode="false"/>
        <draw:frame presentation:style-name="pr16" draw:layer="layout" svg:width="21.899cm" svg:height="3.672cm" svg:x="1.744cm" svg:y="2.596cm" presentation:class="title" presentation:user-transformed="true">
          <draw:text-box>
            <text:p text:style-name="P1"><text:span text:style-name="T20">Kombination von Merkmalen</text:span></text:p>
          </draw:text-box>
        </draw:frame>
        <draw:frame draw:style-name="gr14" draw:text-style-name="P29" draw:layer="layout" svg:width="10.159cm" svg:height="10.159cm" svg:x="1.906cm" svg:y="8.12cm">
          <draw:image xlink:href="Pictures/100000010000096000000960BAE272A4.png" xlink:type="simple" xlink:show="embed" xlink:actuate="onLoad" draw:mime-type="image/png">
            <text:p/>
          </draw:image>
        </draw:frame>
        <draw:frame draw:style-name="gr14" draw:text-style-name="P29" draw:layer="layout" svg:width="10.159cm" svg:height="10.159cm" svg:x="13.435cm" svg:y="8.286cm">
          <draw:image xlink:href="Pictures/100000010000096000000960405863A4.png" xlink:type="simple" xlink:show="embed" xlink:actuate="onLoad" draw:mime-type="image/png">
            <text:p/>
          </draw:image>
        </draw:frame>
        <draw:frame draw:style-name="gr60" draw:text-style-name="P39" draw:layer="layout" svg:width="19.051cm" svg:height="5.228cm" svg:x="2.54cm" svg:y="5.78cm">
          <draw:text-box>
            <text:p text:style-name="P13"><text:span text:style-name="T39">Illustration: Wir haben zwei Merkmale, die sich minimal zwischen den Gruppen unterscheiden: </text:span></text:p>
            <text:p text:style-name="P13"><text:span text:style-name="T29"/></text:p>
            <text:p text:style-name="P13"><text:span text:style-name="T29"/></text:p>
            <text:p text:style-name="P13"><text:span text:style-name="T29"/></text:p>
          </draw:text-box>
        </draw:frame>
        <draw:frame draw:style-name="gr61" draw:text-style-name="P39" draw:layer="layout" svg:width="2.54cm" svg:height="1.418cm" svg:x="6.985cm" svg:y="9.525cm">
          <draw:text-box>
            <text:p text:style-name="P13"><text:span text:style-name="T39">d~0.4</text:span></text:p>
          </draw:text-box>
        </draw:frame>
        <draw:frame draw:style-name="gr62" draw:text-style-name="P39" draw:layer="layout" svg:width="2.54cm" svg:height="1.418cm" svg:x="19.05cm" svg:y="9.725cm">
          <draw:text-box>
            <text:p text:style-name="P13"><text:span text:style-name="T39">d~0.17</text:span></text:p>
          </draw:text-box>
        </draw:frame>
        <presentation:notes draw:style-name="dp4">
          <draw:page-thumbnail draw:style-name="gr1" draw:layer="layout" svg:width="0.001cm" svg:height="0.001cm" svg:x="0cm" svg:y="2.123cm" draw:page-number="26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Titel_20_und_20_Inhalt" presentation:presentation-page-layout-name="AL3T11">
        <office:forms form:automatic-focus="false" form:apply-design-mode="false"/>
        <draw:frame presentation:style-name="pr16" draw:layer="layout" svg:width="21.899cm" svg:height="3.672cm" svg:x="1.745cm" svg:y="2.596cm" presentation:class="title" presentation:user-transformed="true">
          <draw:text-box>
            <text:p text:style-name="P1"><text:span text:style-name="T20">Kombination von Merkmalen</text:span></text:p>
          </draw:text-box>
        </draw:frame>
        <draw:frame draw:style-name="gr14" draw:text-style-name="P29" draw:layer="layout" svg:width="10.159cm" svg:height="10.159cm" svg:x="0.036cm" svg:y="8.615cm">
          <draw:image xlink:href="Pictures/1000000100000960000009601691CC6D.png" xlink:type="simple" xlink:show="embed" xlink:actuate="onLoad" draw:mime-type="image/png">
            <text:p/>
          </draw:image>
        </draw:frame>
        <draw:line draw:style-name="gr63" draw:text-style-name="P29" draw:layer="layout" svg:x1="3.145cm" svg:y1="15.97cm" svg:x2="6.921cm" svg:y2="12.357cm">
          <text:p/>
        </draw:line>
        <draw:frame draw:style-name="gr64" draw:text-style-name="P57" draw:layer="layout" svg:width="21.59cm" svg:height="5.246cm" svg:x="1.905cm" svg:y="5.315cm">
          <draw:text-box>
            <text:p text:style-name="P11"><text:span text:style-name="T21">Linearer Klassifikator findet Ebene (im 2d-Fall eine Linie), welche die Gruppen optimal trennt. z.B.:</text:span></text:p>
            <text:p text:style-name="P11"><text:span text:style-name="T21"/></text:p>
            <text:list text:style-name="L2">
              <text:list-item>
                <text:p text:style-name="P30"><text:span text:style-name="T21">Logistische Regression</text:span></text:p>
              </text:list-item>
              <text:list-item>
                <text:p text:style-name="P30"><text:span text:style-name="T21">Support Vektor Maschine</text:span></text:p>
                <text:p text:style-name="P30"><text:span text:style-name="T21"/></text:p>
              </text:list-item>
            </text:list>
          </draw:text-box>
        </draw:frame>
        <draw:frame draw:style-name="gr65" draw:text-style-name="P55" draw:layer="layout" svg:width="8.89cm" svg:height="2.471cm" svg:x="10.04cm" svg:y="6.885cm">
          <draw:text-box>
            <text:list text:style-name="L2">
              <text:list-item>
                <text:p><text:span text:style-name="T21">Neuronales Netzwerk</text:span></text:p>
              </text:list-item>
              <text:list-item>
                <text:p><text:span text:style-name="T21">Lineare Diskriminanzanalyse</text:span></text:p>
              </text:list-item>
              <text:list-item>
                <text:p><text:span text:style-name="T21">etc.</text:span></text:p>
              </text:list-item>
            </text:list>
          </draw:text-box>
        </draw:frame>
        <draw:frame draw:style-name="gr14" draw:text-style-name="P29" draw:layer="layout" svg:width="10.159cm" svg:height="10.159cm" svg:x="15.106cm" svg:y="8.256cm">
          <draw:image xlink:href="Pictures/100000010000096000000960C1E74EFB.png" xlink:type="simple" xlink:show="embed" xlink:actuate="onLoad" draw:mime-type="image/png">
            <text:p/>
          </draw:image>
        </draw:frame>
        <draw:line draw:style-name="gr66" draw:text-style-name="P29" draw:layer="layout" svg:x1="9.525cm" svg:y1="15.34cm" svg:x2="15.875cm" svg:y2="15.34cm">
          <text:p/>
        </draw:line>
        <draw:frame draw:style-name="gr45" draw:text-style-name="P11" draw:layer="layout" svg:width="3.213cm" svg:height="0.53cm" svg:x="11.257cm" svg:y="14.6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67" draw:text-style-name="P35" draw:layer="layout" svg:width="1.905cm" svg:height="1.27cm" svg:x="6.985cm" svg:y="17.445cm">
          <draw:text-box>
            <text:p>(x<text:span text:style-name="T44">1</text:span><text:span text:style-name="T45">)</text:span></text:p>
          </draw:text-box>
        </draw:frame>
        <draw:frame draw:style-name="gr67" draw:text-style-name="P35" draw:layer="layout" svg:width="1.905cm" svg:height="1.27cm" draw:transform="rotate (1.55526289645215) translate (0.264cm 12.264cm)">
          <draw:text-box>
            <text:p>(x<text:span text:style-name="T44">2</text:span><text:span text:style-name="T45">)</text:span></text:p>
          </draw:text-box>
        </draw:frame>
        <draw:frame draw:style-name="gr65" draw:text-style-name="P55" draw:layer="layout" svg:width="8.89cm" svg:height="2.471cm" svg:x="9.925cm" svg:y="15.675cm">
          <draw:text-box>
            <text:list text:style-name="L2">
              <text:list-item>
                <text:p><text:span text:style-name="T46">x = Merkmale</text:span></text:p>
              </text:list-item>
              <text:list-item>
                <text:p><text:span text:style-name="T46">β = Classifier-Gewichte</text:span></text:p>
              </text:list-item>
            </text:list>
          </draw:text-box>
        </draw:frame>
        <draw:frame draw:style-name="gr68" draw:text-style-name="P39" draw:layer="layout" svg:width="2.54cm" svg:height="1.673cm" svg:x="19.45cm" svg:y="11.43cm">
          <draw:text-box>
            <text:p text:style-name="P13"><text:span text:style-name="T39">d~7</text:span></text:p>
            <text:p text:style-name="P13"><text:span text:style-name="T39"/></text:p>
          </draw:text-box>
        </draw:frame>
        <draw:frame draw:style-name="gr69" draw:text-style-name="P39" draw:layer="layout" svg:width="4.445cm" svg:height="2.384cm" svg:x="19.05cm" svg:y="12.268cm">
          <draw:text-box>
            <text:p text:style-name="P13"><text:span text:style-name="T39">AUC = 1</text:span></text:p>
            <text:p text:style-name="P13"><text:span text:style-name="T39"/></text:p>
          </draw:text-box>
        </draw:frame>
        <presentation:notes draw:style-name="dp4">
          <draw:page-thumbnail draw:style-name="gr1" draw:layer="layout" svg:width="0.001cm" svg:height="0.001cm" svg:x="0cm" svg:y="2.123cm" draw:page-number="27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/>
    <style:font-face style:name="Aptos Display" svg:font-family="'Aptos Display'"/>
    <style:font-face style:name="Arial" svg:font-family="Arial"/>
    <style:font-face style:name="Calibri" svg:font-family="Calibri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 New Roman" svg:font-family="'Time New Roman'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5" draw:display-name="msFillBitmap 5" xlink:href="Pictures/10000001000002F000000048422E8E44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msArrowEnd_20_5" draw:display-name="msArrowEnd 5" svg:viewBox="0 0 300 300" svg:d="M150 0l150 300h-300z"/>
    <draw:stroke-dash draw:name="Dot_20__28_Rounded_29_" draw:display-name="Dot (Rounded)" draw:style="round" draw:dots1="1" draw:dots1-length="1%" draw:distance="199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>
        <text:list-style style:name="Zwei_20_Inhalte-outline1" style:display-name="Zwei Inhalte-outline1">
          <text:list-level-style-bullet text:level="1" text:bullet-char="•">
            <style:list-level-properties text:space-before="-0.9cm" text:min-label-width="0.9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Zwei_20_Inhalte-outline2" style:display-name="Zwei Inhalte-outline2" style:family="presentation" style:parent-style-name="Zwei_20_Inhalte-outline1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Zwei_20_Inhalte-outline3" style:display-name="Zwei Inhalte-outline3" style:family="presentation" style:parent-style-name="Zwei_20_Inhalte-outline2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Zwei_20_Inhalte-outline4" style:display-name="Zwei Inhalte-outline4" style:family="presentation" style:parent-style-name="Zwei_20_Inhalte-outline3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Zwei_20_Inhalte-outline5" style:display-name="Zwei Inhalte-outline5" style:family="presentation" style:parent-style-name="Zwei_20_Inhalte-outline4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family="'Aptos Display'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gleich-background" style:family="presentation">
      <style:graphic-properties draw:stroke="none" draw:fill="solid" draw:fill-color="#ffffff"/>
      <style:text-properties style:letter-kerning="true"/>
    </style:style>
    <style:style style:name="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-outline1" style:family="presentation">
      <style:graphic-properties draw:stroke="none" draw:fill="none" draw:auto-grow-height="false" draw:fit-to-size="false" style:shrink-to-fit="true">
        <text:list-style style:name="Vergleich-outline1">
          <text:list-level-style-bullet text:level="1" text:bullet-char="•">
            <style:list-level-properties text:space-before="-0.9cm" text:min-label-width="0.9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gleich-outline2" style:family="presentation" style:parent-style-name="Vergleich-outline1">
      <style:paragraph-properties fo:margin-left="0cm" fo:margin-right="0cm" fo:margin-top="0.176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Vergleich-outline3" style:family="presentation" style:parent-style-name="Vergleich-outline2">
      <style:paragraph-properties fo:margin-left="0cm" fo:margin-right="0cm" fo:margin-top="0.176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Vergleich-outline4" style:family="presentation" style:parent-style-name="Vergleich-outline3">
      <style:paragraph-properties fo:margin-left="0cm" fo:margin-right="0cm" fo:margin-top="0.176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Vergleich-outline5" style:family="presentation" style:parent-style-name="Vergleich-outline4">
      <style:paragraph-properties fo:margin-left="0cm" fo:margin-right="0cm" fo:margin-top="0.176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Vergleich-outline6" style:family="presentation" style:parent-style-name="Vergleich-outline5">
      <style:paragraph-properties fo:margin-top="0.1cm" fo:margin-bottom="0cm"/>
      <style:text-properties fo:font-size="20pt" style:font-size-asian="20pt" style:font-size-complex="20pt"/>
    </style:style>
    <style:style style:name="Vergleich-outline7" style:family="presentation" style:parent-style-name="Vergleich-outline6">
      <style:paragraph-properties fo:margin-top="0.1cm" fo:margin-bottom="0cm"/>
      <style:text-properties fo:font-size="20pt" style:font-size-asian="20pt" style:font-size-complex="20pt"/>
    </style:style>
    <style:style style:name="Vergleich-outline8" style:family="presentation" style:parent-style-name="Vergleich-outline7">
      <style:paragraph-properties fo:margin-top="0.1cm" fo:margin-bottom="0cm"/>
      <style:text-properties fo:font-size="20pt" style:font-size-asian="20pt" style:font-size-complex="20pt"/>
    </style:style>
    <style:style style:name="Vergleich-outline9" style:family="presentation" style:parent-style-name="Vergleich-outline8">
      <style:paragraph-properties fo:margin-top="0.1cm" fo:margin-bottom="0cm"/>
      <style:text-properties fo:font-size="20pt" style:font-size-asian="20pt" style:font-size-complex="20pt"/>
    </style:style>
    <style:style style:name="Vergleich-subtitle" style:family="presentation">
      <style:graphic-properties draw:stroke="none" draw:fill="none" draw:textarea-vertical-align="middle">
        <text:list-style style:name="Vergleich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-title" style:family="presentation">
      <style:graphic-properties draw:stroke="none" draw:fill="none" draw:textarea-vertical-align="middle">
        <text:list-style style:name="Vergleich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family="'Aptos Display'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•">
            <style:list-level-properties text:space-before="-0.9cm" text:min-label-width="0.9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1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4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1pt" style:font-style-asian="normal" style:font-weight-asian="normal" style:font-name-complex="Noto Sans Devanagari" style:font-family-complex="'Noto Sans Devanagari'" style:font-family-generic-complex="system" style:font-pitch-complex="variable" style:font-size-complex="41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Nur_20_Titel-outline2" style:display-name="Nur Titel-outline2" style:family="presentation" style:parent-style-name="Nur_20_Titel-outline1">
      <style:paragraph-properties fo:margin-left="0cm" fo:margin-right="0cm" fo:margin-top="0.257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35.2000007629395pt" fo:letter-spacing="normal" fo:language="en" fo:country="US" fo:font-style="normal" style:text-underline-style="none" fo:font-weight="normal" fo:background-color="transparent" style:font-size-asian="35.2000007629395pt" style:font-style-asian="normal" style:font-weight-asian="normal" style:font-size-complex="35.2000007629395pt" style:font-style-complex="normal" style:font-weight-complex="normal">
        <loext:char-complex-color loext:theme-type="dark1" loext:color-type="theme"/>
      </style:text-properties>
    </style:style>
    <style:style style:name="Nur_20_Titel-outline3" style:display-name="Nur Titel-outline3" style:family="presentation" style:parent-style-name="Nur_20_Titel-outline2">
      <style:paragraph-properties fo:margin-left="0cm" fo:margin-right="0cm" fo:margin-top="0.257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9.2999992370605pt" fo:letter-spacing="normal" fo:language="en" fo:country="US" fo:font-style="normal" style:text-underline-style="none" fo:font-weight="normal" fo:background-color="transparent" style:font-size-asian="29.2999992370605pt" style:font-style-asian="normal" style:font-weight-asian="normal" style:font-size-complex="29.2999992370605pt" style:font-style-complex="normal" style:font-weight-complex="normal">
        <loext:char-complex-color loext:theme-type="dark1" loext:color-type="theme"/>
      </style:text-properties>
    </style:style>
    <style:style style:name="Nur_20_Titel-outline4" style:display-name="Nur Titel-outline4" style:family="presentation" style:parent-style-name="Nur_20_Titel-outline3">
      <style:paragraph-properties fo:margin-left="0cm" fo:margin-right="0cm" fo:margin-top="0.257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6.3999996185303pt" fo:letter-spacing="normal" fo:language="en" fo:country="US" fo:font-style="normal" style:text-underline-style="none" fo:font-weight="normal" fo:background-color="transparent" style:font-size-asian="26.3999996185303pt" style:font-style-asian="normal" style:font-weight-asian="normal" style:font-size-complex="26.3999996185303pt" style:font-style-complex="normal" style:font-weight-complex="normal">
        <loext:char-complex-color loext:theme-type="dark1" loext:color-type="theme"/>
      </style:text-properties>
    </style:style>
    <style:style style:name="Nur_20_Titel-outline5" style:display-name="Nur Titel-outline5" style:family="presentation" style:parent-style-name="Nur_20_Titel-outline4">
      <style:paragraph-properties fo:margin-left="0cm" fo:margin-right="0cm" fo:margin-top="0.257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6.3999996185303pt" fo:letter-spacing="normal" fo:language="en" fo:country="US" fo:font-style="normal" style:text-underline-style="none" fo:font-weight="normal" fo:background-color="transparent" style:font-size-asian="26.3999996185303pt" style:font-style-asian="normal" style:font-weight-asian="normal" style:font-size-complex="26.3999996185303pt" style:font-style-complex="normal" style:font-weight-complex="normal">
        <loext:char-complex-color loext:theme-type="dark1" loext:color-type="theme"/>
      </style:text-properties>
    </style:style>
    <style:style style:name="Nur_20_Titel-outline6" style:display-name="Nur Titel-outline6" style:family="presentation" style:parent-style-name="Nur_20_Titel-outline5">
      <style:paragraph-properties fo:margin-left="0cm" fo:margin-right="0cm" fo:margin-top="0.14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9.2999992370605pt" fo:letter-spacing="normal" fo:language="en" fo:country="US" fo:font-style="normal" style:text-underline-style="none" fo:font-weight="normal" fo:background-color="transparent" style:font-size-asian="29.2999992370605pt" style:font-style-asian="normal" style:font-weight-asian="normal" style:font-size-complex="29.2999992370605pt" style:font-style-complex="normal" style:font-weight-complex="normal">
        <loext:char-complex-color loext:theme-type="dark1" loext:color-type="theme"/>
      </style:text-properties>
    </style:style>
    <style:style style:name="Nur_20_Titel-outline7" style:display-name="Nur Titel-outline7" style:family="presentation" style:parent-style-name="Nur_20_Titel-outline6">
      <style:paragraph-properties fo:margin-left="0cm" fo:margin-right="0cm" fo:margin-top="0.14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9.2999992370605pt" fo:letter-spacing="normal" fo:language="en" fo:country="US" fo:font-style="normal" style:text-underline-style="none" fo:font-weight="normal" fo:background-color="transparent" style:font-size-asian="29.2999992370605pt" style:font-style-asian="normal" style:font-weight-asian="normal" style:font-size-complex="29.2999992370605pt" style:font-style-complex="normal" style:font-weight-complex="normal">
        <loext:char-complex-color loext:theme-type="dark1" loext:color-type="theme"/>
      </style:text-properties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family="'Aptos Display'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>
        <text:list-style style:name="Leer-outline1">
          <text:list-level-style-bullet text:level="1" text:bullet-char="•">
            <style:list-level-properties text:space-before="-0.9cm" text:min-label-width="0.9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1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4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1pt" style:font-style-asian="normal" style:font-weight-asian="normal" style:font-name-complex="Noto Sans Devanagari" style:font-family-complex="'Noto Sans Devanagari'" style:font-family-generic-complex="system" style:font-pitch-complex="variable" style:font-size-complex="41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Leer-outline2" style:family="presentation" style:parent-style-name="Leer-outline1">
      <style:paragraph-properties fo:margin-left="0cm" fo:margin-right="0cm" fo:margin-top="0.257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35.2000007629395pt" fo:letter-spacing="normal" fo:language="en" fo:country="US" fo:font-style="normal" style:text-underline-style="none" fo:font-weight="normal" fo:background-color="transparent" style:font-size-asian="35.2000007629395pt" style:font-style-asian="normal" style:font-weight-asian="normal" style:font-size-complex="35.2000007629395pt" style:font-style-complex="normal" style:font-weight-complex="normal">
        <loext:char-complex-color loext:theme-type="dark1" loext:color-type="theme"/>
      </style:text-properties>
    </style:style>
    <style:style style:name="Leer-outline3" style:family="presentation" style:parent-style-name="Leer-outline2">
      <style:paragraph-properties fo:margin-left="0cm" fo:margin-right="0cm" fo:margin-top="0.257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9.2999992370605pt" fo:letter-spacing="normal" fo:language="en" fo:country="US" fo:font-style="normal" style:text-underline-style="none" fo:font-weight="normal" fo:background-color="transparent" style:font-size-asian="29.2999992370605pt" style:font-style-asian="normal" style:font-weight-asian="normal" style:font-size-complex="29.2999992370605pt" style:font-style-complex="normal" style:font-weight-complex="normal">
        <loext:char-complex-color loext:theme-type="dark1" loext:color-type="theme"/>
      </style:text-properties>
    </style:style>
    <style:style style:name="Leer-outline4" style:family="presentation" style:parent-style-name="Leer-outline3">
      <style:paragraph-properties fo:margin-left="0cm" fo:margin-right="0cm" fo:margin-top="0.257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6.3999996185303pt" fo:letter-spacing="normal" fo:language="en" fo:country="US" fo:font-style="normal" style:text-underline-style="none" fo:font-weight="normal" fo:background-color="transparent" style:font-size-asian="26.3999996185303pt" style:font-style-asian="normal" style:font-weight-asian="normal" style:font-size-complex="26.3999996185303pt" style:font-style-complex="normal" style:font-weight-complex="normal">
        <loext:char-complex-color loext:theme-type="dark1" loext:color-type="theme"/>
      </style:text-properties>
    </style:style>
    <style:style style:name="Leer-outline5" style:family="presentation" style:parent-style-name="Leer-outline4">
      <style:paragraph-properties fo:margin-left="0cm" fo:margin-right="0cm" fo:margin-top="0.257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6.3999996185303pt" fo:letter-spacing="normal" fo:language="en" fo:country="US" fo:font-style="normal" style:text-underline-style="none" fo:font-weight="normal" fo:background-color="transparent" style:font-size-asian="26.3999996185303pt" style:font-style-asian="normal" style:font-weight-asian="normal" style:font-size-complex="26.3999996185303pt" style:font-style-complex="normal" style:font-weight-complex="normal">
        <loext:char-complex-color loext:theme-type="dark1" loext:color-type="theme"/>
      </style:text-properties>
    </style:style>
    <style:style style:name="Leer-outline6" style:family="presentation" style:parent-style-name="Leer-outline5">
      <style:paragraph-properties fo:margin-left="0cm" fo:margin-right="0cm" fo:margin-top="0.14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9.2999992370605pt" fo:letter-spacing="normal" fo:language="en" fo:country="US" fo:font-style="normal" style:text-underline-style="none" fo:font-weight="normal" fo:background-color="transparent" style:font-size-asian="29.2999992370605pt" style:font-style-asian="normal" style:font-weight-asian="normal" style:font-size-complex="29.2999992370605pt" style:font-style-complex="normal" style:font-weight-complex="normal">
        <loext:char-complex-color loext:theme-type="dark1" loext:color-type="theme"/>
      </style:text-properties>
    </style:style>
    <style:style style:name="Leer-outline7" style:family="presentation" style:parent-style-name="Leer-outline6">
      <style:paragraph-properties fo:margin-left="0cm" fo:margin-right="0cm" fo:margin-top="0.14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9.2999992370605pt" fo:letter-spacing="normal" fo:language="en" fo:country="US" fo:font-style="normal" style:text-underline-style="none" fo:font-weight="normal" fo:background-color="transparent" style:font-size-asian="29.2999992370605pt" style:font-style-asian="normal" style:font-weight-asian="normal" style:font-size-complex="29.2999992370605pt" style:font-style-complex="normal" style:font-weight-complex="normal">
        <loext:char-complex-color loext:theme-type="dark1" loext:color-type="theme"/>
      </style:text-properties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family="'Aptos Display'" fo:font-size="64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64.5pt" style:font-style-asian="normal" style:font-weight-asian="normal" style:font-name-complex="Noto Sans Devanagari" style:font-family-complex="'Noto Sans Devanagari'" style:font-family-generic-complex="system" style:font-pitch-complex="variable" style:font-size-complex="64.5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Inhalt_20_mit_20_Überschrift-background" style:display-name="Inhalt mit Überschrift-background" style:family="presentation">
      <style:graphic-properties draw:stroke="none" draw:fill="solid" draw:fill-color="#ffffff"/>
      <style:text-properties style:letter-kerning="true"/>
    </style:style>
    <style:style style:name="Inhalt_20_mit_20_Überschrift-backgroundobjects" style:display-name="Inhalt mit 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mit_20_Überschrift-notes" style:display-name="Inhalt mit Überschrif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mit_20_Überschrift-outline1" style:display-name="Inhalt mit Überschrift-outline1" style:family="presentation">
      <style:graphic-properties draw:stroke="none" draw:fill="none" draw:auto-grow-height="false" draw:fit-to-size="false" style:shrink-to-fit="true">
        <text:list-style style:name="Inhalt_20_mit_20_Überschrift-outline1" style:display-name="Inhalt mit Überschrift-outline1">
          <text:list-level-style-number text:level="1" style:num-format="">
            <style:list-level-properties text:space-before="-0.9cm" text:min-label-width="0.9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Noto Sans Devanagari" style:font-family-complex="'Noto Sans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Inhalt_20_mit_20_Überschrift-outline2" style:display-name="Inhalt mit Überschrift-outline2" style:family="presentation" style:parent-style-name="Inhalt_20_mit_20_Überschrift-outline1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de" fo:country="D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Inhalt_20_mit_20_Überschrift-outline3" style:display-name="Inhalt mit Überschrift-outline3" style:family="presentation" style:parent-style-name="Inhalt_20_mit_20_Überschrift-outline2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Inhalt_20_mit_20_Überschrift-outline4" style:display-name="Inhalt mit Überschrift-outline4" style:family="presentation" style:parent-style-name="Inhalt_20_mit_20_Überschrift-outline3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Inhalt_20_mit_20_Überschrift-outline5" style:display-name="Inhalt mit Überschrift-outline5" style:family="presentation" style:parent-style-name="Inhalt_20_mit_20_Überschrift-outline4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Inhalt_20_mit_20_Überschrift-outline6" style:display-name="Inhalt mit Überschrift-outline6" style:family="presentation" style:parent-style-name="Inhalt_20_mit_20_Überschrift-outline5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7" style:display-name="Inhalt mit Überschrift-outline7" style:family="presentation" style:parent-style-name="Inhalt_20_mit_20_Überschrift-outline6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8" style:display-name="Inhalt mit Überschrift-outline8" style:family="presentation" style:parent-style-name="Inhalt_20_mit_20_Überschrift-outline7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9" style:display-name="Inhalt mit Überschrift-outline9" style:family="presentation" style:parent-style-name="Inhalt_20_mit_20_Überschrift-outline8">
      <style:paragraph-properties fo:margin-top="0.1cm" fo:margin-bottom="0cm"/>
      <style:text-properties fo:font-size="20pt" style:font-size-asian="20pt" style:font-size-complex="20pt"/>
    </style:style>
    <style:style style:name="Inhalt_20_mit_20_Überschrift-subtitle" style:display-name="Inhalt mit Überschrift-subtitle" style:family="presentation">
      <style:graphic-properties draw:stroke="none" draw:fill="none" draw:textarea-vertical-align="middle">
        <text:list-style style:name="Inhalt_20_mit_20_Überschrift-subtitle" style:display-name="Inhalt mit 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mit_20_Überschrift-title" style:display-name="Inhalt mit Überschrift-title" style:family="presentation">
      <style:graphic-properties draw:stroke="none" draw:fill="none" draw:textarea-vertical-align="middle">
        <text:list-style style:name="Inhalt_20_mit_20_Überschrift-title" style:display-name="Inhalt mit Überschrif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family="'Aptos Display'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Bild_20_mit_20_Überschrift-background" style:display-name="Bild mit Überschrift-background" style:family="presentation">
      <style:graphic-properties draw:stroke="none" draw:fill="solid" draw:fill-color="#ffffff"/>
      <style:text-properties style:letter-kerning="true"/>
    </style:style>
    <style:style style:name="Bild_20_mit_20_Überschrift-backgroundobjects" style:display-name="Bild mit 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mit_20_Überschrift-notes" style:display-name="Bild mit Überschrif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mit_20_Überschrift-outline1" style:display-name="Bild mit Überschrift-outline1" style:family="presentation">
      <style:graphic-properties draw:stroke="none" draw:fill="none" draw:auto-grow-height="false" draw:fit-to-size="false" style:shrink-to-fit="true">
        <text:list-style style:name="Bild_20_mit_20_Überschrift-outline1" style:display-name="Bild mit Überschrift-outline1">
          <text:list-level-style-number text:level="1" style:num-format="">
            <style:list-level-properties text:space-before="-0.9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Noto Sans Devanagari" style:font-family-complex="'Noto Sans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Bild_20_mit_20_Überschrift-outline2" style:display-name="Bild mit Überschrift-outline2" style:family="presentation" style:parent-style-name="Bild_20_mit_20_Überschrif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ild_20_mit_20_Überschrift-outline3" style:display-name="Bild mit Überschrift-outline3" style:family="presentation" style:parent-style-name="Bild_20_mit_20_Überschrif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_20_mit_20_Überschrift-outline4" style:display-name="Bild mit Überschrift-outline4" style:family="presentation" style:parent-style-name="Bild_20_mit_20_Überschrif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_20_mit_20_Überschrift-outline5" style:display-name="Bild mit Überschrift-outline5" style:family="presentation" style:parent-style-name="Bild_20_mit_20_Überschrift-outline4">
      <style:paragraph-properties fo:margin-top="0.1cm" fo:margin-bottom="0cm"/>
      <style:text-properties fo:font-size="20pt" style:font-size-asian="20pt" style:font-size-complex="20pt"/>
    </style:style>
    <style:style style:name="Bild_20_mit_20_Überschrift-outline6" style:display-name="Bild mit Überschrift-outline6" style:family="presentation" style:parent-style-name="Bild_20_mit_20_Überschrift-outline5">
      <style:paragraph-properties fo:margin-top="0.1cm" fo:margin-bottom="0cm"/>
      <style:text-properties fo:font-size="20pt" style:font-size-asian="20pt" style:font-size-complex="20pt"/>
    </style:style>
    <style:style style:name="Bild_20_mit_20_Überschrift-outline7" style:display-name="Bild mit Überschrift-outline7" style:family="presentation" style:parent-style-name="Bild_20_mit_20_Überschrift-outline6">
      <style:paragraph-properties fo:margin-top="0.1cm" fo:margin-bottom="0cm"/>
      <style:text-properties fo:font-size="20pt" style:font-size-asian="20pt" style:font-size-complex="20pt"/>
    </style:style>
    <style:style style:name="Bild_20_mit_20_Überschrift-outline8" style:display-name="Bild mit Überschrift-outline8" style:family="presentation" style:parent-style-name="Bild_20_mit_20_Überschrift-outline7">
      <style:paragraph-properties fo:margin-top="0.1cm" fo:margin-bottom="0cm"/>
      <style:text-properties fo:font-size="20pt" style:font-size-asian="20pt" style:font-size-complex="20pt"/>
    </style:style>
    <style:style style:name="Bild_20_mit_20_Überschrift-outline9" style:display-name="Bild mit Überschrift-outline9" style:family="presentation" style:parent-style-name="Bild_20_mit_20_Überschrift-outline8">
      <style:paragraph-properties fo:margin-top="0.1cm" fo:margin-bottom="0cm"/>
      <style:text-properties fo:font-size="20pt" style:font-size-asian="20pt" style:font-size-complex="20pt"/>
    </style:style>
    <style:style style:name="Bild_20_mit_20_Überschrift-subtitle" style:display-name="Bild mit Überschrift-subtitle" style:family="presentation">
      <style:graphic-properties draw:stroke="none" draw:fill="none" draw:textarea-vertical-align="middle">
        <text:list-style style:name="Bild_20_mit_20_Überschrift-subtitle" style:display-name="Bild mit 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mit_20_Überschrift-title" style:display-name="Bild mit Überschrift-title" style:family="presentation">
      <style:graphic-properties draw:stroke="none" draw:fill="none" draw:textarea-vertical-align="middle">
        <text:list-style style:name="Bild_20_mit_20_Überschrift-title" style:display-name="Bild mit Überschrif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family="'Aptos Display'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elfolie-background" style:family="presentation">
      <style:graphic-properties draw:stroke="none" draw:fill="solid" draw:fill-color="#2e3440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">
            <style:list-level-properties text:space-before="-0.9cm" text:min-label-width="0.9cm"/>
            <style:text-properties fo:font-family="Wingdings" style:font-charset="x-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left="0cm" fo:margin-right="0cm" fo:margin-top="0.4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elfolie-outline3" style:family="presentation" style:parent-style-name="Titelfolie-outline2">
      <style:paragraph-properties fo:margin-left="0cm" fo:margin-right="0cm" fo:margin-top="0.3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elfolie-outline4" style:family="presentation" style:parent-style-name="Titelfolie-outline3">
      <style:paragraph-properties fo:margin-left="0cm" fo:margin-right="0cm" fo:margin-top="0.2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left="0cm" fo:margin-right="0cm" fo:margin-top="0.1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6" style:family="presentation" style:parent-style-name="Titelfolie-outline5">
      <style:paragraph-properties fo:margin-left="0cm" fo:margin-right="0cm" fo:margin-top="0.1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7" style:family="presentation" style:parent-style-name="Titelfolie-outline6">
      <style:paragraph-properties fo:margin-left="0cm" fo:margin-right="0cm" fo:margin-top="0.1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6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normal" style:font-name-complex="Noto Sans Devanagari" style:font-family-complex="'Noto Sans Devanagar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Default-background" style:family="presentation">
      <style:graphic-properties draw:stroke="none" draw:fill="solid" draw:fill-color="#2e344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">
            <style:list-level-properties text:space-before="-0.9cm" text:min-label-width="0.9cm"/>
            <style:text-properties fo:font-family="Wingdings" style:font-charset="x-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6" style:family="presentation" style:parent-style-name="Default-outline5">
      <style:paragraph-properties fo:margin-left="0cm" fo:margin-right="0cm" fo:margin-top="0.1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7" style:family="presentation" style:parent-style-name="Default-outline6">
      <style:paragraph-properties fo:margin-left="0cm" fo:margin-right="0cm" fo:margin-top="0.1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6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normal" style:font-name-complex="Noto Sans Devanagari" style:font-family-complex="'Noto Sans Devanagar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Titel_20_und_20_vertikaler_20_Text-background" style:display-name="Titel und vertikaler Text-background" style:family="presentation">
      <style:graphic-properties draw:stroke="none" draw:fill="solid" draw:fill-color="#ffffff"/>
      <style:text-properties style:letter-kerning="true"/>
    </style:style>
    <style:style style:name="Titel_20_und_20_vertikaler_20_Text-backgroundobjects" style:display-name="Titel und vertikaler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vertikaler_20_Text-notes" style:display-name="Titel und vertikaler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vertikaler_20_Text-outline1" style:display-name="Titel und vertikaler Text-outline1" style:family="presentation">
      <style:graphic-properties draw:stroke="none" draw:fill="none" draw:auto-grow-height="false" draw:fit-to-size="false" style:shrink-to-fit="true">
        <text:list-style style:name="Titel_20_und_20_vertikaler_20_Text-outline1" style:display-name="Titel und vertikaler Text-outline1">
          <text:list-level-style-bullet text:level="1" text:bullet-char="•">
            <style:list-level-properties text:space-before="-0.9cm" text:min-label-width="0.9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el_20_und_20_vertikaler_20_Text-outline2" style:display-name="Titel und vertikaler Text-outline2" style:family="presentation" style:parent-style-name="Titel_20_und_20_vertikaler_20_Text-outline1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itel_20_und_20_vertikaler_20_Text-outline3" style:display-name="Titel und vertikaler Text-outline3" style:family="presentation" style:parent-style-name="Titel_20_und_20_vertikaler_20_Text-outline2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itel_20_und_20_vertikaler_20_Text-outline4" style:display-name="Titel und vertikaler Text-outline4" style:family="presentation" style:parent-style-name="Titel_20_und_20_vertikaler_20_Text-outline3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itel_20_und_20_vertikaler_20_Text-outline5" style:display-name="Titel und vertikaler Text-outline5" style:family="presentation" style:parent-style-name="Titel_20_und_20_vertikaler_20_Text-outline4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itel_20_und_20_vertikaler_20_Text-outline6" style:display-name="Titel und vertikaler Text-outline6" style:family="presentation" style:parent-style-name="Titel_20_und_20_vertikaler_20_Text-outline5">
      <style:paragraph-properties fo:margin-top="0.1cm" fo:margin-bottom="0cm"/>
      <style:text-properties fo:font-size="20pt" style:font-size-asian="20pt" style:font-size-complex="20pt"/>
    </style:style>
    <style:style style:name="Titel_20_und_20_vertikaler_20_Text-outline7" style:display-name="Titel und vertikaler Text-outline7" style:family="presentation" style:parent-style-name="Titel_20_und_20_vertikaler_20_Text-outline6">
      <style:paragraph-properties fo:margin-top="0.1cm" fo:margin-bottom="0cm"/>
      <style:text-properties fo:font-size="20pt" style:font-size-asian="20pt" style:font-size-complex="20pt"/>
    </style:style>
    <style:style style:name="Titel_20_und_20_vertikaler_20_Text-outline8" style:display-name="Titel und vertikaler Text-outline8" style:family="presentation" style:parent-style-name="Titel_20_und_20_vertikaler_20_Text-outline7">
      <style:paragraph-properties fo:margin-top="0.1cm" fo:margin-bottom="0cm"/>
      <style:text-properties fo:font-size="20pt" style:font-size-asian="20pt" style:font-size-complex="20pt"/>
    </style:style>
    <style:style style:name="Titel_20_und_20_vertikaler_20_Text-outline9" style:display-name="Titel und vertikaler Text-outline9" style:family="presentation" style:parent-style-name="Titel_20_und_20_vertikaler_20_Text-outline8">
      <style:paragraph-properties fo:margin-top="0.1cm" fo:margin-bottom="0cm"/>
      <style:text-properties fo:font-size="20pt" style:font-size-asian="20pt" style:font-size-complex="20pt"/>
    </style:style>
    <style:style style:name="Titel_20_und_20_vertikaler_20_Text-subtitle" style:display-name="Titel und vertikaler Text-subtitle" style:family="presentation">
      <style:graphic-properties draw:stroke="none" draw:fill="none" draw:textarea-vertical-align="middle">
        <text:list-style style:name="Titel_20_und_20_vertikaler_20_Text-subtitle" style:display-name="Titel und vertikaler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vertikaler_20_Text-title" style:display-name="Titel und vertikaler Text-title" style:family="presentation">
      <style:graphic-properties draw:stroke="none" draw:fill="none" draw:textarea-vertical-align="middle">
        <text:list-style style:name="Titel_20_und_20_vertikaler_20_Text-title" style:display-name="Titel und vertikaler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family="'Aptos Display'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tikaler_20_Titel_20_und_20_Text-background" style:display-name="Vertikaler Titel und Text-background" style:family="presentation">
      <style:graphic-properties draw:stroke="none" draw:fill="solid" draw:fill-color="#ffffff"/>
      <style:text-properties style:letter-kerning="true"/>
    </style:style>
    <style:style style:name="Vertikaler_20_Titel_20_und_20_Text-backgroundobjects" style:display-name="Vertikaler Titel u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kaler_20_Titel_20_und_20_Text-notes" style:display-name="Vertikaler Titel u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kaler_20_Titel_20_und_20_Text-outline1" style:display-name="Vertikaler Titel und Text-outline1" style:family="presentation">
      <style:graphic-properties draw:stroke="none" draw:fill="none" draw:auto-grow-height="false" draw:fit-to-size="false" style:shrink-to-fit="true">
        <text:list-style style:name="Vertikaler_20_Titel_20_und_20_Text-outline1" style:display-name="Vertikaler Titel und Text-outline1">
          <text:list-level-style-bullet text:level="1" text:bullet-char="•">
            <style:list-level-properties text:space-before="-0.9cm" text:min-label-width="0.9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tikaler_20_Titel_20_und_20_Text-outline2" style:display-name="Vertikaler Titel und Text-outline2" style:family="presentation" style:parent-style-name="Vertikaler_20_Titel_20_und_20_Text-outline1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Vertikaler_20_Titel_20_und_20_Text-outline3" style:display-name="Vertikaler Titel und Text-outline3" style:family="presentation" style:parent-style-name="Vertikaler_20_Titel_20_und_20_Text-outline2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Vertikaler_20_Titel_20_und_20_Text-outline4" style:display-name="Vertikaler Titel und Text-outline4" style:family="presentation" style:parent-style-name="Vertikaler_20_Titel_20_und_20_Text-outline3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Vertikaler_20_Titel_20_und_20_Text-outline5" style:display-name="Vertikaler Titel und Text-outline5" style:family="presentation" style:parent-style-name="Vertikaler_20_Titel_20_und_20_Text-outline4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Vertikaler_20_Titel_20_und_20_Text-outline6" style:display-name="Vertikaler Titel und Text-outline6" style:family="presentation" style:parent-style-name="Vertikaler_20_Titel_20_und_20_Text-outline5">
      <style:paragraph-properties fo:margin-top="0.1cm" fo:margin-bottom="0cm"/>
      <style:text-properties fo:font-size="20pt" style:font-size-asian="20pt" style:font-size-complex="20pt"/>
    </style:style>
    <style:style style:name="Vertikaler_20_Titel_20_und_20_Text-outline7" style:display-name="Vertikaler Titel und Text-outline7" style:family="presentation" style:parent-style-name="Vertikaler_20_Titel_20_und_20_Text-outline6">
      <style:paragraph-properties fo:margin-top="0.1cm" fo:margin-bottom="0cm"/>
      <style:text-properties fo:font-size="20pt" style:font-size-asian="20pt" style:font-size-complex="20pt"/>
    </style:style>
    <style:style style:name="Vertikaler_20_Titel_20_und_20_Text-outline8" style:display-name="Vertikaler Titel und Text-outline8" style:family="presentation" style:parent-style-name="Vertikaler_20_Titel_20_und_20_Text-outline7">
      <style:paragraph-properties fo:margin-top="0.1cm" fo:margin-bottom="0cm"/>
      <style:text-properties fo:font-size="20pt" style:font-size-asian="20pt" style:font-size-complex="20pt"/>
    </style:style>
    <style:style style:name="Vertikaler_20_Titel_20_und_20_Text-outline9" style:display-name="Vertikaler Titel und Text-outline9" style:family="presentation" style:parent-style-name="Vertikaler_20_Titel_20_und_20_Text-outline8">
      <style:paragraph-properties fo:margin-top="0.1cm" fo:margin-bottom="0cm"/>
      <style:text-properties fo:font-size="20pt" style:font-size-asian="20pt" style:font-size-complex="20pt"/>
    </style:style>
    <style:style style:name="Vertikaler_20_Titel_20_und_20_Text-subtitle" style:display-name="Vertikaler Titel und Text-subtitle" style:family="presentation">
      <style:graphic-properties draw:stroke="none" draw:fill="none" draw:textarea-vertical-align="middle">
        <text:list-style style:name="Vertikaler_20_Titel_20_und_20_Text-subtitle" style:display-name="Vertikaler Titel u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kaler_20_Titel_20_und_20_Text-title" style:display-name="Vertikaler Titel und Text-title" style:family="presentation">
      <style:graphic-properties draw:stroke="none" draw:fill="none" draw:textarea-vertical-align="middle">
        <text:list-style style:name="Vertikaler_20_Titel_20_und_20_Text-title" style:display-name="Vertikaler Titel und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family="'Aptos Display'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el_20_und_20_Inhalt-background" style:display-name="Titel und Inhalt-background" style:family="presentation">
      <style:graphic-properties draw:stroke="none" draw:fill="solid" draw:fill-color="#2e3440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•">
            <style:list-level-properties text:space-before="-0.9cm" text:min-label-width="0.9cm"/>
            <style:text-properties style:font-name="Arial" fo:color="#ffffff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light1" loext:color-type="theme"/>
      </style:text-properties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light1" loext:color-type="theme"/>
      </style:text-properties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light1" loext:color-type="theme"/>
      </style:text-properties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light1" loext:color-type="theme"/>
      </style:text-properties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Abschnitts-_a_überschrift-background" style:display-name="Abschnitts-&#10;überschrift-background" style:family="presentation">
      <style:graphic-properties draw:stroke="none" draw:fill="solid" draw:fill-color="#ffffff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false" style:shrink-to-fit="true">
        <text:list-style style:name="Abschnitts-_a_überschrift-outline1" style:display-name="Abschnitts-&#10;überschrift-outline1">
          <text:list-level-style-number text:level="1" style:num-format="">
            <style:list-level-properties text:space-before="-0.9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family="Aptos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tint" loext:value="8200"/>
        </loext:char-complex-color>
      </style:text-properties>
    </style:style>
    <style:style style:name="Abschnitts-_a_überschrift-outline2" style:display-name="Abschnitts-&#10;überschrift-outline2" style:family="presentation" style:parent-style-name="Abschnitts-_a_überschrif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Abschnitts-_a_überschrift-outline3" style:display-name="Abschnitts-&#10;überschrift-outline3" style:family="presentation" style:parent-style-name="Abschnitts-_a_überschrif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Abschnitts-_a_überschrift-outline4" style:display-name="Abschnitts-&#10;überschrift-outline4" style:family="presentation" style:parent-style-name="Abschnitts-_a_überschrif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>
        <text:list-style style:name="Abschnitts-_a_überschrift-title" style:display-name="Abschnitts-&#10;überschrif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family="'Aptos Display'" fo:font-size="6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normal" style:font-name-complex="Noto Sans Devanagari" style:font-family-complex="'Noto Sans Devanagar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_31__5f_Titel_20_und_20_Inhalt-background" style:display-name="1_Titel und Inhalt-background" style:family="presentation">
      <style:graphic-properties draw:stroke="none" draw:fill="solid" draw:fill-color="#2e3440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draw:fill="none" draw:auto-grow-height="false" draw:fit-to-size="false" style:shrink-to-fit="true">
        <text:list-style style:name="_31__5f_Titel_20_und_20_Inhalt-outline1" style:display-name="1_Titel und Inhalt-outline1">
          <text:list-level-style-bullet text:level="1" text:bullet-char="•">
            <style:list-level-properties text:space-before="-0.9cm" text:min-label-width="0.9cm"/>
            <style:text-properties style:font-name="Arial" fo:color="#ffffff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_31__5f_Titel_20_und_20_Inhalt-outline2" style:display-name="1_Titel und Inhalt-outline2" style:family="presentation" style:parent-style-name="_31__5f_Titel_20_und_20_Inhalt-outline1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light1" loext:color-type="theme"/>
      </style:text-properties>
    </style:style>
    <style:style style:name="_31__5f_Titel_20_und_20_Inhalt-outline3" style:display-name="1_Titel und Inhalt-outline3" style:family="presentation" style:parent-style-name="_31__5f_Titel_20_und_20_Inhalt-outline2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light1" loext:color-type="theme"/>
      </style:text-properties>
    </style:style>
    <style:style style:name="_31__5f_Titel_20_und_20_Inhalt-outline4" style:display-name="1_Titel und Inhalt-outline4" style:family="presentation" style:parent-style-name="_31__5f_Titel_20_und_20_Inhalt-outline3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light1" loext:color-type="theme"/>
      </style:text-properties>
    </style:style>
    <style:style style:name="_31__5f_Titel_20_und_20_Inhalt-outline5" style:display-name="1_Titel und Inhalt-outline5" style:family="presentation" style:parent-style-name="_31__5f_Titel_20_und_20_Inhalt-outline4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light1" loext:color-type="theme"/>
      </style:text-properties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draw:fill="none" draw:textarea-vertical-align="middle">
        <text:list-style style:name="_31__5f_Titel_20_und_20_Inhalt-title" style:display-name="1_Titel und Inhal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2e344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Zwei_20_Inhalt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Zwei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Zwei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Zwei_20_Inhal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Zwei_20_Inhal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" style:family="presentation" style:parent-style-name="Vergleich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Vergleich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Vergleich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Vergleich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Vergleich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" style:family="presentation" style:parent-style-name="Vergleich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2" style:family="presentation" style:parent-style-name="Nur_20_Titel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Nur_20_Tite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Nur_20_Titel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Nur_20_Titel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Nur_20_Titel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Le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Leer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Le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Le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1" style:family="presentation" style:parent-style-name="Le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2" style:family="presentation" style:parent-style-name="Inhalt_20_mit_20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Inhalt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Inhalt_20_mit_20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Inhalt_20_mit_20_Überschrif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6" style:family="presentation" style:parent-style-name="Inhalt_20_mit_20_Überschrif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7" style:family="presentation" style:parent-style-name="Bild_20_mit_20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Bild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9" style:family="presentation" style:parent-style-name="Bild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Bild_20_mit_20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Bild_20_mit_20_Überschrif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2" style:family="presentation" style:parent-style-name="Bild_20_mit_20_Überschrif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3" style:family="presentation" style:parent-style-name="Titelfoli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Titelfoli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Titel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6" style:family="presentation" style:parent-style-name="Titelfoli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Titelfoli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Defaul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Defau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Titel_20_und_20_vertikaler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Titel_20_und_20_vertikaler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45" style:family="presentation" style:parent-style-name="Titel_20_und_20_vertikaler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Titel_20_und_20_vertikaler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Titel_20_und_20_vertikaler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Vertikaler_20_Titel_20_u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min-width="22.86cm" fo:padding-top="0.254cm" fo:padding-bottom="0.254cm" fo:padding-left="0.127cm" fo:padding-right="0.127cm" fo:wrap-option="wrap" loext:decorative="false"/>
      <style:paragraph-properties style:writing-mode="tb-rl"/>
    </style:style>
    <style:style style:name="Mpr49" style:family="presentation" style:parent-style-name="Vertikaler_20_Titel_20_u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50" style:family="presentation" style:parent-style-name="Vertikaler_20_Titel_20_u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Vertikaler_20_Titel_20_u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2" style:family="presentation" style:parent-style-name="Vertikaler_20_Titel_20_u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3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Titel_20_und_20_Inhalt-backgroundobjects">
      <style:graphic-properties draw:stroke="none" svg:stroke-width="0cm" draw:fill="solid" draw:fill-color="#2e3440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Titel_20_und_20_Inha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8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9" style:family="presentation" style:parent-style-name="Abschnitts-_a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Abschnitts-_a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Abschnitts-_a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Abschnitts-_a_überschrif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3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4" style:family="presentation" style:parent-style-name="_31__5f_Titel_20_und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_31__5f_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_31__5f_Titel_20_und_20_Inhalt-backgroundobjects">
      <style:graphic-properties draw:stroke="none" svg:stroke-width="0cm" draw:fill="solid" draw:fill-color="#2e3440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7" style:family="presentation" style:parent-style-name="_31__5f_Titel_20_und_20_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_31__5f_Titel_20_und_20_Inha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9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</style:style>
    <style:style style:name="MP6" style:family="paragraph">
      <loext:graphic-properties draw:fill="none"/>
      <style:paragraph-properties fo:text-align="left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90%" fo:text-align="left" fo:text-indent="0cm" loext:tab-stop-distance="2.54cm">
        <style:tab-stops/>
      </style:paragraph-properties>
    </style:style>
    <style:style style:name="MP8" style:family="paragraph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</style:style>
    <style:style style:name="MP9" style:family="paragraph">
      <loext:graphic-properties draw:fill="none"/>
      <style:paragraph-properties fo:text-align="left" style:font-independent-line-spacing="true"/>
      <style:text-properties fo:font-size="28pt"/>
    </style:style>
    <style:style style:name="MP10" style:family="paragraph">
      <style:paragraph-properties fo:margin-left="0cm" fo:margin-right="0cm" fo:margin-top="0cm" fo:margin-bottom="0cm" fo:line-height="100%" fo:text-align="left" fo:text-indent="0cm" loext:tab-stop-distance="1.27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font-independent-line-spacing="true"/>
      <style:text-properties fo:font-size="14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right" fo:text-indent="0cm" loext:tab-stop-distance="1.27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.353cm" fo:margin-bottom="0cm" fo:line-height="90%" fo:text-align="left" fo:text-indent="0cm" loext:tab-stop-distance="2.54cm">
        <style:tab-stops>
          <style:tab-stop style:position="0cm"/>
        </style:tab-stops>
      </style:paragraph-properties>
    </style:style>
    <style:style style:name="MP16" style:family="paragraph">
      <loext:graphic-properties draw:fill="none"/>
      <style:paragraph-properties fo:text-align="left" style:font-independent-line-spacing="true"/>
      <style:text-properties fo:font-size="24pt"/>
    </style:style>
    <style:style style:name="MP17" style:family="paragraph">
      <style:paragraph-properties fo:margin-left="0cm" fo:margin-right="0cm" fo:margin-top="0.176cm" fo:margin-bottom="0cm" fo:line-height="90%" fo:text-align="left" fo:text-indent="0cm" loext:tab-stop-distance="2.54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516cm" fo:margin-bottom="0cm" fo:line-height="90%" fo:text-align="left" fo:text-indent="0cm" loext:tab-stop-distance="2.54cm">
        <style:tab-stops/>
      </style:paragraph-properties>
    </style:style>
    <style:style style:name="MP19" style:family="paragraph">
      <style:paragraph-properties fo:margin-left="0cm" fo:margin-right="0cm" fo:margin-top="0.257cm" fo:margin-bottom="0cm" fo:line-height="90%" fo:text-align="left" fo:text-indent="0cm" loext:tab-stop-distance="2.54cm">
        <style:tab-stops/>
      </style:paragraph-properties>
    </style:style>
    <style:style style:name="MP20" style:family="paragraph">
      <style:paragraph-properties fo:margin-left="0cm" fo:margin-right="0cm" fo:margin-top="0.146cm" fo:margin-bottom="0cm" fo:line-height="90%" fo:text-align="left" fo:text-indent="0cm" loext:tab-stop-distance="2.54cm">
        <style:tab-stops/>
      </style:paragraph-properties>
    </style:style>
    <style:style style:name="MP21" style:family="paragraph">
      <loext:graphic-properties draw:fill="none"/>
      <style:paragraph-properties fo:text-align="left" style:font-independent-line-spacing="true"/>
      <style:text-properties fo:font-size="41pt"/>
    </style:style>
    <style:style style:name="MP22" style:family="paragraph">
      <loext:graphic-properties draw:fill="none"/>
      <style:paragraph-properties fo:text-align="left" style:font-independent-line-spacing="true"/>
      <style:text-properties fo:font-size="64.5pt"/>
    </style:style>
    <style:style style:name="MP23" style:family="paragraph">
      <loext:graphic-properties draw:fill="none"/>
      <style:paragraph-properties fo:text-align="left" style:font-independent-line-spacing="true"/>
      <style:text-properties fo:font-size="32pt"/>
    </style:style>
    <style:style style:name="MP24" style:family="paragraph">
      <loext:graphic-properties draw:fill="none"/>
      <style:paragraph-properties fo:text-align="left" style:font-independent-line-spacing="true"/>
      <style:text-properties fo:font-size="16pt"/>
    </style:style>
    <style:style style:name="MP25" style:family="paragraph">
      <style:paragraph-properties fo:margin-left="0cm" fo:margin-right="0cm" fo:margin-top="0cm" fo:margin-bottom="0cm" fo:line-height="100%" fo:text-align="left" fo:text-indent="0cm" loext:tab-stop-distance="1.27cm">
        <style:tab-stops>
          <style:tab-stop style:position="0cm"/>
        </style:tab-stops>
      </style:paragraph-properties>
    </style:style>
    <style:style style:name="MP26" style:family="paragraph">
      <style:paragraph-properties fo:margin-left="0cm" fo:margin-right="0cm" fo:margin-top="0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MP27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MP28" style:family="paragraph">
      <loext:graphic-properties draw:fill="none"/>
      <style:paragraph-properties fo:text-align="left"/>
      <style:text-properties fo:font-size="18pt"/>
    </style:style>
    <style:style style:name="MP29" style:family="paragraph">
      <style:paragraph-properties fo:margin-left="0cm" fo:margin-right="0cm" fo:margin-top="0.5cm" fo:margin-bottom="0cm" fo:line-height="100%" fo:text-align="left" fo:text-indent="0cm"/>
    </style:style>
    <style:style style:name="MP30" style:family="paragraph">
      <style:paragraph-properties fo:margin-left="0cm" fo:margin-right="0cm" fo:margin-top="0.4cm" fo:margin-bottom="0cm" fo:line-height="100%" fo:text-align="left" fo:text-indent="0cm"/>
    </style:style>
    <style:style style:name="MP31" style:family="paragraph">
      <style:paragraph-properties fo:margin-left="0cm" fo:margin-right="0cm" fo:margin-top="0.3cm" fo:margin-bottom="0cm" fo:line-height="100%" fo:text-align="left" fo:text-indent="0cm"/>
    </style:style>
    <style:style style:name="MP32" style:family="paragraph">
      <style:paragraph-properties fo:margin-left="0cm" fo:margin-right="0cm" fo:margin-top="0.2cm" fo:margin-bottom="0cm" fo:line-height="100%" fo:text-align="left" fo:text-indent="0cm"/>
    </style:style>
    <style:style style:name="MP33" style:family="paragraph">
      <style:paragraph-properties fo:margin-left="0cm" fo:margin-right="0cm" fo:margin-top="0.1cm" fo:margin-bottom="0cm" fo:line-height="100%" fo:text-align="left" fo:text-indent="0cm"/>
    </style:style>
    <style:style style:name="MP34" style:family="paragraph">
      <loext:graphic-properties draw:fill="none"/>
      <style:paragraph-properties fo:text-align="left" style:font-independent-line-spacing="true"/>
      <style:text-properties fo:font-size="22pt"/>
    </style:style>
    <style:style style:name="MP35" style:family="paragraph">
      <loext:graphic-properties draw:fill="solid" draw:fill-color="#2e3440"/>
      <style:paragraph-properties fo:text-align="left" style:font-independent-line-spacing="true"/>
      <style:text-properties fo:font-size="12pt" style:font-size-asian="14pt" style:font-size-complex="14pt"/>
    </style:style>
    <style:style style:name="MP36" style:family="paragraph">
      <loext:graphic-properties draw:fill="none"/>
      <style:paragraph-properties fo:text-align="left" style:font-independent-line-spacing="true"/>
      <style:text-properties fo:font-size="6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4pt" fo:letter-spacing="normal" fo:language="de" fo:country="DE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de" fo:country="D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de" fo:country="DE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41pt" fo:letter-spacing="normal" fo:language="en" fo:country="US" fo:font-style="normal" style:text-underline-style="none" fo:font-weight="normal" fo:background-color="transparent" style:font-size-asian="41pt" style:font-style-asian="normal" style:font-weight-asian="normal" style:font-size-complex="41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35.2000007629395pt" fo:letter-spacing="normal" fo:language="en" fo:country="US" fo:font-style="normal" style:text-underline-style="none" fo:font-weight="normal" fo:background-color="transparent" style:font-size-asian="35.2000007629395pt" style:font-style-asian="normal" style:font-weight-asian="normal" style:font-size-complex="35.2000007629395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9.2999992370605pt" fo:letter-spacing="normal" fo:language="en" fo:country="US" fo:font-style="normal" style:text-underline-style="none" fo:font-weight="normal" fo:background-color="transparent" style:font-size-asian="29.2999992370605pt" style:font-style-asian="normal" style:font-weight-asian="normal" style:font-size-complex="29.2999992370605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6.3999996185303pt" fo:letter-spacing="normal" fo:language="en" fo:country="US" fo:font-style="normal" style:text-underline-style="none" fo:font-weight="normal" fo:background-color="transparent" style:font-size-asian="26.3999996185303pt" style:font-style-asian="normal" style:font-weight-asian="normal" style:font-size-complex="26.3999996185303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4.5pt" fo:letter-spacing="normal" fo:language="en" fo:country="US" fo:font-style="normal" style:text-underline-style="none" fo:font-weight="normal" fo:background-color="transparent" style:font-size-asian="64.5pt" style:font-style-asian="normal" style:font-weight-asian="normal" style:font-size-complex="64.5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32pt" fo:letter-spacing="normal" fo:language="de" fo:country="D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32pt" fo:letter-spacing="normal" fo:language="de" fo:country="D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60pt" fo:letter-spacing="normal" fo:language="de" fo:country="DE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light1" loext:color-type="theme"/>
      </style:text-properties>
    </style:style>
    <style:style style:name="M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2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2pt" fo:letter-spacing="normal" fo:language="de" fo:country="D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/>
      </style:text-properties>
    </style:style>
    <style:style style:name="MT2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light1" loext:color-type="theme"/>
      </style:text-properties>
    </style:style>
    <style:style style:name="M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>
          <loext:transformation loext:type="tint" loext:value="8200"/>
        </loext:char-complex-color>
      </style:text-properties>
    </style:style>
    <style:style style:name="M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de" fo:country="DE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28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-0.9cm" text:min-label-width="0.9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-0.9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bullet text:level="1" text:bullet-char="">
        <style:list-level-properties text:space-before="-0.9cm" text:min-label-width="0.9cm"/>
        <style:text-properties fo:font-family="Wingdings" style:font-charset="x-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-0.9cm" text:min-label-width="0.9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7</text:page-number></text:span></text:p>
        </draw:text-box>
      </draw:frame>
    </style:handout-master>
    <style:master-page style:name="Zwei_20_Inhalte" style:display-name="Zwei Inhalte" style:page-layout-name="PM1" draw:style-name="Mdp1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1" draw:text-style-name="MP6" draw:layer="backgroundobjects" svg:width="21.899cm" svg:height="3.672cm" svg:x="1.744cm" svg:y="1.012cm" presentation:class="title" presentation:user-transformed="true">
        <draw:text-box>
          <text:p text:style-name="MP5"><text:span text:style-name="MT2">Mastertitelformat bearbeiten</text:span></text:p>
        </draw:text-box>
      </draw:frame>
      <draw:frame draw:name="PlaceHolder 2" presentation:style-name="Mpr2" draw:text-style-name="MP9" draw:layer="backgroundobjects" svg:width="10.785cm" svg:height="12.077cm" svg:x="1.744cm" svg:y="5.07cm" presentation:class="outline" presentation:user-transformed="true">
        <draw:text-box>
          <text:list text:style-name="ML3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8"><text:span text:style-name="MT5">Dritte Ebene</text:span></text:p>
                      <text:list>
                        <text:list-item>
                          <text:p text:style-name="MP8"><text:span text:style-name="MT6">Vierte Ebene</text:span></text:p>
                          <text:list>
                            <text:list-item>
                              <text:p text:style-name="MP8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2" draw:text-style-name="MP9" draw:layer="backgroundobjects" svg:width="10.785cm" svg:height="12.077cm" svg:x="12.858cm" svg:y="5.07cm" presentation:class="outline" presentation:user-transformed="true">
        <draw:text-box>
          <text:list text:style-name="ML4">
            <text:list-item>
              <text:p text:style-name="MP7"><text:span text:style-name="MT3">Mastertextformat bearbeiten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3" draw:text-style-name="MP11" draw:layer="backgroundobjects" svg:width="5.705cm" svg:height="1.004cm" svg:x="1.744cm" svg:y="17.656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PlaceHolder 5" presentation:style-name="Mpr3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8"><presentation:footer/></text:span></text:p>
        </draw:text-box>
      </draw:frame>
      <draw:frame draw:name="PlaceHolder 6" presentation:style-name="Mpr3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7"><text:page-number>27</text:page-number></text:span></text:p>
        </draw:text-box>
      </draw:frame>
      <presentation:notes style:page-layout-name="PM0">
        <draw:page-thumbnail presentation:style-name="Zwei_20_Inhalte-title" draw:layer="backgroundobjects" svg:width="18.624cm" svg:height="10.476cm" svg:x="1.482cm" svg:y="2.123cm" presentation:class="page"/>
        <draw:frame presentation:style-name="Zwei_20_Inhalt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7</text:page-number></text:span></text:p>
          </draw:text-box>
        </draw:frame>
      </presentation:notes>
    </style:master-page>
    <style:master-page style:name="Vergleich" style:page-layout-name="PM1" draw:style-name="Mdp1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6" draw:text-style-name="MP6" draw:layer="backgroundobjects" svg:width="21.899cm" svg:height="3.672cm" svg:x="1.749cm" svg:y="1.012cm" presentation:class="title" presentation:user-transformed="true">
        <draw:text-box>
          <text:p text:style-name="MP5"><text:span text:style-name="MT2">Mastertitelformat bearbeiten</text:span></text:p>
        </draw:text-box>
      </draw:frame>
      <draw:frame draw:name="PlaceHolder 2" presentation:style-name="Mpr7" draw:text-style-name="MP16" draw:layer="backgroundobjects" svg:width="10.735cm" svg:height="2.279cm" svg:x="1.749cm" svg:y="4.668cm" presentation:class="outline" presentation:user-transformed="true">
        <draw:text-box>
          <text:list text:style-name="ML3">
            <text:list-item>
              <text:p text:style-name="MP15"><text:span text:style-name="MT9">Mastertextformat bearbeiten</text:span></text:p>
            </text:list-item>
          </text:list>
        </draw:text-box>
      </draw:frame>
      <draw:frame draw:name="PlaceHolder 3" presentation:style-name="Mpr8" draw:text-style-name="MP9" draw:layer="backgroundobjects" svg:width="10.735cm" svg:height="10.225cm" svg:x="1.749cm" svg:y="6.957cm" presentation:class="outline" presentation:user-transformed="true">
        <draw:text-box>
          <text:list text:style-name="ML4">
            <text:list-item>
              <text:p text:style-name="MP15"><text:span text:style-name="MT3">Mastertextformat bearbeiten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7" draw:text-style-name="MP16" draw:layer="backgroundobjects" svg:width="10.787cm" svg:height="2.279cm" svg:x="12.858cm" svg:y="4.668cm" presentation:class="outline" presentation:user-transformed="true">
        <draw:text-box>
          <text:p text:style-name="MP15"><text:span text:style-name="MT9">Mastertextformat bearbeiten</text:span></text:p>
        </draw:text-box>
      </draw:frame>
      <draw:frame draw:name="PlaceHolder 5" presentation:style-name="Mpr8" draw:text-style-name="MP9" draw:layer="backgroundobjects" svg:width="10.787cm" svg:height="10.225cm" svg:x="12.858cm" svg:y="6.957cm" presentation:class="outline" presentation:user-transformed="true">
        <draw:text-box>
          <text:list text:style-name="ML4">
            <text:list-item>
              <text:p text:style-name="MP15"><text:span text:style-name="MT3">Mastertextformat bearbeiten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6" presentation:style-name="Mpr9" draw:text-style-name="MP11" draw:layer="backgroundobjects" svg:width="5.705cm" svg:height="1.004cm" svg:x="1.744cm" svg:y="17.656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PlaceHolder 7" presentation:style-name="Mpr9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8"><presentation:footer/></text:span></text:p>
        </draw:text-box>
      </draw:frame>
      <draw:frame draw:name="PlaceHolder 8" presentation:style-name="Mpr9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7"><text:page-number>27</text:page-number></text:span></text:p>
        </draw:text-box>
      </draw:frame>
      <presentation:notes style:page-layout-name="PM0">
        <draw:page-thumbnail presentation:style-name="Vergleich-title" draw:layer="backgroundobjects" svg:width="0.001cm" svg:height="0.001cm" svg:x="0cm" svg:y="2.123cm" presentation:class="page"/>
        <draw:frame presentation:style-name="Vergleich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7</text:page-number></text:span></text:p>
          </draw:text-box>
        </draw:frame>
      </presentation:notes>
    </style:master-page>
    <style:master-page style:name="Nur_20_Titel" style:display-name="Nur Titel" style:page-layout-name="PM1" draw:style-name="Mdp1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12" draw:text-style-name="MP6" draw:layer="backgroundobjects" svg:width="21.899cm" svg:height="3.672cm" svg:x="1.744cm" svg:y="1.012cm" presentation:class="title" presentation:user-transformed="true">
        <draw:text-box>
          <text:p text:style-name="MP5"><text:span text:style-name="MT2">Mastertitelformat bearbeiten</text:span></text:p>
        </draw:text-box>
      </draw:frame>
      <draw:frame draw:name="PlaceHolder 2" presentation:style-name="Mpr13" draw:text-style-name="MP11" draw:layer="backgroundobjects" svg:width="5.705cm" svg:height="1.004cm" svg:x="1.744cm" svg:y="17.656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PlaceHolder 3" presentation:style-name="Mpr13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8"><presentation:footer/></text:span></text:p>
        </draw:text-box>
      </draw:frame>
      <draw:frame draw:name="PlaceHolder 4" presentation:style-name="Mpr13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7"><text:page-number>27</text:page-number></text:span></text:p>
        </draw:text-box>
      </draw:frame>
      <draw:frame draw:name="PlaceHolder 5" presentation:style-name="Mpr14" draw:text-style-name="MP21" draw:layer="backgroundobjects" svg:width="22.85cm" svg:height="11.037cm" svg:x="1.27cm" svg:y="4.457cm" presentation:class="outline" presentation:user-transformed="true">
        <draw:text-box>
          <text:list text:style-name="ML3">
            <text:list-item>
              <text:p text:style-name="MP18"><text:span text:style-name="MT10">Click to edit the outline text format</text:span></text:p>
              <text:list>
                <text:list-item>
                  <text:p text:style-name="MP19"><text:span text:style-name="MT11">Second Outline Level</text:span></text:p>
                  <text:list>
                    <text:list-item>
                      <text:p text:style-name="MP19"><text:span text:style-name="MT12">Third Outline Level</text:span></text:p>
                      <text:list>
                        <text:list-item>
                          <text:p text:style-name="MP19"><text:span text:style-name="MT13">Fourth Outline Level</text:span></text:p>
                          <text:list>
                            <text:list-item>
                              <text:p text:style-name="MP19"><text:span text:style-name="MT13">Fifth Outline Level</text:span></text:p>
                              <text:list>
                                <text:list-item>
                                  <text:p text:style-name="MP20"><text:span text:style-name="MT12">Sixth Outline Level</text:span></text:p>
                                  <text:list>
                                    <text:list-item>
                                      <text:p text:style-name="MP20"><text:span text:style-name="MT1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Nur_20_Titel-title" draw:layer="backgroundobjects" svg:width="0.001cm" svg:height="0.001cm" svg:x="0cm" svg:y="2.123cm" presentation:class="page"/>
        <draw:frame presentation:style-name="Nur_20_Titel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7</text:page-number></text:span></text:p>
          </draw:text-box>
        </draw:frame>
      </presentation:notes>
    </style:master-page>
    <style:master-page style:name="Leer" style:page-layout-name="PM1" draw:style-name="Mdp1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17" draw:text-style-name="MP11" draw:layer="backgroundobjects" svg:width="5.705cm" svg:height="1.004cm" svg:x="1.744cm" svg:y="17.656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PlaceHolder 2" presentation:style-name="Mpr17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8"><presentation:footer/></text:span></text:p>
        </draw:text-box>
      </draw:frame>
      <draw:frame draw:name="PlaceHolder 3" presentation:style-name="Mpr17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7"><text:page-number>27</text:page-number></text:span></text:p>
        </draw:text-box>
      </draw:frame>
      <draw:frame draw:name="PlaceHolder 4" presentation:style-name="Mpr18" draw:text-style-name="MP22" draw:layer="backgroundobjects" svg:width="22.85cm" svg:height="3.17cm" svg:x="1.27cm" svg:y="0.759cm" presentation:class="title" presentation:user-transformed="true">
        <draw:text-box>
          <text:p text:style-name="MP5"><text:span text:style-name="MT14">Click to edit the title text format</text:span></text:p>
        </draw:text-box>
      </draw:frame>
      <draw:frame draw:name="PlaceHolder 5" presentation:style-name="Mpr19" draw:text-style-name="MP21" draw:layer="backgroundobjects" svg:width="22.85cm" svg:height="11.037cm" svg:x="1.27cm" svg:y="4.457cm" presentation:class="outline" presentation:user-transformed="true">
        <draw:text-box>
          <text:list text:style-name="ML3">
            <text:list-item>
              <text:p text:style-name="MP18"><text:span text:style-name="MT10">Click to edit the outline text format</text:span></text:p>
              <text:list>
                <text:list-item>
                  <text:p text:style-name="MP19"><text:span text:style-name="MT11">Second Outline Level</text:span></text:p>
                  <text:list>
                    <text:list-item>
                      <text:p text:style-name="MP19"><text:span text:style-name="MT12">Third Outline Level</text:span></text:p>
                      <text:list>
                        <text:list-item>
                          <text:p text:style-name="MP19"><text:span text:style-name="MT13">Fourth Outline Level</text:span></text:p>
                          <text:list>
                            <text:list-item>
                              <text:p text:style-name="MP19"><text:span text:style-name="MT13">Fifth Outline Level</text:span></text:p>
                              <text:list>
                                <text:list-item>
                                  <text:p text:style-name="MP20"><text:span text:style-name="MT12">Sixth Outline Level</text:span></text:p>
                                  <text:list>
                                    <text:list-item>
                                      <text:p text:style-name="MP20"><text:span text:style-name="MT1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Leer-title" draw:layer="backgroundobjects" svg:width="0.001cm" svg:height="0.001cm" svg:x="0cm" svg:y="2.123cm" presentation:class="page"/>
        <draw:frame presentation:style-name="Leer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7</text:page-number></text:span></text:p>
          </draw:text-box>
        </draw:frame>
      </presentation:notes>
    </style:master-page>
    <style:master-page style:name="Inhalt_20_mit_20_Überschrift" style:display-name="Inhalt mit Überschrift" style:page-layout-name="PM1" draw:style-name="Mdp1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22" draw:text-style-name="MP23" draw:layer="backgroundobjects" svg:width="8.182cm" svg:height="4.436cm" svg:x="1.749cm" svg:y="1.269cm" presentation:class="title" presentation:user-transformed="true">
        <draw:text-box>
          <text:p text:style-name="MP5"><text:span text:style-name="MT15">Mastertitelformat bearbeiten</text:span></text:p>
        </draw:text-box>
      </draw:frame>
      <draw:frame draw:name="PlaceHolder 2" presentation:style-name="Mpr23" draw:text-style-name="MP23" draw:layer="backgroundobjects" svg:width="12.848cm" svg:height="13.528cm" svg:x="10.797cm" svg:y="2.741cm" presentation:class="outline" presentation:user-transformed="true">
        <draw:text-box>
          <text:list text:style-name="ML10">
            <text:list-item>
              <text:p text:style-name="MP7"><text:span text:style-name="MT16">Mastertext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8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23" draw:text-style-name="MP24" draw:layer="backgroundobjects" svg:width="8.182cm" svg:height="10.578cm" svg:x="1.749cm" svg:y="5.715cm" presentation:class="outline" presentation:user-transformed="true">
        <draw:text-box>
          <text:p text:style-name="MP15"><text:span text:style-name="MT17">Mastertextformat bearbeiten</text:span></text:p>
        </draw:text-box>
      </draw:frame>
      <draw:frame draw:name="PlaceHolder 4" presentation:style-name="Mpr24" draw:text-style-name="MP11" draw:layer="backgroundobjects" svg:width="5.705cm" svg:height="1.004cm" svg:x="1.744cm" svg:y="17.656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PlaceHolder 5" presentation:style-name="Mpr24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8"><presentation:footer/></text:span></text:p>
        </draw:text-box>
      </draw:frame>
      <draw:frame draw:name="PlaceHolder 6" presentation:style-name="Mpr24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7"><text:page-number>27</text:page-number></text:span></text:p>
        </draw:text-box>
      </draw:frame>
      <presentation:notes style:page-layout-name="PM0">
        <draw:page-thumbnail presentation:style-name="Inhalt_20_mit_20_Überschrift-title" draw:layer="backgroundobjects" svg:width="0.001cm" svg:height="0.001cm" svg:x="0cm" svg:y="2.123cm" presentation:class="page"/>
        <draw:frame presentation:style-name="Inhalt_20_mit_20_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7</text:page-number></text:span></text:p>
          </draw:text-box>
        </draw:frame>
      </presentation:notes>
    </style:master-page>
    <style:master-page style:name="Bild_20_mit_20_Überschrift" style:display-name="Bild mit Überschrift" style:page-layout-name="PM1" draw:style-name="Mdp1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27" draw:text-style-name="MP23" draw:layer="backgroundobjects" svg:width="8.182cm" svg:height="4.436cm" svg:x="1.749cm" svg:y="1.269cm" presentation:class="title" presentation:user-transformed="true">
        <draw:text-box>
          <text:p text:style-name="MP5"><text:span text:style-name="MT15">Mastertitelformat bearbeiten</text:span></text:p>
        </draw:text-box>
      </draw:frame>
      <draw:frame draw:name="PlaceHolder 2" presentation:style-name="Mpr28" draw:text-style-name="MP23" draw:layer="backgroundobjects" svg:width="12.848cm" svg:height="13.528cm" svg:x="10.797cm" svg:y="2.741cm" presentation:class="outline" presentation:user-transformed="true">
        <draw:text-box>
          <text:list text:style-name="ML11">
            <text:list-item>
              <text:p text:style-name="MP25"><text:span text:style-name="MT16">Bild durch Klicken auf Symbol hinzufügen</text:span></text:p>
            </text:list-item>
          </text:list>
        </draw:text-box>
      </draw:frame>
      <draw:frame draw:name="PlaceHolder 3" presentation:style-name="Mpr29" draw:text-style-name="MP24" draw:layer="backgroundobjects" svg:width="8.182cm" svg:height="10.578cm" svg:x="1.749cm" svg:y="5.715cm" presentation:class="outline" presentation:user-transformed="true">
        <draw:text-box>
          <text:p text:style-name="MP15"><text:span text:style-name="MT17">Mastertextformat bearbeiten</text:span></text:p>
        </draw:text-box>
      </draw:frame>
      <draw:frame draw:name="PlaceHolder 4" presentation:style-name="Mpr30" draw:text-style-name="MP11" draw:layer="backgroundobjects" svg:width="5.705cm" svg:height="1.004cm" svg:x="1.744cm" svg:y="17.656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PlaceHolder 5" presentation:style-name="Mpr30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8"><presentation:footer/></text:span></text:p>
        </draw:text-box>
      </draw:frame>
      <draw:frame draw:name="PlaceHolder 6" presentation:style-name="Mpr30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7"><text:page-number>27</text:page-number></text:span></text:p>
        </draw:text-box>
      </draw:frame>
      <presentation:notes style:page-layout-name="PM0">
        <draw:page-thumbnail presentation:style-name="Bild_20_mit_20_Überschrift-title" draw:layer="backgroundobjects" svg:width="0.001cm" svg:height="0.001cm" svg:x="0cm" svg:y="2.123cm" presentation:class="page"/>
        <draw:frame presentation:style-name="Bild_20_mit_20_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7</text:page-number></text:span></text:p>
          </draw:text-box>
        </draw:frame>
      </presentation:notes>
    </style:master-page>
    <style:master-page style:name="Titelfolie" style:page-layout-name="PM1" draw:style-name="Mdp2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33" draw:text-style-name="MP27" draw:layer="backgroundobjects" svg:width="21.58cm" svg:height="4.59cm" svg:x="1.921cm" svg:y="6.498cm" presentation:class="title" presentation:user-transformed="true">
        <draw:text-box>
          <text:p text:style-name="MP26"><text:span text:style-name="MT18">Mastertitelformat bearbeiten</text:span></text:p>
        </draw:text-box>
      </draw:frame>
      <draw:frame draw:name="Grafik 7" draw:style-name="Mgr3" draw:text-style-name="MP28" draw:layer="backgroundobjects" svg:width="12.701cm" svg:height="6.993cm" svg:x="7.129cm" svg:y="-1.28cm">
        <draw:image xlink:href="Pictures/1000552500001DFC00001082C4678447.svg" xlink:type="simple" xlink:show="embed" xlink:actuate="onLoad" draw:mime-type="image/svg+xml">
          <text:p/>
        </draw:image>
        <draw:image xlink:href="Pictures/1000000100000122000000A01C174621.png" xlink:type="simple" xlink:show="embed" xlink:actuate="onLoad" draw:mime-type="image/png"/>
      </draw:frame>
      <draw:frame draw:name="PlaceHolder 2" presentation:style-name="Mpr34" draw:text-style-name="MP11" draw:layer="backgroundobjects" svg:width="5.705cm" svg:height="1.004cm" svg:x="1.744cm" svg:y="17.656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PlaceHolder 3" presentation:style-name="Mpr34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19"><presentation:footer/></text:span></text:p>
        </draw:text-box>
      </draw:frame>
      <draw:frame draw:name="PlaceHolder 4" presentation:style-name="Mpr34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7"><text:page-number>27</text:page-number></text:span></text:p>
        </draw:text-box>
      </draw:frame>
      <draw:frame draw:name="Grafik 22" draw:style-name="Mgr3" draw:text-style-name="MP28" draw:layer="backgroundobjects" svg:width="21.58cm" svg:height="2.558cm" svg:x="1.744cm" svg:y="3.374cm">
        <draw:image xlink:href="Pictures/100030300000E33800001B155418B09F.svg" xlink:type="simple" xlink:show="embed" xlink:actuate="onLoad" draw:mime-type="image/svg+xml">
          <text:p/>
        </draw:image>
        <draw:image xlink:href="Pictures/1000000100000800000000F4829ECB2B.png" xlink:type="simple" xlink:show="embed" xlink:actuate="onLoad" draw:mime-type="image/png"/>
      </draw:frame>
      <draw:frame draw:name="PlaceHolder 5" presentation:style-name="Mpr35" draw:text-style-name="MP23" draw:layer="backgroundobjects" svg:width="22.852cm" svg:height="11.041cm" svg:x="1.27cm" svg:y="4.457cm" presentation:class="outline" presentation:user-transformed="true">
        <draw:text-box>
          <text:list text:style-name="ML12">
            <text:list-item>
              <text:p text:style-name="MP29"><text:span text:style-name="MT20">Click to edit the outline text format</text:span></text:p>
              <text:list>
                <text:list-item>
                  <text:p text:style-name="MP30"><text:span text:style-name="MT21">Second Outline Level</text:span></text:p>
                  <text:list>
                    <text:list-item>
                      <text:p text:style-name="MP31"><text:span text:style-name="MT22">Third Outline Level</text:span></text:p>
                      <text:list>
                        <text:list-item>
                          <text:p text:style-name="MP32"><text:span text:style-name="MT23">Fourth Outline Level</text:span></text:p>
                          <text:list>
                            <text:list-item>
                              <text:p text:style-name="MP33"><text:span text:style-name="MT23">Fifth Outline Level</text:span></text:p>
                              <text:list>
                                <text:list-item>
                                  <text:p text:style-name="MP33"><text:span text:style-name="MT23">Sixth Outline Level</text:span></text:p>
                                  <text:list>
                                    <text:list-item>
                                      <text:p text:style-name="MP33"><text:span text:style-name="MT2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elfolie-title" draw:layer="backgroundobjects" svg:width="0.001cm" svg:height="0.001cm" svg:x="0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7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38" draw:text-style-name="MP27" draw:layer="backgroundobjects" svg:width="21.58cm" svg:height="4.59cm" svg:x="1.921cm" svg:y="6.498cm" presentation:class="title" presentation:user-transformed="true">
        <draw:text-box>
          <text:p text:style-name="MP26"><text:span text:style-name="MT18">Mastertitelformat bearbeiten</text:span></text:p>
        </draw:text-box>
      </draw:frame>
      <draw:frame draw:name="Grafik 7" draw:style-name="Mgr3" draw:text-style-name="MP28" draw:layer="backgroundobjects" svg:width="12.701cm" svg:height="6.993cm" svg:x="7.129cm" svg:y="-1.28cm">
        <draw:image xlink:href="Pictures/1000552500001DFC00001082C4678447.svg" xlink:type="simple" xlink:show="embed" xlink:actuate="onLoad" draw:mime-type="image/svg+xml">
          <text:p/>
        </draw:image>
        <draw:image xlink:href="Pictures/1000000100000122000000A01C174621.png" xlink:type="simple" xlink:show="embed" xlink:actuate="onLoad" draw:mime-type="image/png"/>
      </draw:frame>
      <draw:frame draw:name="PlaceHolder 2" presentation:style-name="Mpr39" draw:text-style-name="MP11" draw:layer="backgroundobjects" svg:width="5.705cm" svg:height="1.004cm" svg:x="1.744cm" svg:y="17.656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PlaceHolder 3" presentation:style-name="Mpr39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19"><presentation:footer/></text:span></text:p>
        </draw:text-box>
      </draw:frame>
      <draw:frame draw:name="PlaceHolder 4" presentation:style-name="Mpr39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7"><text:page-number>27</text:page-number></text:span></text:p>
        </draw:text-box>
      </draw:frame>
      <draw:frame draw:name="Grafik 22" draw:style-name="Mgr3" draw:text-style-name="MP28" draw:layer="backgroundobjects" svg:width="21.58cm" svg:height="2.558cm" svg:x="1.744cm" svg:y="3.374cm">
        <draw:image xlink:href="Pictures/100030300000E33800001B155418B09F.svg" xlink:type="simple" xlink:show="embed" xlink:actuate="onLoad" draw:mime-type="image/svg+xml">
          <text:p/>
        </draw:image>
        <draw:image xlink:href="Pictures/1000000100000800000000F4829ECB2B.png" xlink:type="simple" xlink:show="embed" xlink:actuate="onLoad" draw:mime-type="image/png"/>
      </draw:frame>
      <draw:frame draw:name="PlaceHolder 5" presentation:style-name="Mpr40" draw:text-style-name="MP23" draw:layer="backgroundobjects" svg:width="22.852cm" svg:height="11.041cm" svg:x="1.27cm" svg:y="4.457cm" presentation:class="outline" presentation:user-transformed="true">
        <draw:text-box>
          <text:list text:style-name="ML12">
            <text:list-item>
              <text:p text:style-name="MP29"><text:span text:style-name="MT20">Click to edit the outline text format</text:span></text:p>
              <text:list>
                <text:list-item>
                  <text:p text:style-name="MP30"><text:span text:style-name="MT21">Second Outline Level</text:span></text:p>
                  <text:list>
                    <text:list-item>
                      <text:p text:style-name="MP31"><text:span text:style-name="MT22">Third Outline Level</text:span></text:p>
                      <text:list>
                        <text:list-item>
                          <text:p text:style-name="MP32"><text:span text:style-name="MT23">Fourth Outline Level</text:span></text:p>
                          <text:list>
                            <text:list-item>
                              <text:p text:style-name="MP33"><text:span text:style-name="MT23">Fifth Outline Level</text:span></text:p>
                              <text:list>
                                <text:list-item>
                                  <text:p text:style-name="MP33"><text:span text:style-name="MT23">Sixth Outline Level</text:span></text:p>
                                  <text:list>
                                    <text:list-item>
                                      <text:p text:style-name="MP33"><text:span text:style-name="MT2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7</text:page-number></text:span></text:p>
          </draw:text-box>
        </draw:frame>
      </presentation:notes>
    </style:master-page>
    <style:master-page style:name="Titel_20_und_20_vertikaler_20_Text" style:display-name="Titel und vertikaler Text" style:page-layout-name="PM1" draw:style-name="Mdp1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43" draw:text-style-name="MP6" draw:layer="backgroundobjects" svg:width="21.899cm" svg:height="3.672cm" svg:x="1.744cm" svg:y="1.012cm" presentation:class="title" presentation:user-transformed="true">
        <draw:text-box>
          <text:p text:style-name="MP5"><text:span text:style-name="MT2">Mastertitelformat bearbeiten</text:span></text:p>
        </draw:text-box>
      </draw:frame>
      <draw:frame draw:name="PlaceHolder 2" presentation:style-name="Mpr44" draw:text-style-name="MP9" draw:layer="backgroundobjects" svg:width="21.899cm" svg:height="12.078cm" svg:x="1.744cm" svg:y="5.07cm" presentation:class="outline" presentation:user-transformed="true">
        <draw:text-box>
          <text:list text:style-name="ML3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8"><text:span text:style-name="MT5">Dritte Ebene</text:span></text:p>
                      <text:list>
                        <text:list-item>
                          <text:p text:style-name="MP8"><text:span text:style-name="MT6">Vierte Ebene</text:span></text:p>
                          <text:list>
                            <text:list-item>
                              <text:p text:style-name="MP8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45" draw:text-style-name="MP11" draw:layer="backgroundobjects" svg:width="5.705cm" svg:height="1.004cm" svg:x="1.744cm" svg:y="17.656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PlaceHolder 4" presentation:style-name="Mpr45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8"><presentation:footer/></text:span></text:p>
        </draw:text-box>
      </draw:frame>
      <draw:frame draw:name="PlaceHolder 5" presentation:style-name="Mpr45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7"><text:page-number>27</text:page-number></text:span></text:p>
        </draw:text-box>
      </draw:frame>
      <presentation:notes style:page-layout-name="PM0">
        <draw:page-thumbnail presentation:style-name="Titel_20_und_20_vertikaler_20_Text-title" draw:layer="backgroundobjects" svg:width="0.001cm" svg:height="0.001cm" svg:x="0cm" svg:y="2.123cm" presentation:class="page"/>
        <draw:frame presentation:style-name="Titel_20_und_20_vertikaler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7</text:page-number></text:span></text:p>
          </draw:text-box>
        </draw:frame>
      </presentation:notes>
    </style:master-page>
    <style:master-page style:name="Vertikaler_20_Titel_20_und_20_Text" style:display-name="Vertikaler Titel und Text" style:page-layout-name="PM1" draw:style-name="Mdp1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48" draw:text-style-name="MP6" draw:layer="backgroundobjects" svg:width="5.467cm" svg:height="16.134cm" svg:x="18.176cm" svg:y="1.012cm" presentation:class="title" presentation:user-transformed="true">
        <draw:text-box>
          <text:p text:style-name="MP5"><text:span text:style-name="MT2">Mastertitelformat bearbeiten</text:span></text:p>
        </draw:text-box>
      </draw:frame>
      <draw:frame draw:name="PlaceHolder 2" presentation:style-name="Mpr49" draw:text-style-name="MP9" draw:layer="backgroundobjects" svg:width="16.103cm" svg:height="16.135cm" svg:x="1.744cm" svg:y="1.012cm" presentation:class="outline" presentation:user-transformed="true">
        <draw:text-box>
          <text:list text:style-name="ML3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8"><text:span text:style-name="MT5">Dritte Ebene</text:span></text:p>
                      <text:list>
                        <text:list-item>
                          <text:p text:style-name="MP8"><text:span text:style-name="MT6">Vierte Ebene</text:span></text:p>
                          <text:list>
                            <text:list-item>
                              <text:p text:style-name="MP8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50" draw:text-style-name="MP11" draw:layer="backgroundobjects" svg:width="5.705cm" svg:height="1.004cm" svg:x="1.744cm" svg:y="17.656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PlaceHolder 4" presentation:style-name="Mpr50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8"><presentation:footer/></text:span></text:p>
        </draw:text-box>
      </draw:frame>
      <draw:frame draw:name="PlaceHolder 5" presentation:style-name="Mpr50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7"><text:page-number>27</text:page-number></text:span></text:p>
        </draw:text-box>
      </draw:frame>
      <presentation:notes style:page-layout-name="PM0">
        <draw:page-thumbnail presentation:style-name="Vertikaler_20_Titel_20_und_20_Text-title" draw:layer="backgroundobjects" svg:width="0.001cm" svg:height="0.001cm" svg:x="0cm" svg:y="2.123cm" presentation:class="page"/>
        <draw:frame presentation:style-name="Vertikaler_20_Titel_20_u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7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53" draw:text-style-name="MP23" draw:layer="backgroundobjects" svg:width="21.899cm" svg:height="3.672cm" svg:x="1.744cm" svg:y="2.596cm" presentation:class="title" presentation:user-transformed="true">
        <draw:text-box>
          <text:p text:style-name="MP5"><text:span text:style-name="MT24">Mastertitelformat bearbeiten</text:span></text:p>
        </draw:text-box>
      </draw:frame>
      <draw:frame draw:name="PlaceHolder 2" presentation:style-name="Mpr54" draw:text-style-name="MP34" draw:layer="backgroundobjects" svg:width="21.899cm" svg:height="10.59cm" svg:x="1.744cm" svg:y="6.557cm" presentation:class="outline" presentation:user-transformed="true">
        <draw:text-box>
          <text:list text:style-name="ML13">
            <text:list-item>
              <text:p text:style-name="MP7"><text:span text:style-name="MT25">Mastertextformat bearbeiten</text:span></text:p>
              <text:list>
                <text:list-item>
                  <text:p text:style-name="MP8"><text:span text:style-name="MT25">Zweite Ebene</text:span></text:p>
                  <text:list>
                    <text:list-item>
                      <text:p text:style-name="MP8"><text:span text:style-name="MT25">Dritte Ebene</text:span></text:p>
                      <text:list>
                        <text:list-item>
                          <text:p text:style-name="MP8"><text:span text:style-name="MT25">Vierte Ebene</text:span></text:p>
                          <text:list>
                            <text:list-item>
                              <text:p text:style-name="MP8"><text:span text:style-name="MT2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55" draw:text-style-name="MP35" draw:layer="backgroundobjects" svg:width="5.705cm" svg:height="1.004cm" svg:x="1.744cm" svg:y="17.656cm" presentation:class="date-time" presentation:user-transformed="true">
        <draw:text-box>
          <text:p text:style-name="MP10"><text:span text:style-name="MT26"><presentation:date-time/></text:span></text:p>
        </draw:text-box>
      </draw:frame>
      <draw:frame draw:name="PlaceHolder 4" presentation:style-name="Mpr56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19"><presentation:footer/></text:span></text:p>
        </draw:text-box>
      </draw:frame>
      <draw:frame draw:name="PlaceHolder 5" presentation:style-name="Mpr56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26"><text:page-number>27</text:page-number></text:span></text:p>
        </draw:text-box>
      </draw:frame>
      <draw:frame draw:name="Grafik 9" draw:style-name="Mgr3" draw:text-style-name="MP28" draw:layer="backgroundobjects" svg:width="7.61cm" svg:height="4.188cm" svg:x="9.364cm" svg:y="-0.754cm">
        <draw:image xlink:href="Pictures/1000552500001DFC00001082C4678447.svg" xlink:type="simple" xlink:show="embed" xlink:actuate="onLoad" draw:mime-type="image/svg+xml">
          <text:p/>
        </draw:image>
        <draw:image xlink:href="Pictures/1000000100000122000000A01C174621.png" xlink:type="simple" xlink:show="embed" xlink:actuate="onLoad" draw:mime-type="image/png"/>
      </draw:frame>
      <presentation:notes style:page-layout-name="PM0">
        <draw:page-thumbnail presentation:style-name="Titel_20_und_20_Inhalt-title" draw:layer="backgroundobjects" svg:width="0.001cm" svg:height="0.001cm" svg:x="0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5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7</text:page-number></text:span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59" draw:text-style-name="MP36" draw:layer="backgroundobjects" svg:width="21.899cm" svg:height="7.914cm" svg:x="1.732cm" svg:y="4.747cm" presentation:class="title" presentation:user-transformed="true">
        <draw:text-box>
          <text:p text:style-name="MP5"><text:span text:style-name="MT27">Mastertitelformat bearbeiten</text:span></text:p>
        </draw:text-box>
      </draw:frame>
      <draw:frame draw:name="PlaceHolder 2" presentation:style-name="Mpr60" draw:text-style-name="MP16" draw:layer="backgroundobjects" svg:width="21.899cm" svg:height="4.157cm" svg:x="1.732cm" svg:y="12.748cm" presentation:class="outline" presentation:user-transformed="true">
        <draw:text-box>
          <text:list text:style-name="ML11">
            <text:list-item>
              <text:p text:style-name="MP15"><text:span text:style-name="MT28">Mastertextformat bearbeiten</text:span></text:p>
            </text:list-item>
          </text:list>
        </draw:text-box>
      </draw:frame>
      <draw:frame draw:name="PlaceHolder 3" presentation:style-name="Mpr61" draw:text-style-name="MP11" draw:layer="backgroundobjects" svg:width="5.705cm" svg:height="1.004cm" svg:x="1.744cm" svg:y="17.656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PlaceHolder 4" presentation:style-name="Mpr61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8"><presentation:footer/></text:span></text:p>
        </draw:text-box>
      </draw:frame>
      <draw:frame draw:name="PlaceHolder 5" presentation:style-name="Mpr61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7"><text:page-number>27</text:page-number></text:span></text:p>
        </draw:text-box>
      </draw:frame>
      <presentation:notes style:page-layout-name="PM0">
        <draw:page-thumbnail presentation:style-name="Abschnitts-_a_überschrift-title" draw:layer="backgroundobjects" svg:width="0.001cm" svg:height="0.001cm" svg:x="0cm" svg:y="2.123cm" presentation:class="page"/>
        <draw:frame presentation:style-name="Abschnitts-_a_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7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2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64" draw:text-style-name="MP23" draw:layer="backgroundobjects" svg:width="21.899cm" svg:height="3.672cm" svg:x="1.744cm" svg:y="2.596cm" presentation:class="title" presentation:user-transformed="true">
        <draw:text-box>
          <text:p text:style-name="MP5"><text:span text:style-name="MT24">Mastertitelformat bearbeiten</text:span></text:p>
        </draw:text-box>
      </draw:frame>
      <draw:frame draw:name="PlaceHolder 2" presentation:style-name="Mpr65" draw:text-style-name="MP34" draw:layer="backgroundobjects" svg:width="21.899cm" svg:height="10.59cm" svg:x="1.744cm" svg:y="6.557cm" presentation:class="outline" presentation:user-transformed="true">
        <draw:text-box>
          <text:list text:style-name="ML13">
            <text:list-item>
              <text:p text:style-name="MP7"><text:span text:style-name="MT25">Mastertextformat bearbeiten</text:span></text:p>
              <text:list>
                <text:list-item>
                  <text:p text:style-name="MP8"><text:span text:style-name="MT25">Zweite Ebene</text:span></text:p>
                  <text:list>
                    <text:list-item>
                      <text:p text:style-name="MP8"><text:span text:style-name="MT25">Dritte Ebene</text:span></text:p>
                      <text:list>
                        <text:list-item>
                          <text:p text:style-name="MP8"><text:span text:style-name="MT25">Vierte Ebene</text:span></text:p>
                          <text:list>
                            <text:list-item>
                              <text:p text:style-name="MP8"><text:span text:style-name="MT2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66" draw:text-style-name="MP35" draw:layer="backgroundobjects" svg:width="5.705cm" svg:height="1.004cm" svg:x="1.744cm" svg:y="17.656cm" presentation:class="date-time" presentation:user-transformed="true">
        <draw:text-box>
          <text:p text:style-name="MP10"><text:span text:style-name="MT26"><presentation:date-time/></text:span></text:p>
        </draw:text-box>
      </draw:frame>
      <draw:frame draw:name="PlaceHolder 4" presentation:style-name="Mpr67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19"><presentation:footer/></text:span></text:p>
        </draw:text-box>
      </draw:frame>
      <draw:frame draw:name="PlaceHolder 5" presentation:style-name="Mpr67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26"><text:page-number>27</text:page-number></text:span></text:p>
        </draw:text-box>
      </draw:frame>
      <draw:frame draw:name="Grafik 9" draw:style-name="Mgr3" draw:text-style-name="MP28" draw:layer="backgroundobjects" svg:width="7.61cm" svg:height="4.188cm" svg:x="9.364cm" svg:y="-0.754cm">
        <draw:image xlink:href="Pictures/1000552500001DFC00001082C4678447.svg" xlink:type="simple" xlink:show="embed" xlink:actuate="onLoad" draw:mime-type="image/svg+xml">
          <text:p/>
        </draw:image>
        <draw:image xlink:href="Pictures/1000000100000122000000A01C174621.png" xlink:type="simple" xlink:show="embed" xlink:actuate="onLoad" draw:mime-type="image/png"/>
      </draw:frame>
      <presentation:notes style:page-layout-name="PM0">
        <draw:page-thumbnail presentation:style-name="_31__5f_Titel_20_und_20_Inhalt-title" draw:layer="backgroundobjects" svg:width="0.001cm" svg:height="0.001cm" svg:x="0cm" svg:y="2.123cm" presentation:class="page"/>
        <draw:frame presentation:style-name="_31__5f_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1T10:45:46</meta:creation-date>
    <meta:initial-creator>Philipp Bierwirth</meta:initial-creator>
    <dc:language>en-US</dc:language>
    <meta:print-date>2026-06-16T16:01:54.126073791</meta:print-date>
    <dc:date>2026-06-16T17:26:55.323456988</dc:date>
    <meta:editing-cycles>158</meta:editing-cycles>
    <meta:editing-duration>PT8H31M16S</meta:editing-duration>
    <meta:generator>LibreOffice/26.2.4.2$Linux_X86_64 LibreOffice_project/620$Build-2</meta:generator>
    <meta:printed-by>PDF files</meta:printed-by>
    <meta:document-statistic meta:object-count="532"/>
    <meta:user-defined meta:name="AppVersion">15.0000</meta:user-defined>
    <meta:user-defined meta:name="MMClips" meta:value-type="float">2</meta:user-defined>
    <meta:user-defined meta:name="Notes" meta:value-type="float">1</meta:user-defined>
    <meta:user-defined meta:name="PresentationFormat">Bildschirmpräsentation (4:3)</meta:user-defined>
    <meta:user-defined meta:name="Slides" meta:value-type="float">26</meta:user-defined>
    <meta:template xlink:type="simple" xlink:actuate="onRequest" xlink:title="Office Theme" xlink:href=""/>
  </office:meta>
</office:document-meta>
</file>

<file path=Object 1/content.xml><?xml version="1.0" encoding="utf-8"?>
<math xmlns="http://www.w3.org/1998/Math/MathML" display="block">
  <semantics>
    <mstyle mathcolor="white">
      <mstyle mathsize="18pt">
        <mrow>
          <mi mathvariant="italic">Akkuratheit</mi>
          <mo stretchy="false">=</mo>
          <mfrac>
            <mrow>
              <mo fence="true" form="prefix" stretchy="false">(</mo>
              <mrow>
                <mrow>
                  <mi mathvariant="italic">TP</mi>
                  <mo stretchy="false">+</mo>
                  <mi mathvariant="italic">TN</mi>
                </mrow>
              </mrow>
              <mo fence="true" form="postfix" stretchy="false">)</mo>
            </mrow>
            <mi>N</mi>
          </mfrac>
        </mrow>
      </mstyle>
    </mstyle>
    <annotation encoding="StarMath 5.0">color white {size 18{Akkuratheit = {(TP+TN)} over {N} }}</annotation>
  </semantics>
</math>
</file>

<file path=Object 10/content.xml><?xml version="1.0" encoding="utf-8"?>
<math xmlns="http://www.w3.org/1998/Math/MathML" display="block">
  <semantics>
    <mstyle mathcolor="white">
      <mstyle mathsize="18pt">
        <mrow>
          <mi mathvariant="italic">Sensitivität</mi>
          <mo stretchy="false">=</mo>
          <mfrac>
            <mi mathvariant="italic">TP</mi>
            <mrow>
              <mo fence="true" form="prefix" stretchy="false">(</mo>
              <mrow>
                <mrow>
                  <mi mathvariant="italic">TP</mi>
                  <mo stretchy="false">+</mo>
                  <mi mathvariant="italic">FN</mi>
                </mrow>
              </mrow>
              <mo fence="true" form="postfix" stretchy="false">)</mo>
            </mrow>
          </mfrac>
        </mrow>
      </mstyle>
    </mstyle>
    <annotation encoding="StarMath 5.0">color white {size 18{Sensitivität = {TP} over {(TP+FN)}} }</annotation>
  </semantics>
</math>
</file>

<file path=Object 11/content.xml><?xml version="1.0" encoding="utf-8"?>
<math xmlns="http://www.w3.org/1998/Math/MathML" display="block">
  <semantics>
    <mstyle mathcolor="white">
      <mstyle mathsize="18pt">
        <mrow>
          <mi mathvariant="italic">Sensitivität</mi>
          <mo stretchy="false">=</mo>
          <mfrac>
            <mn>4</mn>
            <mn>6</mn>
          </mfrac>
          <mo stretchy="false">=</mo>
          <mn>0.67</mn>
        </mrow>
      </mstyle>
    </mstyle>
    <annotation encoding="StarMath 5.0">color white {size 18
{Sensitivität = {4} over {6} = 0.67 }}</annotation>
  </semantics>
</math>
</file>

<file path=Object 12/content.xml><?xml version="1.0" encoding="utf-8"?>
<math xmlns="http://www.w3.org/1998/Math/MathML" display="block">
  <semantics>
    <mstyle mathcolor="white">
      <mrow>
        <msub>
          <mi>β</mi>
          <mn>0</mn>
        </msub>
        <mo stretchy="false">+</mo>
        <mrow>
          <msub>
            <mi>β</mi>
            <mn>1</mn>
          </msub>
          <mo stretchy="false">×</mo>
          <msub>
            <mi>x</mi>
            <mn>1</mn>
          </msub>
        </mrow>
        <mo stretchy="false">+</mo>
        <mrow>
          <msub>
            <mi>β</mi>
            <mn>2</mn>
          </msub>
          <mo stretchy="false">×</mo>
          <msub>
            <mi>x</mi>
            <mn>2</mn>
          </msub>
        </mrow>
      </mrow>
    </mstyle>
    <annotation encoding="StarMath 5.0">color white{ %beta_{0} + %beta_{1} times x_1 + %beta_2 times x_2 }</annotation>
  </semantics>
</math>
</file>

<file path=Object 14/content.xml><?xml version="1.0" encoding="utf-8"?>
<math xmlns="http://www.w3.org/1998/Math/MathML" display="block">
  <semantics>
    <mstyle mathcolor="white">
      <mstyle mathsize="18pt">
        <mrow>
          <mi mathvariant="italic">Spezifität</mi>
          <mo stretchy="false">=</mo>
          <mfrac>
            <mi mathvariant="italic">TN</mi>
            <mrow>
              <mo fence="true" form="prefix" stretchy="false">(</mo>
              <mrow>
                <mrow>
                  <mi mathvariant="italic">FP</mi>
                  <mo stretchy="false">+</mo>
                  <mi mathvariant="italic">TN</mi>
                </mrow>
              </mrow>
              <mo fence="true" form="postfix" stretchy="false">)</mo>
            </mrow>
          </mfrac>
        </mrow>
      </mstyle>
    </mstyle>
    <annotation encoding="StarMath 5.0">color white {size 18{Spezifität = {TN} over {(FP+TN)}}}</annotation>
  </semantics>
</math>
</file>

<file path=Object 15/content.xml><?xml version="1.0" encoding="utf-8"?>
<math xmlns="http://www.w3.org/1998/Math/MathML" display="block">
  <semantics>
    <mstyle mathcolor="white">
      <mstyle mathsize="18pt">
        <mrow>
          <mi mathvariant="italic">Spezifität</mi>
          <mo stretchy="false">=</mo>
          <mfrac>
            <mn>4</mn>
            <mn>6</mn>
          </mfrac>
          <mo stretchy="false">=</mo>
          <mn>0.67</mn>
        </mrow>
      </mstyle>
    </mstyle>
    <annotation encoding="StarMath 5.0">color white {size 18
{Spezifität = {4} over {6} = 0.67 }}</annotation>
  </semantics>
</math>
</file>

<file path=Object 2/content.xml><?xml version="1.0" encoding="utf-8"?>
<math xmlns="http://www.w3.org/1998/Math/MathML" display="block">
  <semantics>
    <mstyle mathcolor="white">
      <mstyle mathsize="18pt">
        <mrow>
          <mi mathvariant="italic">Akkuratheit</mi>
          <mo stretchy="false">=</mo>
          <mfrac>
            <mrow>
              <mo fence="true" form="prefix" stretchy="false">(</mo>
              <mrow>
                <mrow>
                  <mn>4</mn>
                  <mo stretchy="false">+</mo>
                  <mn>4</mn>
                </mrow>
              </mrow>
              <mo fence="true" form="postfix" stretchy="false">)</mo>
            </mrow>
            <mn>12</mn>
          </mfrac>
          <mo stretchy="false">=</mo>
          <mn>0.67</mn>
        </mrow>
      </mstyle>
    </mstyle>
    <annotation encoding="StarMath 5.0">color white {size 18
{Akkuratheit = {(4+4)} over {12} = 0.67 }}</annotation>
  </semantics>
</math>
</file>

<file path=Object 3/content.xml><?xml version="1.0" encoding="utf-8"?>
<math xmlns="http://www.w3.org/1998/Math/MathML" display="block">
  <semantics>
    <mstyle mathcolor="white">
      <mstyle mathsize="20pt">
        <mrow>
          <mfrac>
            <mn>1</mn>
            <mi>N</mi>
          </mfrac>
          <mo stretchy="false">×</mo>
          <mrow>
            <msubsup>
              <mo stretchy="false">∑</mo>
              <msub>
                <mi mathvariant="italic">Gruppe</mi>
                <mi>i</mi>
              </msub>
              <mi>N</mi>
            </msubsup>
            <mfrac>
              <mrow>
                <mo fence="true" form="prefix" stretchy="false">(</mo>
                <mrow>
                  <mrow>
                    <msub>
                      <mi mathvariant="italic">TP</mi>
                      <mi>i</mi>
                    </msub>
                    <mo stretchy="false">+</mo>
                    <msub>
                      <mi mathvariant="italic">TN</mi>
                      <mi>i</mi>
                    </msub>
                  </mrow>
                </mrow>
                <mo fence="true" form="postfix" stretchy="false">)</mo>
              </mrow>
              <msub>
                <mi>n</mi>
                <mi>i</mi>
              </msub>
            </mfrac>
          </mrow>
        </mrow>
      </mstyle>
    </mstyle>
    <annotation encoding="StarMath 5.0">{color white{size 20{{1} over {N} times sum_{ Gruppe_i}^N {{(TP_i+TN_i)} over {n_i}}}}}</annotation>
  </semantics>
</math>
</file>

<file path=Object 4/content.xml><?xml version="1.0" encoding="utf-8"?>
<math xmlns="http://www.w3.org/1998/Math/MathML" display="block">
  <semantics>
    <mstyle mathcolor="white">
      <mstyle mathsize="20pt">
        <mrow>
          <mfrac>
            <mrow>
              <mo fence="true" form="prefix" stretchy="false">(</mo>
              <mrow>
                <mrow>
                  <mn>0</mn>
                  <mo stretchy="false">+</mo>
                  <mn>11</mn>
                </mrow>
              </mrow>
              <mo fence="true" form="postfix" stretchy="false">)</mo>
            </mrow>
            <mn>11</mn>
          </mfrac>
          <mo stretchy="false">=</mo>
          <mn>1</mn>
        </mrow>
      </mstyle>
    </mstyle>
    <annotation encoding="StarMath 5.0">{color white{size 20{{{(0+11)} over {11}= 1}}}}</annotation>
  </semantics>
</math>
</file>

<file path=Object 5/content.xml><?xml version="1.0" encoding="utf-8"?>
<math xmlns="http://www.w3.org/1998/Math/MathML" display="block">
  <semantics>
    <mstyle mathcolor="white">
      <mstyle mathsize="20pt">
        <mrow>
          <mfrac>
            <mrow>
              <mo fence="true" form="prefix" stretchy="false">(</mo>
              <mrow>
                <mrow>
                  <mn>0</mn>
                  <mo stretchy="false">+</mo>
                  <mn>0</mn>
                </mrow>
              </mrow>
              <mo fence="true" form="postfix" stretchy="false">)</mo>
            </mrow>
            <mn>1</mn>
          </mfrac>
          <mo stretchy="false">=</mo>
          <mn>0</mn>
        </mrow>
      </mstyle>
    </mstyle>
    <annotation encoding="StarMath 5.0">{color white{size 20{{{(0+0)} over {1}= 0}}}}</annotation>
  </semantics>
</math>
</file>

<file path=Object 6/content.xml><?xml version="1.0" encoding="utf-8"?>
<math xmlns="http://www.w3.org/1998/Math/MathML" display="block">
  <semantics>
    <mstyle mathcolor="white">
      <mstyle mathsize="20pt">
        <mrow>
          <mfrac>
            <mn>1</mn>
            <mi>N</mi>
          </mfrac>
          <mo stretchy="false">×</mo>
          <mrow>
            <msubsup>
              <mo stretchy="false">∑</mo>
              <msub>
                <mi mathvariant="italic">Gruppe</mi>
                <mi>i</mi>
              </msub>
              <mi>N</mi>
            </msubsup>
            <mfrac>
              <mrow>
                <mo fence="true" form="prefix" stretchy="false">(</mo>
                <mrow>
                  <mrow>
                    <msub>
                      <mi mathvariant="italic">TP</mi>
                      <mi>i</mi>
                    </msub>
                    <mo stretchy="false">+</mo>
                    <msub>
                      <mi mathvariant="italic">TN</mi>
                      <mi>i</mi>
                    </msub>
                  </mrow>
                </mrow>
                <mo fence="true" form="postfix" stretchy="false">)</mo>
              </mrow>
              <msub>
                <mi>n</mi>
                <mi>i</mi>
              </msub>
            </mfrac>
          </mrow>
        </mrow>
      </mstyle>
    </mstyle>
    <annotation encoding="StarMath 5.0">{color white{size 20{{1} over {N} times sum_{ Gruppe_i}^N {{(TP_i+TN_i)} over {n_i}}}}}</annotation>
  </semantics>
</math>
</file>

<file path=Object 7/content.xml><?xml version="1.0" encoding="utf-8"?>
<math xmlns="http://www.w3.org/1998/Math/MathML" display="block">
  <semantics>
    <mstyle mathcolor="white">
      <mstyle mathsize="20pt">
        <mrow>
          <mfrac>
            <mrow>
              <mo fence="true" form="prefix" stretchy="false">(</mo>
              <mrow>
                <mrow>
                  <mn>0</mn>
                  <mo stretchy="false">+</mo>
                  <mn>11</mn>
                </mrow>
              </mrow>
              <mo fence="true" form="postfix" stretchy="false">)</mo>
            </mrow>
            <mn>11</mn>
          </mfrac>
          <mo stretchy="false">=</mo>
          <mn>1</mn>
        </mrow>
      </mstyle>
    </mstyle>
    <annotation encoding="StarMath 5.0">{color white{size 20{{{(0+11)} over {11}= 1}}}}</annotation>
  </semantics>
</math>
</file>

<file path=Object 8/content.xml><?xml version="1.0" encoding="utf-8"?>
<math xmlns="http://www.w3.org/1998/Math/MathML" display="block">
  <semantics>
    <mstyle mathcolor="white">
      <mstyle mathsize="20pt">
        <mrow>
          <mfrac>
            <mrow>
              <mo fence="true" form="prefix" stretchy="false">(</mo>
              <mrow>
                <mrow>
                  <mn>0</mn>
                  <mo stretchy="false">+</mo>
                  <mn>0</mn>
                </mrow>
              </mrow>
              <mo fence="true" form="postfix" stretchy="false">)</mo>
            </mrow>
            <mn>1</mn>
          </mfrac>
          <mo stretchy="false">=</mo>
          <mn>0</mn>
        </mrow>
      </mstyle>
    </mstyle>
    <annotation encoding="StarMath 5.0">{color white{size 20{{{(0+0)} over {1}= 0}}}}</annotation>
  </semantics>
</math>
</file>

<file path=Object 9/content.xml><?xml version="1.0" encoding="utf-8"?>
<math xmlns="http://www.w3.org/1998/Math/MathML" display="block">
  <semantics>
    <mstyle mathcolor="white">
      <mstyle mathsize="20pt">
        <mrow>
          <mrow>
            <mfrac>
              <mn>1</mn>
              <mn>2</mn>
            </mfrac>
            <mo stretchy="false">×</mo>
            <mrow>
              <mo fence="true" form="prefix" stretchy="false">(</mo>
              <mrow>
                <mrow>
                  <mn>1</mn>
                  <mo stretchy="false">+</mo>
                  <mn>0</mn>
                </mrow>
              </mrow>
              <mo fence="true" form="postfix" stretchy="false">)</mo>
            </mrow>
          </mrow>
          <mo stretchy="false">=</mo>
          <mn>0.5</mn>
        </mrow>
      </mstyle>
    </mstyle>
    <annotation encoding="StarMath 5.0">{color white{size 20{ {1}over{2} times (1+0) =0.5 }}}
</annotation>
  </semantics>
</math>
</file>